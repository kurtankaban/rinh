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10000089064FD6D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5.667cm" style:rel-column-width="21845*"/>
    </style:style>
    <style:style style:name="Table.A1" style:family="table-cell">
      <style:table-cell-properties fo:padding="0.101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5.667cm" style:rel-column-width="21845*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4.249cm" style:rel-column-width="16383*"/>
    </style:style>
    <style:style style:name="Table_5f_2.D" style:display-name="Table_2.D" style:family="table-column">
      <style:table-column-properties style:column-width="4.251cm" style:rel-column-width="16386*"/>
    </style:style>
    <style:style style:name="Table_5f_2.A1" style:display-name="Table_2.A1" style:family="table-cell">
      <style:table-cell-properties fo:padding="0.101cm" fo:border="none"/>
    </style:style>
    <style:style style:name="Table_5f_3" style:display-name="Table_3" style:family="table">
      <style:table-properties style:width="17cm" table:align="margins"/>
    </style:style>
    <style:style style:name="Table_5f_3.A" style:display-name="Table_3.A" style:family="table-column">
      <style:table-column-properties style:column-width="8.5cm" style:rel-column-width="32767*"/>
    </style:style>
    <style:style style:name="Table_5f_3.B" style:display-name="Table_3.B" style:family="table-column">
      <style:table-column-properties style:column-width="8.5cm" style:rel-column-width="32768*"/>
    </style:style>
    <style:style style:name="Table_5f_3.A1" style:display-name="Table_3.A1" style:family="table-cell">
      <style:table-cell-properties fo:padding="0.101cm" fo:border="none"/>
    </style:style>
    <style:style style:name="Table_5f_4" style:display-name="Table_4" style:family="table">
      <style:table-properties style:width="17cm" table:align="margins"/>
    </style:style>
    <style:style style:name="Table_5f_4.A" style:display-name="Table_4.A" style:family="table-column">
      <style:table-column-properties style:column-width="5.667cm" style:rel-column-width="21845*"/>
    </style:style>
    <style:style style:name="Table_5f_4.A1" style:display-name="Table_4.A1" style:family="table-cell">
      <style:table-cell-properties fo:padding="0.101cm" fo:border="none"/>
    </style:style>
    <style:style style:name="Table_5f_5" style:display-name="Table_5" style:family="table">
      <style:table-properties style:width="17cm" table:align="margins"/>
    </style:style>
    <style:style style:name="Table_5f_5.A" style:display-name="Table_5.A" style:family="table-column">
      <style:table-column-properties style:column-width="5.667cm" style:rel-column-width="21845*"/>
    </style:style>
    <style:style style:name="Table_5f_5.A1" style:display-name="Table_5.A1" style:family="table-cell">
      <style:table-cell-properties fo:padding="0.101cm" fo:border="none"/>
    </style:style>
    <style:style style:name="P1" style:family="paragraph" style:parent-style-name="Standard">
      <style:paragraph-properties fo:margin-top="0.499cm" fo:margin-bottom="0.3cm" style:contextual-spacing="false" fo:line-height="115%" fo:text-align="justify" style:justify-single-word="false"/>
      <style:text-properties style:font-name="Times New Roman" fo:font-size="14pt" fo:font-weight="bold"/>
    </style:style>
    <style:style style:name="P2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 fo:font-weight="bold"/>
    </style:style>
    <style:style style:name="P3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/>
    </style:style>
    <style:style style:name="P6" style:family="paragraph" style:parent-style-name="Standard">
      <style:paragraph-properties fo:margin-top="0.7cm" fo:margin-bottom="0.501cm" style:contextual-spacing="false" fo:line-height="115%" fo:text-align="justify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Times New Roman" fo:font-size="14pt" fo:font-style="italic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ОТЧЁТ</text:h>
      <text:p text:style-name="P4">по лабораторной работе №7</text:p>
      <text:p text:style-name="P4">по дисциплине «Моделирование бизнес-процессов»</text:p>
      <text:p text:style-name="P4"/>
      <text:p text:style-name="P5"><text:span text:style-name="T1">Тема:</text:span> Моделирование бизнес-процесса с помощью методологии ARIS в Draw.io</text:p>
      <text:p text:style-name="P5">Выполнил: студент группы БИНOZS-331 Трофимов А.Н.</text:p>
      <text:p text:style-name="P5"/>
      <text:p text:style-name="P1">1. Цель работы</text:p>
      <text:p text:style-name="P5">Сформировать умение проектировать и визуализировать бизнес-процессы организации, используя методологию ARIS и функциональные возможности Draw.io. В ходе работы необходимо построить диаграмму EPC (Event-driven Process Chain) для бизнес-процесса «Обработка заказа клиента» компании Quill, определить функции, события, логические операторы, ответственных исполнителей, используемые документы и информационные системы.</text:p>
      <text:p text:style-name="P5"/>
      <text:p text:style-name="P1">2. Краткие теоретические сведения</text:p>
      <text:p text:style-name="P5">Методология ARIS (Architecture of Integrated Information Systems) была разработана профессором Августом-Вильгельмом Шеером и представляет собой комплексный подход к описанию предприятия. ARIS рассматривает организацию через четыре взаимосвязанных аспекта: организационная структура (кто выполняет работу -- подразделения и роли), функциональная структура (что выполняется -- бизнес-функции и их иерархия), структура данных (какая информация создаётся и используется -- документы, объекты, базы данных) и структура процессов (в каком порядке выполняются действия -- интеграция трёх предыдущих аспектов). Такая декомпозиция позволяет системно описать деятельность компании любого масштаба.</text:p>
      <text:p text:style-name="P5">Основной нотацией ARIS для описания процессов является EPC (Event-driven Process Chain) -- цепочка процессов, управляемая событиями. Процесс в EPC описывается как последовательность строго чередующихся событий и функций, связанных логическими операторами. Элементы нотации: функция (прямоугольник со скруглёнными углами) -- описывает выполняемое действие; событие (шестиугольник) -- фиксирует состояние процесса, инициирует или завершает функцию; логические операторы AND (параллельное выполнение), OR (один или несколько путей) и XOR (выбор ровно одного пути) задают <text:soft-page-break/>ветвление и слияние потоков.</text:p>
      <text:p text:style-name="P5">Расширенная нотация eEPC дополняет базовую модель организационными единицами (подразделения, роли), документами, информационными системами и другими ресурсами, которые привязываются к функциям через пунктирные связи. Это делает модель более информативной: видно не только что и в каком порядке выполняется, но и кто, с помощью каких систем, на основании каких документов. Draw.io предоставляет набор готовых шаблонов для построения EPC-диаграмм, включая все типы элементов расширенной нотации.</text:p>
      <text:p text:style-name="P5"/>
      <text:p text:style-name="P1">3. Ход работы</text:p>
      <text:p text:style-name="P1">3.1. Выбор процесса и определение границ</text:p>
      <text:p text:style-name="P5">Для моделирования выбран процесс «Обработка заказа клиента» компании Quill, специализирующейся на сборке и продаже компьютеров. Границы процесса: начало -- входящий звонок клиента с запросом на покупку компьютера; окончание -- передача собранного и протестированного заказа клиенту. Процесс охватывает полный цикл от первого контакта до отгрузки готовой продукции.</text:p>
      <text:p text:style-name="P1">3.2. Определение функций процесса</text:p>
      <text:p text:style-name="P5">В процессе выделены следующие функции:</text:p>
      <table:table table:name="Table" table:style-name="Table">
        <table:table-column table:style-name="Table.A" table:number-columns-repeated="3"/>
        <table:table-row>
          <table:table-cell table:style-name="Table.A1" office:value-type="string">
            <text:p text:style-name="P2">№</text:p>
          </table:table-cell>
          <table:table-cell table:style-name="Table.A1" office:value-type="string">
            <text:p text:style-name="P2">Функция</text:p>
          </table:table-cell>
          <table:table-cell table:style-name="Table.A1" office:value-type="string">
            <text:p text:style-name="P2">Описание</text:p>
          </table:table-cell>
        </table:table-row>
        <table:table-row>
          <table:table-cell table:style-name="Table.A1" office:value-type="string">
            <text:p text:style-name="P5">F1</text:p>
          </table:table-cell>
          <table:table-cell table:style-name="Table.A1" office:value-type="string">
            <text:p text:style-name="P5">Принять звонок клиента</text:p>
          </table:table-cell>
          <table:table-cell table:style-name="Table.A1" office:value-type="string">
            <text:p text:style-name="P5">Приём входящего обращения, уточнение потребностей, фиксация запроса в CRM</text:p>
          </table:table-cell>
        </table:table-row>
        <table:table-row>
          <table:table-cell table:style-name="Table.A1" office:value-type="string">
            <text:p text:style-name="P5">F2</text:p>
          </table:table-cell>
          <table:table-cell table:style-name="Table.A1" office:value-type="string">
            <text:p text:style-name="P5">Проверить наличие товара</text:p>
          </table:table-cell>
          <table:table-cell table:style-name="Table.A1" office:value-type="string">
            <text:p text:style-name="P5">Проверка доступности необходимых комплектующих на складе через систему учёта</text:p>
          </table:table-cell>
        </table:table-row>
        <table:table-row>
          <table:table-cell table:style-name="Table.A1" office:value-type="string">
            <text:p text:style-name="P5">F3</text:p>
          </table:table-cell>
          <table:table-cell table:style-name="Table.A1" office:value-type="string">
            <text:p text:style-name="P5">Оформить заказ</text:p>
          </table:table-cell>
          <table:table-cell table:style-name="Table.A1" office:value-type="string">
            <text:p text:style-name="P5">Внесение данных заказа в CRM-систему, формирование <text:soft-page-break/>спецификации</text:p>
          </table:table-cell>
        </table:table-row>
        <table:table-row>
          <table:table-cell table:style-name="Table.A1" office:value-type="string">
            <text:p text:style-name="P5">F4</text:p>
          </table:table-cell>
          <table:table-cell table:style-name="Table.A1" office:value-type="string">
            <text:p text:style-name="P5">Заказать недостающие комплектующие</text:p>
          </table:table-cell>
          <table:table-cell table:style-name="Table.A1" office:value-type="string">
            <text:p text:style-name="P5">Формирование заявки поставщику на отсутствующие позиции</text:p>
          </table:table-cell>
        </table:table-row>
        <table:table-row>
          <table:table-cell table:style-name="Table.A1" office:value-type="string">
            <text:p text:style-name="P5">F5</text:p>
          </table:table-cell>
          <table:table-cell table:style-name="Table.A1" office:value-type="string">
            <text:p text:style-name="P5">Подготовить комплектующие</text:p>
          </table:table-cell>
          <table:table-cell table:style-name="Table.A1" office:value-type="string">
            <text:p text:style-name="P5">Комплектация заказа со склада по спецификации</text:p>
          </table:table-cell>
        </table:table-row>
        <table:table-row>
          <table:table-cell table:style-name="Table.A1" office:value-type="string">
            <text:p text:style-name="P5">F6</text:p>
          </table:table-cell>
          <table:table-cell table:style-name="Table.A1" office:value-type="string">
            <text:p text:style-name="P5">Собрать компьютер</text:p>
          </table:table-cell>
          <table:table-cell table:style-name="Table.A1" office:value-type="string">
            <text:p text:style-name="P5">Физическая сборка компьютера из подготовленных комплектующих</text:p>
          </table:table-cell>
        </table:table-row>
        <table:table-row>
          <table:table-cell table:style-name="Table.A1" office:value-type="string">
            <text:p text:style-name="P5">F7</text:p>
          </table:table-cell>
          <table:table-cell table:style-name="Table.A1" office:value-type="string">
            <text:p text:style-name="P5">Протестировать компьютер</text:p>
          </table:table-cell>
          <table:table-cell table:style-name="Table.A1" office:value-type="string">
            <text:p text:style-name="P5">Проведение функционального и нагрузочного тестирования</text:p>
          </table:table-cell>
        </table:table-row>
        <table:table-row>
          <table:table-cell table:style-name="Table.A1" office:value-type="string">
            <text:p text:style-name="P5">F8</text:p>
          </table:table-cell>
          <table:table-cell table:style-name="Table.A1" office:value-type="string">
            <text:p text:style-name="P5">Заменить неисправные компоненты</text:p>
          </table:table-cell>
          <table:table-cell table:style-name="Table.A1" office:value-type="string">
            <text:p text:style-name="P5">Замена дефектных компонентов при обнаружении брака</text:p>
          </table:table-cell>
        </table:table-row>
        <table:table-row>
          <table:table-cell table:style-name="Table.A1" office:value-type="string">
            <text:p text:style-name="P5">F9</text:p>
          </table:table-cell>
          <table:table-cell table:style-name="Table.A1" office:value-type="string">
            <text:p text:style-name="P5">Упаковать и отгрузить</text:p>
          </table:table-cell>
          <table:table-cell table:style-name="Table.A1" office:value-type="string">
            <text:p text:style-name="P5">Упаковка готового изделия и передача в службу доставки</text:p>
          </table:table-cell>
        </table:table-row>
      </table:table>
      <text:p text:style-name="P5"/>
      <text:p text:style-name="P1">3.3. Определение событий</text:p>
      <table:table table:name="Table_1" table:style-name="Table_5f_1">
        <table:table-column table:style-name="Table_5f_1.A" table:number-columns-repeated="3"/>
        <table:table-row>
          <table:table-cell table:style-name="Table_5f_1.A1" office:value-type="string">
            <text:p text:style-name="P2">№</text:p>
          </table:table-cell>
          <table:table-cell table:style-name="Table_5f_1.A1" office:value-type="string">
            <text:p text:style-name="P2">Событие</text:p>
          </table:table-cell>
          <table:table-cell table:style-name="Table_5f_1.A1" office:value-type="string">
            <text:p text:style-name="P2">Тип</text:p>
          </table:table-cell>
        </table:table-row>
        <table:table-row>
          <table:table-cell table:style-name="Table_5f_1.A1" office:value-type="string">
            <text:p text:style-name="P5">E1</text:p>
          </table:table-cell>
          <table:table-cell table:style-name="Table_5f_1.A1" office:value-type="string">
            <text:p text:style-name="P5">Звонок клиента получен</text:p>
          </table:table-cell>
          <table:table-cell table:style-name="Table_5f_1.A1" office:value-type="string">
            <text:p text:style-name="P5">Начальное</text:p>
          </table:table-cell>
        </table:table-row>
        <table:table-row>
          <table:table-cell table:style-name="Table_5f_1.A1" office:value-type="string">
            <text:p text:style-name="P5">E2</text:p>
          </table:table-cell>
          <table:table-cell table:style-name="Table_5f_1.A1" office:value-type="string">
            <text:p text:style-name="P5">Потребности клиента выяснены</text:p>
          </table:table-cell>
          <table:table-cell table:style-name="Table_5f_1.A1" office:value-type="string">
            <text:p text:style-name="P5">Промежуточное</text:p>
          </table:table-cell>
        </table:table-row>
        <table:table-row>
          <table:table-cell table:style-name="Table_5f_1.A1" office:value-type="string">
            <text:p text:style-name="P5">E3</text:p>
          </table:table-cell>
          <table:table-cell table:style-name="Table_5f_1.A1" office:value-type="string">
            <text:p text:style-name="P5">Товар в наличии</text:p>
          </table:table-cell>
          <table:table-cell table:style-name="Table_5f_1.A1" office:value-type="string">
            <text:p text:style-name="P5">Промежуточное (исход XOR)</text:p>
          </table:table-cell>
        </table:table-row>
        <table:table-row>
          <table:table-cell table:style-name="Table_5f_1.A1" office:value-type="string">
            <text:p text:style-name="P5">E4</text:p>
          </table:table-cell>
          <table:table-cell table:style-name="Table_5f_1.A1" office:value-type="string">
            <text:p text:style-name="P5">Товар отсутствует</text:p>
          </table:table-cell>
          <table:table-cell table:style-name="Table_5f_1.A1" office:value-type="string">
            <text:p text:style-name="P5">Промежуточное (исход XOR)</text:p>
          </table:table-cell>
        </table:table-row>
        <text:soft-page-break/>
        <table:table-row>
          <table:table-cell table:style-name="Table_5f_1.A1" office:value-type="string">
            <text:p text:style-name="P5">E5</text:p>
          </table:table-cell>
          <table:table-cell table:style-name="Table_5f_1.A1" office:value-type="string">
            <text:p text:style-name="P5">Комплектующие заказаны у поставщика</text:p>
          </table:table-cell>
          <table:table-cell table:style-name="Table_5f_1.A1" office:value-type="string">
            <text:p text:style-name="P5">Промежуточное</text:p>
          </table:table-cell>
        </table:table-row>
        <table:table-row>
          <table:table-cell table:style-name="Table_5f_1.A1" office:value-type="string">
            <text:p text:style-name="P5">E6</text:p>
          </table:table-cell>
          <table:table-cell table:style-name="Table_5f_1.A1" office:value-type="string">
            <text:p text:style-name="P5">Заказ оформлен</text:p>
          </table:table-cell>
          <table:table-cell table:style-name="Table_5f_1.A1" office:value-type="string">
            <text:p text:style-name="P5">Промежуточное</text:p>
          </table:table-cell>
        </table:table-row>
        <table:table-row>
          <table:table-cell table:style-name="Table_5f_1.A1" office:value-type="string">
            <text:p text:style-name="P5">E7</text:p>
          </table:table-cell>
          <table:table-cell table:style-name="Table_5f_1.A1" office:value-type="string">
            <text:p text:style-name="P5">Комплектующие подготовлены</text:p>
          </table:table-cell>
          <table:table-cell table:style-name="Table_5f_1.A1" office:value-type="string">
            <text:p text:style-name="P5">Промежуточное</text:p>
          </table:table-cell>
        </table:table-row>
        <table:table-row>
          <table:table-cell table:style-name="Table_5f_1.A1" office:value-type="string">
            <text:p text:style-name="P5">E8</text:p>
          </table:table-cell>
          <table:table-cell table:style-name="Table_5f_1.A1" office:value-type="string">
            <text:p text:style-name="P5">Компьютер собран</text:p>
          </table:table-cell>
          <table:table-cell table:style-name="Table_5f_1.A1" office:value-type="string">
            <text:p text:style-name="P5">Промежуточное</text:p>
          </table:table-cell>
        </table:table-row>
        <table:table-row>
          <table:table-cell table:style-name="Table_5f_1.A1" office:value-type="string">
            <text:p text:style-name="P5">E9</text:p>
          </table:table-cell>
          <table:table-cell table:style-name="Table_5f_1.A1" office:value-type="string">
            <text:p text:style-name="P5">Тестирование пройдено</text:p>
          </table:table-cell>
          <table:table-cell table:style-name="Table_5f_1.A1" office:value-type="string">
            <text:p text:style-name="P5">Промежуточное (исход XOR)</text:p>
          </table:table-cell>
        </table:table-row>
        <table:table-row>
          <table:table-cell table:style-name="Table_5f_1.A1" office:value-type="string">
            <text:p text:style-name="P5">E10</text:p>
          </table:table-cell>
          <table:table-cell table:style-name="Table_5f_1.A1" office:value-type="string">
            <text:p text:style-name="P5">Брак обнаружен</text:p>
          </table:table-cell>
          <table:table-cell table:style-name="Table_5f_1.A1" office:value-type="string">
            <text:p text:style-name="P5">Промежуточное (исход XOR)</text:p>
          </table:table-cell>
        </table:table-row>
        <table:table-row>
          <table:table-cell table:style-name="Table_5f_1.A1" office:value-type="string">
            <text:p text:style-name="P5">E11</text:p>
          </table:table-cell>
          <table:table-cell table:style-name="Table_5f_1.A1" office:value-type="string">
            <text:p text:style-name="P5">Компоненты заменены</text:p>
          </table:table-cell>
          <table:table-cell table:style-name="Table_5f_1.A1" office:value-type="string">
            <text:p text:style-name="P5">Промежуточное</text:p>
          </table:table-cell>
        </table:table-row>
        <table:table-row>
          <table:table-cell table:style-name="Table_5f_1.A1" office:value-type="string">
            <text:p text:style-name="P5">E12</text:p>
          </table:table-cell>
          <table:table-cell table:style-name="Table_5f_1.A1" office:value-type="string">
            <text:p text:style-name="P5">Заказ выполнен</text:p>
          </table:table-cell>
          <table:table-cell table:style-name="Table_5f_1.A1" office:value-type="string">
            <text:p text:style-name="P5">Конечное</text:p>
          </table:table-cell>
        </table:table-row>
      </table:table>
      <text:p text:style-name="P5"/>
      <text:p text:style-name="P1">3.4. Логические операторы</text:p>
      <table:table table:name="Table_2" table:style-name="Table_5f_2">
        <table:table-column table:style-name="Table_5f_2.A" table:number-columns-repeated="3"/>
        <table:table-column table:style-name="Table_5f_2.D"/>
        <table:table-row>
          <table:table-cell table:style-name="Table_5f_2.A1" office:value-type="string">
            <text:p text:style-name="P2">Оператор</text:p>
          </table:table-cell>
          <table:table-cell table:style-name="Table_5f_2.A1" office:value-type="string">
            <text:p text:style-name="P2">Тип</text:p>
          </table:table-cell>
          <table:table-cell table:style-name="Table_5f_2.A1" office:value-type="string">
            <text:p text:style-name="P2">Расположение</text:p>
          </table:table-cell>
          <table:table-cell table:style-name="Table_5f_2.A1" office:value-type="string">
            <text:p text:style-name="P2">Описание</text:p>
          </table:table-cell>
        </table:table-row>
        <table:table-row>
          <table:table-cell table:style-name="Table_5f_2.A1" office:value-type="string">
            <text:p text:style-name="P5">OP1</text:p>
          </table:table-cell>
          <table:table-cell table:style-name="Table_5f_2.A1" office:value-type="string">
            <text:p text:style-name="P5">XOR (разделение)</text:p>
          </table:table-cell>
          <table:table-cell table:style-name="Table_5f_2.A1" office:value-type="string">
            <text:p text:style-name="P5">После F2 «Проверить наличие товара»</text:p>
          </table:table-cell>
          <table:table-cell table:style-name="Table_5f_2.A1" office:value-type="string">
            <text:p text:style-name="P5">Ветвление: товар в наличии (E3) или товар отсутствует (E4)</text:p>
          </table:table-cell>
        </table:table-row>
        <table:table-row>
          <table:table-cell table:style-name="Table_5f_2.A1" office:value-type="string">
            <text:p text:style-name="P5">OP2</text:p>
          </table:table-cell>
          <table:table-cell table:style-name="Table_5f_2.A1" office:value-type="string">
            <text:p text:style-name="P5">XOR (слияние)</text:p>
          </table:table-cell>
          <table:table-cell table:style-name="Table_5f_2.A1" office:value-type="string">
            <text:p text:style-name="P5">Перед F5 «Подготовить комплектующие»</text:p>
          </table:table-cell>
          <table:table-cell table:style-name="Table_5f_2.A1" office:value-type="string">
            <text:p text:style-name="P5">Слияние ветвей: товар был в наличии / комплектующие заказаны и получены</text:p>
          </table:table-cell>
        </table:table-row>
        <table:table-row>
          <table:table-cell table:style-name="Table_5f_2.A1" office:value-type="string">
            <text:p text:style-name="P5">OP3</text:p>
          </table:table-cell>
          <table:table-cell table:style-name="Table_5f_2.A1" office:value-type="string">
            <text:p text:style-name="P5">XOR (разделение)</text:p>
          </table:table-cell>
          <table:table-cell table:style-name="Table_5f_2.A1" office:value-type="string">
            <text:p text:style-name="P5">После F7 «Протестировать компьютер»</text:p>
          </table:table-cell>
          <table:table-cell table:style-name="Table_5f_2.A1" office:value-type="string">
            <text:p text:style-name="P5">Ветвление: тестирование пройдено (E9) или брак обнаружен (E10)</text:p>
          </table:table-cell>
        </table:table-row>
        <text:soft-page-break/>
        <table:table-row>
          <table:table-cell table:style-name="Table_5f_2.A1" office:value-type="string">
            <text:p text:style-name="P5">OP4</text:p>
          </table:table-cell>
          <table:table-cell table:style-name="Table_5f_2.A1" office:value-type="string">
            <text:p text:style-name="P5">XOR (слияние)</text:p>
          </table:table-cell>
          <table:table-cell table:style-name="Table_5f_2.A1" office:value-type="string">
            <text:p text:style-name="P5">Перед F7 «Протестировать компьютер»</text:p>
          </table:table-cell>
          <table:table-cell table:style-name="Table_5f_2.A1" office:value-type="string">
            <text:p text:style-name="P5">Слияние: первичная сборка / возврат после замены компонентов</text:p>
          </table:table-cell>
        </table:table-row>
      </table:table>
      <text:p text:style-name="P5"/>
      <text:p text:style-name="P1">3.5. Роли (организационные единицы)</text:p>
      <table:table table:name="Table_3" table:style-name="Table_5f_3">
        <table:table-column table:style-name="Table_5f_3.A"/>
        <table:table-column table:style-name="Table_5f_3.B"/>
        <table:table-row>
          <table:table-cell table:style-name="Table_5f_3.A1" office:value-type="string">
            <text:p text:style-name="P2">Роль</text:p>
          </table:table-cell>
          <table:table-cell table:style-name="Table_5f_3.A1" office:value-type="string">
            <text:p text:style-name="P2">Связанные функции</text:p>
          </table:table-cell>
        </table:table-row>
        <table:table-row>
          <table:table-cell table:style-name="Table_5f_3.A1" office:value-type="string">
            <text:p text:style-name="P5">Менеджер по продажам</text:p>
          </table:table-cell>
          <table:table-cell table:style-name="Table_5f_3.A1" office:value-type="string">
            <text:p text:style-name="P5">F1 -- Принять звонок клиента, F3 -- Оформить заказ</text:p>
          </table:table-cell>
        </table:table-row>
        <table:table-row>
          <table:table-cell table:style-name="Table_5f_3.A1" office:value-type="string">
            <text:p text:style-name="P5">Кладовщик</text:p>
          </table:table-cell>
          <table:table-cell table:style-name="Table_5f_3.A1" office:value-type="string">
            <text:p text:style-name="P5">F2 -- Проверить наличие товара, F4 -- Заказать недостающие комплектующие, F5 -- Подготовить комплектующие</text:p>
          </table:table-cell>
        </table:table-row>
        <table:table-row>
          <table:table-cell table:style-name="Table_5f_3.A1" office:value-type="string">
            <text:p text:style-name="P5">Сборщик</text:p>
          </table:table-cell>
          <table:table-cell table:style-name="Table_5f_3.A1" office:value-type="string">
            <text:p text:style-name="P5">F6 -- Собрать компьютер, F8 -- Заменить неисправные компоненты, F9 -- Упаковать и отгрузить</text:p>
          </table:table-cell>
        </table:table-row>
        <table:table-row>
          <table:table-cell table:style-name="Table_5f_3.A1" office:value-type="string">
            <text:p text:style-name="P5">Тестировщик</text:p>
          </table:table-cell>
          <table:table-cell table:style-name="Table_5f_3.A1" office:value-type="string">
            <text:p text:style-name="P5">F7 -- Протестировать компьютер</text:p>
          </table:table-cell>
        </table:table-row>
      </table:table>
      <text:p text:style-name="P5"/>
      <text:p text:style-name="P1">3.6. Документы</text:p>
      <table:table table:name="Table_4" table:style-name="Table_5f_4">
        <table:table-column table:style-name="Table_5f_4.A" table:number-columns-repeated="3"/>
        <table:table-row>
          <table:table-cell table:style-name="Table_5f_4.A1" office:value-type="string">
            <text:p text:style-name="P2">Документ</text:p>
          </table:table-cell>
          <table:table-cell table:style-name="Table_5f_4.A1" office:value-type="string">
            <text:p text:style-name="P2">Связанные функции</text:p>
          </table:table-cell>
          <table:table-cell table:style-name="Table_5f_4.A1" office:value-type="string">
            <text:p text:style-name="P2">Роль в процессе</text:p>
          </table:table-cell>
        </table:table-row>
        <table:table-row>
          <table:table-cell table:style-name="Table_5f_4.A1" office:value-type="string">
            <text:p text:style-name="P5">Заявка клиента</text:p>
          </table:table-cell>
          <table:table-cell table:style-name="Table_5f_4.A1" office:value-type="string">
            <text:p text:style-name="P5">F1 (выход), F3 (вход)</text:p>
          </table:table-cell>
          <table:table-cell table:style-name="Table_5f_4.A1" office:value-type="string">
            <text:p text:style-name="P5">Фиксирует потребности клиента, конфигурацию</text:p>
          </table:table-cell>
        </table:table-row>
        <table:table-row>
          <table:table-cell table:style-name="Table_5f_4.A1" office:value-type="string">
            <text:p text:style-name="P5">Спецификация заказа</text:p>
          </table:table-cell>
          <table:table-cell table:style-name="Table_5f_4.A1" office:value-type="string">
            <text:p text:style-name="P5">F3 (выход), F5 (вход), F6 (вход)</text:p>
          </table:table-cell>
          <table:table-cell table:style-name="Table_5f_4.A1" office:value-type="string">
            <text:p text:style-name="P5">Детальный перечень комплектующих для сборки</text:p>
          </table:table-cell>
        </table:table-row>
        <table:table-row>
          <table:table-cell table:style-name="Table_5f_4.A1" office:value-type="string">
            <text:p text:style-name="P5">Акт тестирования</text:p>
          </table:table-cell>
          <table:table-cell table:style-name="Table_5f_4.A1" office:value-type="string">
            <text:p text:style-name="P5">F7 (выход)</text:p>
          </table:table-cell>
          <table:table-cell table:style-name="Table_5f_4.A1" office:value-type="string">
            <text:p text:style-name="P5">Результаты функционального и нагрузочного тестирования</text:p>
          </table:table-cell>
        </table:table-row>
        <text:soft-page-break/>
        <table:table-row>
          <table:table-cell table:style-name="Table_5f_4.A1" office:value-type="string">
            <text:p text:style-name="P5">Накладная</text:p>
          </table:table-cell>
          <table:table-cell table:style-name="Table_5f_4.A1" office:value-type="string">
            <text:p text:style-name="P5">F9 (выход)</text:p>
          </table:table-cell>
          <table:table-cell table:style-name="Table_5f_4.A1" office:value-type="string">
            <text:p text:style-name="P5">Документ на передачу готовой продукции клиенту</text:p>
          </table:table-cell>
        </table:table-row>
      </table:table>
      <text:p text:style-name="P5"/>
      <text:p text:style-name="P1">3.7. Информационные системы</text:p>
      <table:table table:name="Table_5" table:style-name="Table_5f_5">
        <table:table-column table:style-name="Table_5f_5.A" table:number-columns-repeated="3"/>
        <table:table-row>
          <table:table-cell table:style-name="Table_5f_5.A1" office:value-type="string">
            <text:p text:style-name="P2">IT-система</text:p>
          </table:table-cell>
          <table:table-cell table:style-name="Table_5f_5.A1" office:value-type="string">
            <text:p text:style-name="P2">Связанные функции</text:p>
          </table:table-cell>
          <table:table-cell table:style-name="Table_5f_5.A1" office:value-type="string">
            <text:p text:style-name="P2">Назначение</text:p>
          </table:table-cell>
        </table:table-row>
        <table:table-row>
          <table:table-cell table:style-name="Table_5f_5.A1" office:value-type="string">
            <text:p text:style-name="P5">CRM-система</text:p>
          </table:table-cell>
          <table:table-cell table:style-name="Table_5f_5.A1" office:value-type="string">
            <text:p text:style-name="P5">F1 -- регистрация обращения, F3 -- оформление заказа</text:p>
          </table:table-cell>
          <table:table-cell table:style-name="Table_5f_5.A1" office:value-type="string">
            <text:p text:style-name="P5">Управление взаимоотношениями с клиентами, учёт заказов</text:p>
          </table:table-cell>
        </table:table-row>
        <table:table-row>
          <table:table-cell table:style-name="Table_5f_5.A1" office:value-type="string">
            <text:p text:style-name="P5">Система учёта склада</text:p>
          </table:table-cell>
          <table:table-cell table:style-name="Table_5f_5.A1" office:value-type="string">
            <text:p text:style-name="P5">F2 -- проверка остатков, F4 -- формирование заявки поставщику, F5 -- списание комплектующих</text:p>
          </table:table-cell>
          <table:table-cell table:style-name="Table_5f_5.A1" office:value-type="string">
            <text:p text:style-name="P5">Складской учёт, контроль запасов, работа с поставщиками</text:p>
          </table:table-cell>
        </table:table-row>
      </table:table>
      <text:p text:style-name="P5"/>
      <text:p text:style-name="P1">3.8. Построение диаграммы в Draw.io</text:p>
      <text:p text:style-name="P5">Диаграмма построена в Draw.io с использованием стандартных элементов расширенной нотации eEPC. Процесс выстроен вертикально сверху вниз. Функции и события строго чередуются в соответствии с правилами нотации. К каждой функции через пунктирные линии привязаны соответствующие роли (Менеджер по продажам, Кладовщик, Сборщик, Тестировщик), документы (Заявка, Спецификация, Акт тестирования, Накладная) и IT-системы (CRM, Система учёта склада). Логические операторы XOR обозначены окружностями с символом «X» внутри. В нижней части диаграммы размещена легенда с условными обозначениями всех типов элементов: функция, событие, оператор XOR, роль, документ, IT-система.</text:p>
      <text:p text:style-name="P5"/>
      <text:p text:style-name="P1"/>
      <text:p text:style-name="P1"/>
      <text:p text:style-name="P1"/>
      <text:p text:style-name="P1"><text:soft-page-break/>4. Диаграммы</text:p>
      <text:p text:style-name="P7"><draw:frame draw:style-name="fr1" draw:name="Изображение1" text:anchor-type="char" svg:width="13.575cm" svg:height="22.661cm" draw:z-index="0"><draw:image xlink:href="Pictures/10000001000005210000089064FD6D57.png" xlink:type="simple" xlink:show="embed" xlink:actuate="onLoad" draw:mime-type="image/png"/></draw:frame>Рисунок 1. Диаграмма EPC процесса «Обработка заказа клиента» компании Quill</text:p>
      <text:p text:style-name="P6"><text:soft-page-break/><text:span text:style-name="T1">5. Ответы на контрольные вопросы</text:span></text:p>
      <text:p text:style-name="P2">1. Что такое методология ARIS и каковы её основные принципы?</text:p>
      <text:p text:style-name="P5">ARIS (Architecture of Integrated Information Systems) -- это комплексный подход к описанию, анализу и оптимизации бизнес-процессов предприятия, разработанный профессором А.-В. Шеером. Основной принцип ARIS -- декомпозиция сложной системы на четыре отдельных аспекта (организация, функции, данные, процессы), которые моделируются по отдельности, а затем интегрируются через процессный вид. Это позволяет снизить сложность описания и при этом обеспечить полноту модели. В нашей работе мы применили процессный аспект (EPC-диаграмма), связав функции обработки заказа с ролями (Менеджер по продажам, Кладовщик, Сборщик, Тестировщик), документами (Заявка, Спецификация) и IT-системами (CRM, Система учёта склада). Принцип многоуровневости ARIS позволяет детализировать модель от общего обзора до конкретных операций через механизм декомпозиции.</text:p>
      <text:p text:style-name="P5"/>
      <text:p text:style-name="P2">2. Какие четыре аспекта рассматриваются при моделировании по методологии ARIS?</text:p>
      <text:p text:style-name="P5">Методология ARIS выделяет четыре ключевых аспекта: организационный (кто выполняет работу -- подразделения, роли, должности), функциональный (что выполняется -- бизнес-функции и их иерархическая декомпозиция), аспект данных (какая информация создаётся и используется -- документы, базы данных, информационные объекты) и аспект управления/процессов (в каком порядке выполняются действия -- последовательность, ветвления, параллельность). В нашей модели организационный аспект представлен четырьмя ролями, функциональный -- девятью функциями обработки заказа, аспект данных -- четырьмя документами и двумя IT-системами. Процессный аспект интегрирует все три остальных аспекта через единую EPC-диаграмму, показывая последовательность выполнения функций с привязкой к исполнителям, документам и системам.</text:p>
      <text:p text:style-name="P5"/>
      <text:p text:style-name="P2">3. Чем нотация ARIS EPC отличается от других методологий моделирования?</text:p>
      <text:p text:style-name="P5">Ключевое отличие EPC от других нотаций -- строгое чередование событий и функций, обеспечивающее явную фиксацию состояний процесса между каждой операцией. В отличие от BPMN, где промежуточные события опциональны и задачи могут следовать друг за другом напрямую, в EPC каждая функция <text:soft-page-break/>обязательно предваряется и завершается событием. По сравнению с IDEF0, EPC ориентирована на описание последовательности выполнения (control flow), а не на функциональную декомпозицию входов-выходов-управления-механизмов. В нашей модели это проявляется, например, в том, что после функции «Протестировать компьютер» обязательно следуют события «Тестирование пройдено» или «Брак обнаружен», явно фиксируя результат операции. EPC также позволяет напрямую привязывать к функциям роли, документы и IT-системы, что делает диаграмму самодостаточной.</text:p>
      <text:p text:style-name="P5"/>
      <text:p text:style-name="P2">4. Какие элементы нотации EPC вы использовали в своей модели и почему?</text:p>
      <text:p text:style-name="P5">В модели использованы функции (9 штук) для описания действий процесса, события (12 штук) для фиксации состояний и результатов, операторы XOR (4 штуки) для ветвления при проверке наличия товара и при оценке результатов тестирования. Организационные единицы в виде ролей (Менеджер по продажам, Кладовщик, Сборщик, Тестировщик) привязаны к функциям для обозначения ответственных исполнителей. Документы (Заявка клиента, Спецификация заказа, Акт тестирования, Накладная) отражают информационные потоки между функциями. IT-системы (CRM-система, Система учёта склада) показывают средства автоматизации. Каждый элемент выбран для полного описания процесса: кто, что, в каком порядке делает, какие документы создаёт и какими системами пользуется.</text:p>
      <text:p text:style-name="P5"/>
      <text:p text:style-name="P2">5. Как логические операторы (AND, OR, XOR) влияют на ход выполнения процесса?</text:p>
      <text:p text:style-name="P5">Оператор XOR (исключающее ИЛИ) означает выбор ровно одного из нескольких путей -- в нашей модели он используется после проверки наличия товара (товар либо есть на складе, либо его нет) и после тестирования (пройдено успешно либо обнаружен брак). Оператор AND (И) предполагает параллельное выполнение всех исходящих ветвей и ожидание завершения всех входящих перед продолжением. Оператор OR (ИЛИ) допускает выполнение одной или нескольких ветвей одновременно, что делает его наиболее гибким, но и наименее предсказуемым. В нашей модели применены исключительно операторы XOR, поскольку все точки ветвления предполагают взаимоисключающие исходы. Правильный выбор оператора критически важен: использование OR вместо XOR привело бы к некорректной логике, допускающей одновременное наличие и отсутствие товара на складе.</text:p>
      <text:p text:style-name="P2"><text:soft-page-break/>6. Какие преимущества дает использование Draw.io для моделирования процессов?</text:p>
      <text:p text:style-name="P5">Draw.io -- бесплатный кроссплатформенный инструмент, доступный как в браузере, так и в виде десктопного приложения, что снижает порог входа и не требует закупки лицензий. Он поддерживает готовые библиотеки элементов для EPC, BPMN, UML и других нотаций, что ускоряет построение диаграмм. Файлы сохраняются в открытом формате XML (.drawio), который легко версионировать в системах контроля версий (Git) и экспортировать в PNG, SVG, PDF для включения в отчёты. В нашей работе Draw.io позволил быстро создать EPC-диаграмму с легендой, привязать роли и документы к функциям через пунктирные связи. Среди ограничений стоит отметить отсутствие встроенной валидации правил нотации, в отличие от специализированных инструментов вроде ARIS Toolset или Signavio.</text:p>
      <text:p text:style-name="P5"/>
      <text:p text:style-name="P2">7. Как определить точки возможного улучшения в бизнес-процессе на основе модели?</text:p>
      <text:p text:style-name="P5">Точки улучшения выявляются через анализ модели по нескольким критериям: наличие возвратных циклов (в нашей модели -- цикл «тестирование -- замена компонентов -- повторное тестирование»), которые указывают на потери времени и ресурсов; количество переходов между ролями (каждый переход -- риск задержки и потери информации); наличие ручных операций, которые можно автоматизировать. В модели Quill видно, что функция F4 «Заказать недостающие комплектующие» значительно удлиняет процесс и зависит от внешних поставщиков -- это сигнал к улучшению системы управления запасами. Цикл возврата при обнаружении брака можно сократить за счёт входного контроля комплектующих перед началом сборки. Автоматизация проверки наличия товара через интеграцию CRM с Системой учёта склада устранит ручную операцию и ускорит первичную обработку заказа.</text:p>
      <text:p text:style-name="P5"/>
      <text:p text:style-name="P2">8. Какова роль событий в управлении процессом?</text:p>
      <text:p text:style-name="P5">События в нотации EPC выполняют функцию триггеров и индикаторов состояния процесса. Стартовое событие «Звонок клиента получен» инициирует весь процесс, промежуточные события фиксируют результаты выполнения функций и определяют дальнейший маршрут, конечное событие «Заказ выполнен» сигнализирует о завершении. События после логических операторов играют управляющую роль: например, после XOR-оператора событие «Товар в наличии» или «Товар отсутствует» определяет, по какой из двух ветвей пойдёт <text:soft-page-break/>процесс. События также служат контрольными точками для мониторинга -- по ним можно измерять время между этапами, выявлять задержки и формировать KPI. Конечное событие может быть триггером для смежных процессов, например для выставления счёта или запуска послепродажного обслуживания.</text:p>
      <text:p text:style-name="P5"/>
      <text:p text:style-name="P2">9. Как организационная структура влияет на выполнение бизнес-процесса?</text:p>
      <text:p text:style-name="P5">Организационная структура определяет распределение ответственности и порядок взаимодействия участников процесса. В нашей модели процесс проходит через четыре роли (Менеджер по продажам, Кладовщик, Сборщик, Тестировщик), и каждая передача работы между ними является потенциальной точкой задержки из-за очередей, согласований или различий в приоритетах. Если Кладовщик перегружен, функции F2 «Проверить наличие» и F5 «Подготовить комплектующие» станут узкими местами всего процесса. Централизация нескольких функций в одной роли может ускорить выполнение, но создаёт риски перегрузки и снижения качества. Чёткое закрепление ролей за функциями в модели EPC позволяет ещё на этапе проектирования выявить такие зависимости и принять меры по балансировке нагрузки.</text:p>
      <text:p text:style-name="P5"/>
      <text:p text:style-name="P2">10. Может ли одна диаграмма ARIS EPC содержать несколько уровней детализации?</text:p>
      <text:p text:style-name="P5">Стандартная практика ARIS предполагает использование иерархической декомпозиции: верхнеуровневая диаграмма содержит укрупнённые функции, каждая из которых может быть раскрыта в отдельную детализированную EPC-диаграмму через механизм «подпроцесс». Размещение всех уровней детализации на одной диаграмме противоречит принципу управления сложностью и делает модель нечитаемой. В нашей работе построена диаграмма одного уровня, однако функция «Собрать компьютер» при необходимости может быть декомпозирована в отдельную EPC с детальными шагами: установка процессора, монтаж оперативной памяти, подключение накопителей, прокладка кабелей и т.д. В Draw.io механизм декомпозиции реализуется через создание отдельных страниц (вкладок) с гиперссылками от функций верхнего уровня к соответствующим дочерним диаграммам.</text:p>
      <text:p text:style-name="P5"/>
      <text:p text:style-name="P5"/>
      <text:p text:style-name="P1"><text:soft-page-break/>6. Вывод</text:p>
      <text:p text:style-name="P5">В ходе лабораторной работы была освоена методология ARIS и нотация EPC для моделирования бизнес-процессов. Построена диаграмма EPC процесса «Обработка заказа клиента» компании Quill, включающая 9 функций, 12 событий, 4 логических оператора XOR, 4 роли (Менеджер по продажам, Кладовщик, Сборщик, Тестировщик), 4 документа (Заявка клиента, Спецификация заказа, Акт тестирования, Накладная) и 2 информационные системы (CRM-система, Система учёта склада). Диаграмма дополнена легендой с условными обозначениями всех типов элементов.</text:p>
      <text:p text:style-name="P5">Применение расширенной нотации eEPC позволило выявить потенциальные точки оптимизации: возвратный цикл при обнаружении брака на тестировании, зависимость от наличия комплектующих на складе (необходимость заказа у поставщиков), множественные переходы ответственности между ролями. Draw.io показал себя как удобный инструмент для построения EPC-диаграмм благодаря наличию готовых библиотек элементов и возможности гибкой компоновки. Полученные навыки применимы для анализа и документирования бизнес-процессов в реальных проекта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20T21:46:01.168000000</dc:date>
    <meta:editing-duration>PT2M16S</meta:editing-duration>
    <meta:editing-cycles>3</meta:editing-cycles>
    <meta:document-statistic meta:table-count="6" meta:image-count="1" meta:object-count="0" meta:page-count="12" meta:paragraph-count="172" meta:word-count="2058" meta:character-count="16334" meta:non-whitespace-character-count="14448"/>
  </office:meta>
</office:document-meta>
</file>