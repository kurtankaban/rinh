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D000003B70BE02B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>
      <style:paragraph-properties fo:margin-top="0.7cm" fo:margin-bottom="0.501cm" style:contextual-spacing="false" fo:line-height="115%" fo:text-align="justify" style:justify-single-word="false"/>
      <style:text-properties style:font-name="Times New Roman" fo:font-size="14pt" fo:font-weight="bold"/>
    </style:style>
    <style:style style:name="P4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6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left="0.801cm" fo:margin-top="0cm" fo:margin-bottom="0.101cm" style:contextual-spacing="false" fo:line-height="115%" fo:text-align="justify" style:justify-single-word="false"/>
      <style:text-properties style:font-name="Times New Roman" fo:font-size="14pt"/>
    </style:style>
    <style:style style:name="P8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P9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language="en" fo:country="US" officeooo:rsid="0005fc88" officeooo:paragraph-rsid="0005fc88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ТЧЁТ</text:h>
      <text:p text:style-name="P5">по лабораторной работе №10</text:p>
      <text:p text:style-name="P5">по дисциплине «Моделирование бизнес-процессов»</text:p>
      <text:p text:style-name="P5"/>
      <text:p text:style-name="P6"><text:span text:style-name="T1">Тема:</text:span> Анализ свойств бизнес-процесса</text:p>
      <text:p text:style-name="P6">Выполнил: студент группы БИНOZS-331 Трофимов А.Н.</text:p>
      <text:p text:style-name="P6"/>
      <text:p text:style-name="P1">1. Цель работы</text:p>
      <text:p text:style-name="P6">Освоить методы комплексного анализа бизнес-процессов, применить аналитический подход к банковским процессам. Научиться определять и документировать функциональные и нефункциональные свойства процессов, выявлять зависимости между процессами, а также формировать пользовательские параметры, специфичные для конкретной предметной области.</text:p>
      <text:p text:style-name="P6"/>
      <text:p text:style-name="P1">2. Краткие теоретические сведения</text:p>
      <text:p text:style-name="P6">Анализ свойств бизнес-процесса — это систематическое исследование характеристик процесса, которое позволяет оценить его эффективность, выявить слабые места и определить направления оптимизации. Свойства бизнес-процесса делятся на функциональные (что процесс делает: входы, выходы, последовательность операций, правила обработки) и нефункциональные (как процесс работает: производительность, надёжность, безопасность, масштабируемость, соответствие регуляторным требованиям). Корректное определение обеих групп свойств критически важно для управления качеством процесса.</text:p>
      <text:p text:style-name="P6">В банковской сфере анализ свойств процесса приобретает особое значение в силу жёсткого регулирования со стороны Центрального банка РФ, требований законодательства о противодействии отмыванию денежных средств (ФЗ-115), стандартов информационной безопасности (PCI DSS) и необходимости обеспечения высокой доступности сервисов. Банковские процессы характеризуются высокой степенью формализации, наличием многоуровневых проверок и контролей, а также строгими временными ограничениями (SLA — Service Level Agreement).</text:p>
      <text:p text:style-name="P6">Важным аспектом анализа является определение Process Owner (владельца <text:soft-page-break/>процесса) — лица, ответственного за результативность и эффективность процесса в целом. Владелец процесса обеспечивает мониторинг ключевых показателей, инициирует улучшения и координирует взаимодействие между подразделениями. Кроме того, при анализе необходимо выявлять зависимости между процессами: входные данные одного процесса могут быть выходами другого, а сбой в одном процессе может каскадно повлиять на смежные.</text:p>
      <text:p text:style-name="P6"/>
      <text:p text:style-name="P1">3. Ход работы</text:p>
      <text:p text:style-name="P6">В качестве объекта анализа был выбран банковский процесс «Открытие расчётного счёта юридическому лицу». Данный процесс является одним из ключевых клиентских процессов коммерческого банка и характеризуется высокой степенью регулирования.</text:p>
      <text:p text:style-name="P2">Этап 1. Определение функциональных свойств процесса:</text:p>
      <text:p text:style-name="P7"><text:span text:style-name="T1">Цель процесса:</text:span> открытие расчётного счёта для юридического лица в соответствии с требованиями законодательства РФ и внутренними регламентами банка.</text:p>
      <text:p text:style-name="P7"><text:span text:style-name="T1">Входные данные:</text:span> пакет документов юридического лица (устав, решение о создании, приказ о назначении руководителя, карточка с образцами подписей, заявление на открытие счёта, документы для идентификации бенефициарных владельцев).</text:p>
      <text:p text:style-name="P7"><text:span text:style-name="T1">Выходные данные:</text:span> открытый расчётный счёт, договор банковского счёта, уведомление в ФНС, регистрация в системе ДБО.</text:p>
      <text:p text:style-name="P7"><text:span text:style-name="T1">Последовательность операций:</text:span> приём документов → проверка комплектности → идентификация клиента (KYC) → проверка по спискам ФОМ/ФТ → принятие решения → заключение договора → открытие счёта в АБС → подключение ДБО → уведомление ФНС.</text:p>
      <text:p text:style-name="P7"><text:span text:style-name="T1">Ответственные подразделения:</text:span> Фронт-офис (приём документов), Комплаенс (проверка KYC/AML), Бэк-офис (открытие счёта в системе), ИТ-департамент (подключение ДБО).</text:p>
      <text:p text:style-name="P2">Этап 2. Определение нефункциональных свойств:</text:p>
      <text:p text:style-name="P7"><text:span text:style-name="T1">Время выполнения (SLA):</text:span> не более 1 рабочего дня с момента предоставления полного пакета документов.</text:p>
      <text:p text:style-name="P7"><text:span text:style-name="T1">Надёжность:</text:span> 99.5% — доля успешно завершённых процессов без сбоев и ошибок.</text:p>
      <text:p text:style-name="P7"><text:span text:style-name="T1">Безопасность:</text:span> соответствие требованиям ФЗ-115 «О противодействии <text:soft-page-break/>легализации доходов», стандартам PCI DSS, политике информационной безопасности банка, защита персональных данных (ФЗ-152).</text:p>
      <text:p text:style-name="P7"><text:span text:style-name="T1">Масштабируемость:</text:span> способность обрабатывать до 50 заявок в день в одном отделении без увеличения штата.</text:p>
      <text:p text:style-name="P7"><text:span text:style-name="T1">Соответствие регламентам:</text:span> инструкция ЦБ РФ №153-И, положение ЦБ РФ №499-П (идентификация клиентов).</text:p>
      <text:p text:style-name="P2">Этап 3. Определение владельца процесса и зависимостей:</text:p>
      <text:p text:style-name="P7"><text:span text:style-name="T1">Process Owner:</text:span> Директор департамента операционного обслуживания. Его ответственность включает обеспечение соблюдения SLA, контроль качества обслуживания клиентов, инициирование улучшений процесса, управление рисками.</text:p>
      <text:p text:style-name="P7"><text:span text:style-name="T1">Зависимости с другими процессами:</text:span> процесс «Идентификация клиента» (входной подпроцесс), процесс «Комплаенс-проверка» (параллельный), процесс «Подключение ДБО» (последующий), процесс «Налоговое уведомление» (последующий), процесс «Мониторинг операций по счёту» (запускается после открытия).</text:p>
      <text:p text:style-name="P2">Этап 4. Пользовательские характеристики:</text:p>
      <text:p text:style-name="P7"><text:span text:style-name="T1">Регуляторные требования:</text:span> обязательная идентификация по ФЗ-115, уведомление ФНС в течение 5 рабочих дней.</text:p>
      <text:p text:style-name="P7"><text:span text:style-name="T1">Категория риска клиента:</text:span> определяется по результатам KYC-проверки (низкий, средний, высокий, неприемлемый).</text:p>
      <text:p text:style-name="P7"><text:span text:style-name="T1">Частота выполнения:</text:span> в среднем 15-20 операций в день на одно отделение.</text:p>
      <text:p text:style-name="P7"><text:span text:style-name="T1">Стоимость процесса:</text:span> средняя себестоимость одной операции — 1 200 руб. (включая трудозатраты, ИТ-ресурсы, комплаенс-проверки).</text:p>
      <text:p text:style-name="P2">Этап 5. Визуализация:</text:p>
      <text:p text:style-name="P6">Построена диаграмма процесса в Draw.io с аннотациями свойств, отражающая последовательность операций, ответственных исполнителей, входные и выходные документы, а также точки контроля.</text:p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4. Диаграммы</text:p>
      <text:p text:style-name="P8"><draw:frame draw:style-name="fr1" draw:name="Изображение1" text:anchor-type="char" svg:width="17cm" svg:height="12.82cm" draw:z-index="0"><draw:image xlink:href="Pictures/10000001000004ED000003B70BE02B42.png" xlink:type="simple" xlink:show="embed" xlink:actuate="onLoad" draw:mime-type="image/png"/></draw:frame>Рисунок 1. Диаграмма процесса «Открытие расчётного счёта юридическому лицу» с аннотациями свойств</text:p>
      <text:p text:style-name="P6"/>
      <text:p text:style-name="P3">5. Ответы на контрольные вопросы</text:p>
      <text:p text:style-name="P2">1. Какие функциональные свойства критичны для процесса открытия счета?</text:p>
      <text:p text:style-name="P6">Для процесса открытия расчётного счёта критичными функциональными свойствами являются: полнота входных данных (комплектность пакета документов определяет возможность начала обработки), корректность идентификации клиента (ошибки на этом этапе влекут регуляторные санкции), и однозначность выходных данных (открытый счёт должен быть корректно зарегистрирован в АБС с правильными реквизитами). В нашем процессе проверка комплектности документов выполняется на первом этапе фронт-офисом, что позволяет отсечь неполные заявки до передачи в бэк-офис. Кроме того, критична последовательность операций: нельзя открыть счёт до <text:soft-page-break/>завершения комплаенс-проверки, что обеспечивает соблюдение законодательства.</text:p>
      <text:p text:style-name="P9"/>
      <text:p text:style-name="P2">2. Почему безопасность является приоритетной для банковских процессов?</text:p>
      <text:p text:style-name="P6">Банковские процессы оперируют конфиденциальной информацией клиентов и денежными средствами, что делает их привлекательной целью для мошенников и киберпреступников. Нарушение безопасности может привести к финансовым потерям клиентов и банка, утрате деловой репутации, а также к серьёзным штрафным санкциям со стороны регулятора (ЦБ РФ вплоть до отзыва лицензии). В процессе открытия счёта безопасность обеспечивается многоуровневой проверкой: идентификация по документам, проверка по спискам ФОМ/ФТ, оценка риска клиента. Стандарт PCI DSS регламентирует защиту данных при их хранении и передаче, а ФЗ-152 требует надлежащей обработки персональных данных. Любой сбой в системе безопасности на этапе открытия счёта может создать канал для отмывания денежных средств.</text:p>
      <text:p text:style-name="P6"/>
      <text:p text:style-name="P2">3. Что означает SLA и как оно используется в банке?</text:p>
      <text:p text:style-name="P6">SLA (Service Level Agreement) — это соглашение об уровне обслуживания, которое фиксирует целевые показатели качества и сроков выполнения процесса. В банковской практике SLA определяет максимально допустимое время выполнения операций: для открытия расчётного счёта — не более 1 рабочего дня с момента предоставления полного пакета документов. SLA служит основой для мониторинга эффективности процесса: Process Owner отслеживает процент операций, выполненных в рамках установленного SLA, и при систематических нарушениях инициирует корректирующие мероприятия. В нашем процессе SLA также распространяется на внутренние этапы: комплаенс-проверка — не более 2 часов, регистрация в АБС — не более 30 минут. Нарушение SLA фиксируется в системе управления инцидентами и является предметом анализа на регулярных совещаниях.</text:p>
      <text:p text:style-name="P6"/>
      <text:p text:style-name="P2">4. Как определяется уровень надежности для банковского процесса?</text:p>
      <text:p text:style-name="P6">Надёжность банковского процесса определяется как доля успешно завершённых экземпляров процесса от общего числа запущенных за определённый период. Для процесса открытия счёта целевой показатель надёжности составляет 99.5%, что означает не более 5 сбоев на 1000 операций. Сбоями считаются: ошибки в данных счёта, некорректная регистрация в АБС, <text:soft-page-break/>пропущенное уведомление ФНС, отказы ИТ-систем. Для измерения надёжности используются автоматизированные средства мониторинга, фиксирующие каждый инцидент и время его устранения. В нашем анализе были определены критические точки отказа: интеграция с системой ФОМ/ФТ (внешняя зависимость) и модуль АБС (внутренняя зависимость).</text:p>
      <text:p text:style-name="P6"/>
      <text:p text:style-name="P2">5. Какие нормативные акты регулируют деятельность российских банков?</text:p>
      <text:p text:style-name="P6">Деятельность российских банков регулируется многоуровневой системой нормативных актов. На верхнем уровне — Федеральные законы: ФЗ-395-1 «О банках и банковской деятельности», ФЗ-86 «О Центральном банке», ФЗ-115 «О противодействии легализации доходов», ФЗ-152 «О персональных данных». На уровне регулятора — инструкции и положения ЦБ РФ: инструкция №153-И (порядок открытия и закрытия счетов), положение №499-П (идентификация клиентов). В нашем процессе открытия счёта ключевыми регуляторными требованиями являются: обязательная идентификация клиента и бенефициарных владельцев (ФЗ-115), уведомление налогового органа об открытии счёта (НК РФ), хранение документов не менее 5 лет. Несоблюдение этих требований влечёт санкции вплоть до отзыва банковской лицензии.</text:p>
      <text:p text:style-name="P6"/>
      <text:p text:style-name="P2">6. Что такое Process Owner и какие ответственности он несет?</text:p>
      <text:p text:style-name="P6">Process Owner (владелец процесса) — это должностное лицо, несущее персональную ответственность за результативность и эффективность бизнес-процесса от начала до конца. В нашем анализе владельцем процесса «Открытие расчётного счёта» определён Директор департамента операционного обслуживания. Его ответственности включают: обеспечение соблюдения SLA (не более 1 рабочего дня), контроль качества обслуживания клиентов (процент жалоб, NPS), управление рисками процесса, инициирование и внедрение улучшений. Process Owner координирует взаимодействие между подразделениями (фронт-офис, комплаенс, бэк-офис, ИТ) и разрешает конфликты приоритетов. Он также отвечает за актуальность регламентов процесса и их соответствие изменяющимся требованиям регулятора.</text:p>
      <text:p text:style-name="P6"/>
      <text:p text:style-name="P2">7. Как выявить зависимости между банковскими процессами?</text:p>
      <text:p text:style-name="P6">Зависимости между процессами выявляются через анализ входов и выходов каждого процесса: если выход одного процесса является входом другого, между ними существует зависимость. В нашем анализе процесс «Открытие <text:soft-page-break/>счёта» зависит от процесса «Идентификация клиента» (без завершения идентификации невозможно принять решение об открытии) и от процесса «Комплаенс-проверка» (без положительного заключения счёт не открывается). Одновременно процесс «Открытие счёта» инициирует процессы «Подключение ДБО» и «Налоговое уведомление». Для визуализации зависимостей используются карты процессов (process maps) и матрицы взаимосвязей. Выявление зависимостей критически важно для оценки каскадного влияния сбоев и для планирования изменений в процессах.</text:p>
      <text:p text:style-name="P6"/>
      <text:p text:style-name="P2">8. Почему требуется периодический пересмотр процессов?</text:p>
      <text:p text:style-name="P6">Периодический пересмотр процессов необходим по нескольким причинам: изменение внешних условий (новые регуляторные требования ЦБ РФ, изменения в законодательстве), развитие технологий (появление электронной подписи, биометрической идентификации, API-интеграций), изменение клиентских ожиданий (требование онлайн-открытия счёта без визита в офис). В банковской сфере ЦБ РФ регулярно обновляет нормативные акты, и процессы должны быть адаптированы в установленные сроки. В нашем примере недавнее разрешение ЦБ на удалённую идентификацию через Единую биометрическую систему потребовало существенной переработки процесса открытия счёта. Рекомендуемая периодичность пересмотра — не реже одного раза в год, а также при каждом значимом изменении регуляторных требований.</text:p>
      <text:p text:style-name="P6"/>
      <text:p text:style-name="P2">9. Какие пользовательские характеристики специфичны для вашего процесса?</text:p>
      <text:p text:style-name="P6">Для процесса «Открытие расчётного счёта юридическому лицу» были определены следующие пользовательские характеристики: категория риска клиента (присваивается по результатам KYC-проверки и определяет глубину последующего мониторинга операций — низкий, средний, высокий, неприемлемый); тип юридического лица (ООО, АО, ИП, некоммерческая организация — влияет на состав требуемых документов); канал обслуживания (офис, онлайн, через агента — определяет набор этапов процесса). Также специфичной характеристикой является наличие связанных счетов (если клиент уже обслуживается в банке, часть проверок может быть упрощена). Эти характеристики не являются стандартными для всех процессов, но критически важны для данного конкретного процесса и влияют на маршрутизацию и длительность выполнения.</text:p>
      <text:p text:style-name="P6"/>
      <text:p text:style-name="P2"><text:soft-page-break/>10. Как масштабируемость процесса влияет на конкурентоспособность банка?</text:p>
      <text:p text:style-name="P6">Масштабируемость процесса определяет способность банка обслуживать растущий поток клиентов без пропорционального увеличения затрат и без деградации качества обслуживания. Банк с масштабируемым процессом открытия счетов может наращивать клиентскую базу, сохраняя SLA на уровне 1 рабочего дня, тогда как конкурент с немасштабируемым процессом будет вынужден увеличивать штат или допускать задержки. В нашем анализе целевой показатель масштабируемости — 50 заявок в день на одно отделение. Ключевые факторы масштабируемости: автоматизация рутинных операций (автозаполнение данных из ЕГРЮЛ, автоматическая проверка по спискам ФОМ/ФТ), электронный документооборот, параллельная обработка этапов процесса. Банки, внедрившие полностью цифровое открытие счёта, получают значительное конкурентное преимущество за счёт сокращения времени обслуживания до 15 минут.</text:p>
      <text:p text:style-name="P6"/>
      <text:p text:style-name="P1">6. Вывод</text:p>
      <text:p text:style-name="P6">В ходе лабораторной работы был проведён комплексный анализ свойств банковского процесса «Открытие расчётного счёта юридическому лицу». Определены функциональные свойства (цель, входы, выходы, последовательность операций, ответственные подразделения) и нефункциональные свойства (SLA — 1 рабочий день, надёжность 99.5%, требования безопасности ФЗ-115 и PCI DSS, масштабируемость до 50 заявок в день). Выявлены зависимости с пятью смежными процессами, определён владелец процесса и сформированы пользовательские характеристики.</text:p>
      <text:p text:style-name="P6">Проведённый анализ показал, что банковские процессы отличаются высокой степенью регулирования, что делает особенно важным системный подход к документированию всех свойств. Полученные навыки могут быть применены при проектировании и оптимизации любых регулируемых бизнес-процессов, где необходимо учитывать требования законодательства, стандарты безопасности и показатели качества обслужив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48:58.512000000</dc:date>
    <meta:editing-duration>PT1M26S</meta:editing-duration>
    <meta:editing-cycles>3</meta:editing-cycles>
    <meta:document-statistic meta:table-count="0" meta:image-count="1" meta:object-count="0" meta:page-count="8" meta:paragraph-count="61" meta:word-count="1696" meta:character-count="14395" meta:non-whitespace-character-count="12742"/>
  </office:meta>
</office:document-meta>
</file>