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5140000033FC7EF23EE.png" manifest:media-type="image/png"/>
  <manifest:file-entry manifest:full-path="Pictures/10000001000004BA0000033F067BBC00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" style:family="table">
      <style:table-properties style:width="17cm" table:align="margins"/>
    </style:style>
    <style:style style:name="Table.A" style:family="table-column">
      <style:table-column-properties style:column-width="5.667cm" style:rel-column-width="21845*"/>
    </style:style>
    <style:style style:name="Table.A1" style:family="table-cell">
      <style:table-cell-properties fo:padding="0.101cm" fo:border="none"/>
    </style:style>
    <style:style style:name="Table_5f_1" style:display-name="Table_1" style:family="table">
      <style:table-properties style:width="17cm" table:align="margins"/>
    </style:style>
    <style:style style:name="Table_5f_1.A" style:display-name="Table_1.A" style:family="table-column">
      <style:table-column-properties style:column-width="4.249cm" style:rel-column-width="16383*"/>
    </style:style>
    <style:style style:name="Table_5f_1.D" style:display-name="Table_1.D" style:family="table-column">
      <style:table-column-properties style:column-width="4.251cm" style:rel-column-width="16386*"/>
    </style:style>
    <style:style style:name="Table_5f_1.A1" style:display-name="Table_1.A1" style:family="table-cell">
      <style:table-cell-properties fo:padding="0.101cm" fo:border="none"/>
    </style:style>
    <style:style style:name="Table_5f_2" style:display-name="Table_2" style:family="table">
      <style:table-properties style:width="17cm" table:align="margins"/>
    </style:style>
    <style:style style:name="Table_5f_2.A" style:display-name="Table_2.A" style:family="table-column">
      <style:table-column-properties style:column-width="3.399cm" style:rel-column-width="13106*"/>
    </style:style>
    <style:style style:name="Table_5f_2.E" style:display-name="Table_2.E" style:family="table-column">
      <style:table-column-properties style:column-width="3.401cm" style:rel-column-width="13111*"/>
    </style:style>
    <style:style style:name="Table_5f_2.A1" style:display-name="Table_2.A1" style:family="table-cell">
      <style:table-cell-properties fo:padding="0.101cm" fo:border="none"/>
    </style:style>
    <style:style style:name="Table_5f_3" style:display-name="Table_3" style:family="table">
      <style:table-properties style:width="17cm" table:align="margins"/>
    </style:style>
    <style:style style:name="Table_5f_3.A" style:display-name="Table_3.A" style:family="table-column">
      <style:table-column-properties style:column-width="5.667cm" style:rel-column-width="21845*"/>
    </style:style>
    <style:style style:name="Table_5f_3.A1" style:display-name="Table_3.A1" style:family="table-cell">
      <style:table-cell-properties fo:padding="0.101cm" fo:border="none"/>
    </style:style>
    <style:style style:name="Table_5f_4" style:display-name="Table_4" style:family="table">
      <style:table-properties style:width="17cm" table:align="margins"/>
    </style:style>
    <style:style style:name="Table_5f_4.A" style:display-name="Table_4.A" style:family="table-column">
      <style:table-column-properties style:column-width="4.249cm" style:rel-column-width="16383*"/>
    </style:style>
    <style:style style:name="Table_5f_4.D" style:display-name="Table_4.D" style:family="table-column">
      <style:table-column-properties style:column-width="4.251cm" style:rel-column-width="16386*"/>
    </style:style>
    <style:style style:name="Table_5f_4.A1" style:display-name="Table_4.A1" style:family="table-cell">
      <style:table-cell-properties fo:padding="0.101cm" fo:border="none"/>
    </style:style>
    <style:style style:name="Table_5f_5" style:display-name="Table_5" style:family="table">
      <style:table-properties style:width="17cm" table:align="margins"/>
    </style:style>
    <style:style style:name="Table_5f_5.A" style:display-name="Table_5.A" style:family="table-column">
      <style:table-column-properties style:column-width="4.249cm" style:rel-column-width="16383*"/>
    </style:style>
    <style:style style:name="Table_5f_5.D" style:display-name="Table_5.D" style:family="table-column">
      <style:table-column-properties style:column-width="4.251cm" style:rel-column-width="16386*"/>
    </style:style>
    <style:style style:name="Table_5f_5.A1" style:display-name="Table_5.A1" style:family="table-cell">
      <style:table-cell-properties fo:padding="0.101cm" fo:border="none"/>
    </style:style>
    <style:style style:name="P1" style:family="paragraph" style:parent-style-name="Standard">
      <style:paragraph-properties fo:margin-top="0.499cm" fo:margin-bottom="0.3cm" style:contextual-spacing="false" fo:line-height="115%" fo:text-align="justify" style:justify-single-word="false"/>
      <style:text-properties style:font-name="Times New Roman" fo:font-size="14pt" fo:font-weight="bold"/>
    </style:style>
    <style:style style:name="P2" style:family="paragraph" style:parent-style-name="Standard">
      <style:paragraph-properties fo:margin-top="0cm" fo:margin-bottom="0.199cm" style:contextual-spacing="false" fo:line-height="115%" fo:text-align="justify" style:justify-single-word="false"/>
      <style:text-properties style:font-name="Times New Roman" fo:font-size="14pt" fo:font-weight="bold"/>
    </style:style>
    <style:style style:name="P3" style:family="paragraph" style:parent-style-name="Standard">
      <style:paragraph-properties fo:margin-top="0.6cm" fo:margin-bottom="0.4cm" style:contextual-spacing="false" fo:line-height="115%" fo:text-align="justify" style:justify-single-word="false"/>
      <style:text-properties style:font-name="Times New Roman" fo:font-size="14pt" fo:font-weight="bold"/>
    </style:style>
    <style:style style:name="P4" style:family="paragraph" style:parent-style-name="Standard" style:list-style-name="">
      <style:paragraph-properties fo:margin-top="0cm" fo:margin-bottom="0cm" style:contextual-spacing="false" fo:line-height="115%" fo:text-align="center" style:justify-single-word="false"/>
      <style:text-properties style:font-name="Times New Roman" fo:font-size="14pt" fo:font-weight="bold"/>
    </style:style>
    <style:style style:name="P5" style:family="paragraph" style:parent-style-name="Standard">
      <style:paragraph-properties fo:margin-top="0cm" fo:margin-bottom="0cm" style:contextual-spacing="false" fo:line-height="115%" fo:text-align="center" style:justify-single-word="false"/>
      <style:text-properties style:font-name="Times New Roman" fo:font-size="14pt" fo:font-weight="bold"/>
    </style:style>
    <style:style style:name="P6" style:family="paragraph" style:parent-style-name="Standard">
      <style:paragraph-properties fo:margin-top="0cm" fo:margin-bottom="0.199cm" style:contextual-spacing="false" fo:line-height="115%" fo:text-align="justify" style:justify-single-word="false"/>
      <style:text-properties style:font-name="Times New Roman" fo:font-size="14pt"/>
    </style:style>
    <style:style style:name="P7" style:family="paragraph" style:parent-style-name="Standard">
      <style:paragraph-properties fo:margin-left="0.801cm" fo:margin-top="0cm" fo:margin-bottom="0.101cm" style:contextual-spacing="false" fo:line-height="115%" fo:text-align="justify" style:justify-single-word="false"/>
      <style:text-properties style:font-name="Times New Roman" fo:font-size="14pt"/>
    </style:style>
    <style:style style:name="P8" style:family="paragraph" style:parent-style-name="Standard">
      <style:paragraph-properties fo:margin-top="0cm" fo:margin-bottom="0.199cm" style:contextual-spacing="false" fo:line-height="115%" fo:text-align="start" style:justify-single-word="false"/>
      <style:text-properties style:font-name="Times New Roman" fo:font-size="14pt" fo:font-style="italic"/>
    </style:style>
    <style:style style:name="P9" style:family="paragraph" style:parent-style-name="Standard">
      <style:paragraph-properties fo:margin-top="0.3cm" fo:margin-bottom="0.3cm" style:contextual-spacing="false" fo:line-height="115%" fo:text-align="justify" style:justify-single-word="false"/>
      <style:text-properties fo:color="#666666" loext:opacity="100%" style:font-name="Times New Roman" fo:font-size="14pt" fo:font-style="italic"/>
    </style:style>
    <style:style style:name="T1" style:family="text">
      <style:text-properties fo:font-weight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ОТЧЁТ</text:h>
      <text:p text:style-name="P5">по лабораторной работе №2</text:p>
      <text:p text:style-name="P5">по дисциплине «Моделирование бизнес-процессов»</text:p>
      <text:p text:style-name="P5"/>
      <text:p text:style-name="P6"><text:span text:style-name="T1">Тема:</text:span> Принципы построения моделей процессов в Draw.io (декомпозиция A0 и A2)</text:p>
      <text:p text:style-name="P6">Выполнил: студент группы БИНOZS-331 Трофимов А.Н.</text:p>
      <text:p text:style-name="P6"/>
      <text:p text:style-name="P1">1. Цель работы</text:p>
      <text:p text:style-name="P6">Изучение принципов построения модели в методологии IDEF0, типов стрелок. Создание диаграммы декомпозиции A0. Создание диаграммы декомпозиции А2, нумерация работ и диаграмм.</text:p>
      <text:p text:style-name="P6"/>
      <text:p text:style-name="P1">2. Краткие теоретические сведения</text:p>
      <text:p text:style-name="P6">Декомпозиция в методологии IDEF0 -- это процесс разбиения функционального блока верхнего уровня на составляющие подфункции, каждая из которых описывается на отдельной диаграмме. Рекомендуемое количество блоков на одной диаграмме декомпозиции составляет от 3 до 6 (правило 3--6 блоков). Нумерация работ следует иерархической схеме: контекстная диаграмма обозначается A-0, её декомпозиция -- A0, работы на A0 нумеруются A1, A2, A3, а их дальнейшая декомпозиция -- A11, A12, ..., A21, A22 и т.д.</text:p>
      <text:p text:style-name="P6">Стрелки на диаграмме декомпозиции делятся на несколько типов. Граничные стрелки приходят с границы диаграммы (от рамки) к работам и соответствуют стрелкам родительского блока на вышестоящей диаграмме, обеспечивая согласованность между уровнями модели. Внутренние стрелки связывают работы между собой в пределах одной диаграммы и не имеют прямого соответствия на родительском уровне. Стрелки обратной связи идут от выхода одной работы ко входу или управлению работы, расположенной выше по иерархии (левее), образуя петлю управления.</text:p>
      <text:p text:style-name="P6">Туннелированные стрелки -- это стрелки, которые присутствуют на дочерней диаграмме, но не отображаются на родительской (или наоборот). Они обозначаются круглыми скобками на конце, соприкасающемся с границей диаграммы. Туннелирование применяется, когда стрелка является значимой деталью для конкретного уровня декомпозиции, но не существенна для общей <text:soft-page-break/>картины на вышестоящем уровне. Это позволяет не перегружать родительскую диаграмму второстепенными деталями.</text:p>
      <text:p text:style-name="P6"/>
      <text:p text:style-name="P1">3. Ход работы</text:p>
      <text:p text:style-name="P1">3.1. Открытие проекта и создание диаграммы A0</text:p>
      <text:p text:style-name="P6">Открыли ранее созданный файл Quill_AS-IS.drawio, содержащий контекстную диаграмму A-0 «Деятельность компании Quill». Создали новую страницу «A0» для диаграммы декомпозиции контекстного блока.</text:p>
      <text:p text:style-name="P1">3.2. Определение работ на диаграмме A0</text:p>
      <text:p text:style-name="P6">Контекстный блок «Деятельность компании Quill» декомпозирован на 3 работы:</text:p>
      <table:table table:name="Table" table:style-name="Table">
        <table:table-column table:style-name="Table.A" table:number-columns-repeated="3"/>
        <table:table-row>
          <table:table-cell table:style-name="Table.A1" office:value-type="string">
            <text:p text:style-name="P2">Номер работы</text:p>
          </table:table-cell>
          <table:table-cell table:style-name="Table.A1" office:value-type="string">
            <text:p text:style-name="P2">Название</text:p>
          </table:table-cell>
          <table:table-cell table:style-name="Table.A1" office:value-type="string">
            <text:p text:style-name="P2">Описание</text:p>
          </table:table-cell>
        </table:table-row>
        <table:table-row>
          <table:table-cell table:style-name="Table.A1" office:value-type="string">
            <text:p text:style-name="P6">A1</text:p>
          </table:table-cell>
          <table:table-cell table:style-name="Table.A1" office:value-type="string">
            <text:p text:style-name="P6">Продажи и маркетинг</text:p>
          </table:table-cell>
          <table:table-cell table:style-name="Table.A1" office:value-type="string">
            <text:p text:style-name="P6">Приём заказов от клиентов, маркетинговая деятельность, формирование заказов на сборку</text:p>
          </table:table-cell>
        </table:table-row>
        <table:table-row>
          <table:table-cell table:style-name="Table.A1" office:value-type="string">
            <text:p text:style-name="P6">A2</text:p>
          </table:table-cell>
          <table:table-cell table:style-name="Table.A1" office:value-type="string">
            <text:p text:style-name="P6">Сборка и тестирование компьютеров</text:p>
          </table:table-cell>
          <table:table-cell table:style-name="Table.A1" office:value-type="string">
            <text:p text:style-name="P6">Подготовка компонентов, сборка настольных ПК и ноутбуков, тестирование</text:p>
          </table:table-cell>
        </table:table-row>
        <table:table-row>
          <table:table-cell table:style-name="Table.A1" office:value-type="string">
            <text:p text:style-name="P6">A3</text:p>
          </table:table-cell>
          <table:table-cell table:style-name="Table.A1" office:value-type="string">
            <text:p text:style-name="P6">Отгрузка и получение</text:p>
          </table:table-cell>
          <table:table-cell table:style-name="Table.A1" office:value-type="string">
            <text:p text:style-name="P6">Упаковка, оформление документов, доставка готовой продукции клиенту, приём компонентов от поставщиков</text:p>
          </table:table-cell>
        </table:table-row>
      </table:table>
      <text:p text:style-name="P6"/>
      <text:p text:style-name="P1">3.3. Настройка граничных стрелок диаграммы A0</text:p>
      <text:p text:style-name="P6">Граничные стрелки диаграммы A0 соответствуют стрелкам контекстной диаграммы A-0:</text:p>
      <table:table table:name="Table_1" table:style-name="Table_5f_1">
        <table:table-column table:style-name="Table_5f_1.A" table:number-columns-repeated="3"/>
        <table:table-column table:style-name="Table_5f_1.D"/>
        <text:soft-page-break/>
        <table:table-row>
          <table:table-cell table:style-name="Table_5f_1.A1" office:value-type="string">
            <text:p text:style-name="P2">Тип</text:p>
          </table:table-cell>
          <table:table-cell table:style-name="Table_5f_1.A1" office:value-type="string">
            <text:p text:style-name="P2">Название стрелки</text:p>
          </table:table-cell>
          <table:table-cell table:style-name="Table_5f_1.A1" office:value-type="string">
            <text:p text:style-name="P2">Откуда / Куда</text:p>
          </table:table-cell>
          <table:table-cell table:style-name="Table_5f_1.A1" office:value-type="string">
            <text:p text:style-name="P2">Примечание</text:p>
          </table:table-cell>
        </table:table-row>
        <table:table-row>
          <table:table-cell table:style-name="Table_5f_1.A1" office:value-type="string">
            <text:p text:style-name="P6">Вход</text:p>
          </table:table-cell>
          <table:table-cell table:style-name="Table_5f_1.A1" office:value-type="string">
            <text:p text:style-name="P6">Заказы клиентов</text:p>
          </table:table-cell>
          <table:table-cell table:style-name="Table_5f_1.A1" office:value-type="string">
            <text:p text:style-name="P6">Граница --&gt; A1</text:p>
          </table:table-cell>
          <table:table-cell table:style-name="Table_5f_1.A1" office:value-type="string">
            <text:p text:style-name="P6">Запросы клиентов на приобретение компьютеров</text:p>
          </table:table-cell>
        </table:table-row>
        <table:table-row>
          <table:table-cell table:style-name="Table_5f_1.A1" office:value-type="string">
            <text:p text:style-name="P6">Вход</text:p>
          </table:table-cell>
          <table:table-cell table:style-name="Table_5f_1.A1" office:value-type="string">
            <text:p text:style-name="P6">Компоненты от поставщиков</text:p>
          </table:table-cell>
          <table:table-cell table:style-name="Table_5f_1.A1" office:value-type="string">
            <text:p text:style-name="P6">Граница --&gt; A3</text:p>
          </table:table-cell>
          <table:table-cell table:style-name="Table_5f_1.A1" office:value-type="string">
            <text:p text:style-name="P6">Комплектующие, закупаемые у 3 поставщиков</text:p>
          </table:table-cell>
        </table:table-row>
        <table:table-row>
          <table:table-cell table:style-name="Table_5f_1.A1" office:value-type="string">
            <text:p text:style-name="P6">Управление</text:p>
          </table:table-cell>
          <table:table-cell table:style-name="Table_5f_1.A1" office:value-type="string">
            <text:p text:style-name="P6">Правила и регламенты компании</text:p>
          </table:table-cell>
          <table:table-cell table:style-name="Table_5f_1.A1" office:value-type="string">
            <text:p text:style-name="P6">Граница --&gt; A1, A2, A3</text:p>
          </table:table-cell>
          <table:table-cell table:style-name="Table_5f_1.A1" office:value-type="string">
            <text:p text:style-name="P6">Внутренние бизнес-правила, разветвляется ко всем работам</text:p>
          </table:table-cell>
        </table:table-row>
        <table:table-row>
          <table:table-cell table:style-name="Table_5f_1.A1" office:value-type="string">
            <text:p text:style-name="P6">Управление</text:p>
          </table:table-cell>
          <table:table-cell table:style-name="Table_5f_1.A1" office:value-type="string">
            <text:p text:style-name="P6">Стандарты качества</text:p>
          </table:table-cell>
          <table:table-cell table:style-name="Table_5f_1.A1" office:value-type="string">
            <text:p text:style-name="P6">Граница --&gt; A2</text:p>
          </table:table-cell>
          <table:table-cell table:style-name="Table_5f_1.A1" office:value-type="string">
            <text:p text:style-name="P6">Требования к качеству сборки и тестирования</text:p>
          </table:table-cell>
        </table:table-row>
        <table:table-row>
          <table:table-cell table:style-name="Table_5f_1.A1" office:value-type="string">
            <text:p text:style-name="P6">Выход</text:p>
          </table:table-cell>
          <table:table-cell table:style-name="Table_5f_1.A1" office:value-type="string">
            <text:p text:style-name="P6">Готовые компьютеры</text:p>
          </table:table-cell>
          <table:table-cell table:style-name="Table_5f_1.A1" office:value-type="string">
            <text:p text:style-name="P6">A3 --&gt; Граница</text:p>
          </table:table-cell>
          <table:table-cell table:style-name="Table_5f_1.A1" office:value-type="string">
            <text:p text:style-name="P6">Собранные и протестированные ПК</text:p>
          </table:table-cell>
        </table:table-row>
        <table:table-row>
          <table:table-cell table:style-name="Table_5f_1.A1" office:value-type="string">
            <text:p text:style-name="P6">Выход</text:p>
          </table:table-cell>
          <table:table-cell table:style-name="Table_5f_1.A1" office:value-type="string">
            <text:p text:style-name="P6">Маркетинговые материалы</text:p>
          </table:table-cell>
          <table:table-cell table:style-name="Table_5f_1.A1" office:value-type="string">
            <text:p text:style-name="P6">A1 --&gt; Граница</text:p>
          </table:table-cell>
          <table:table-cell table:style-name="Table_5f_1.A1" office:value-type="string">
            <text:p text:style-name="P6">Новая граничная стрелка</text:p>
          </table:table-cell>
        </table:table-row>
        <table:table-row>
          <table:table-cell table:style-name="Table_5f_1.A1" office:value-type="string">
            <text:p text:style-name="P6">Механизм</text:p>
          </table:table-cell>
          <table:table-cell table:style-name="Table_5f_1.A1" office:value-type="string">
            <text:p text:style-name="P6">Персонал</text:p>
          </table:table-cell>
          <table:table-cell table:style-name="Table_5f_1.A1" office:value-type="string">
            <text:p text:style-name="P6">Граница --&gt; A1, A2, A3</text:p>
          </table:table-cell>
          <table:table-cell table:style-name="Table_5f_1.A1" office:value-type="string">
            <text:p text:style-name="P6">Продавцы, операторы сборки, кладовщик</text:p>
          </table:table-cell>
        </table:table-row>
        <table:table-row>
          <table:table-cell table:style-name="Table_5f_1.A1" office:value-type="string">
            <text:p text:style-name="P6">Механизм</text:p>
          </table:table-cell>
          <table:table-cell table:style-name="Table_5f_1.A1" office:value-type="string">
            <text:p text:style-name="P6">Оборудование</text:p>
          </table:table-cell>
          <table:table-cell table:style-name="Table_5f_1.A1" office:value-type="string">
            <text:p text:style-name="P6">Граница --&gt; A2</text:p>
          </table:table-cell>
          <table:table-cell table:style-name="Table_5f_1.A1" office:value-type="string">
            <text:p text:style-name="P6">Инструменты сборки и тестирования</text:p>
          </table:table-cell>
        </table:table-row>
      </table:table>
      <text:p text:style-name="P6"/>
      <text:p text:style-name="P1">3.4. Внутренние стрелки и стрелка обратной связи</text:p>
      <text:p text:style-name="P6">Настроены внутренние связи между работами на диаграмме A0:</text:p>
      <table:table table:name="Table_2" table:style-name="Table_5f_2">
        <table:table-column table:style-name="Table_5f_2.A" table:number-columns-repeated="4"/>
        <table:table-column table:style-name="Table_5f_2.E"/>
        <table:table-row>
          <table:table-cell table:style-name="Table_5f_2.A1" office:value-type="string">
            <text:p text:style-name="P2">Стрелка</text:p>
          </table:table-cell>
          <table:table-cell table:style-name="Table_5f_2.A1" office:value-type="string">
            <text:p text:style-name="P2">От</text:p>
          </table:table-cell>
          <table:table-cell table:style-name="Table_5f_2.A1" office:value-type="string">
            <text:p text:style-name="P2">К</text:p>
          </table:table-cell>
          <table:table-cell table:style-name="Table_5f_2.A1" office:value-type="string">
            <text:p text:style-name="P2">Тип связи</text:p>
          </table:table-cell>
          <table:table-cell table:style-name="Table_5f_2.A1" office:value-type="string">
            <text:p text:style-name="P2">Описание</text:p>
          </table:table-cell>
        </table:table-row>
        <table:table-row>
          <table:table-cell table:style-name="Table_5f_2.A1" office:value-type="string">
            <text:p text:style-name="P6">Оформленные <text:soft-page-break/>заказы</text:p>
          </table:table-cell>
          <table:table-cell table:style-name="Table_5f_2.A1" office:value-type="string">
            <text:p text:style-name="P6">A1 (выход)</text:p>
          </table:table-cell>
          <table:table-cell table:style-name="Table_5f_2.A1" office:value-type="string">
            <text:p text:style-name="P6">A2 (вход)</text:p>
          </table:table-cell>
          <table:table-cell table:style-name="Table_5f_2.A1" office:value-type="string">
            <text:p text:style-name="P6">Внутренняя<text:soft-page-break/></text:p>
          </table:table-cell>
          <table:table-cell table:style-name="Table_5f_2.A1" office:value-type="string">
            <text:p text:style-name="P6">Заказы с <text:soft-page-break/>указанием спецификации передаются в сборку</text:p>
          </table:table-cell>
        </table:table-row>
        <table:table-row>
          <table:table-cell table:style-name="Table_5f_2.A1" office:value-type="string">
            <text:p text:style-name="P6">Компоненты</text:p>
          </table:table-cell>
          <table:table-cell table:style-name="Table_5f_2.A1" office:value-type="string">
            <text:p text:style-name="P6">A3 (выход)</text:p>
          </table:table-cell>
          <table:table-cell table:style-name="Table_5f_2.A1" office:value-type="string">
            <text:p text:style-name="P6">A2 (вход)</text:p>
          </table:table-cell>
          <table:table-cell table:style-name="Table_5f_2.A1" office:value-type="string">
            <text:p text:style-name="P6">Внутренняя</text:p>
          </table:table-cell>
          <table:table-cell table:style-name="Table_5f_2.A1" office:value-type="string">
            <text:p text:style-name="P6">Принятые и проверенные компоненты передаются на сборку</text:p>
          </table:table-cell>
        </table:table-row>
        <table:table-row>
          <table:table-cell table:style-name="Table_5f_2.A1" office:value-type="string">
            <text:p text:style-name="P6">Собранные компьютеры</text:p>
          </table:table-cell>
          <table:table-cell table:style-name="Table_5f_2.A1" office:value-type="string">
            <text:p text:style-name="P6">A2 (выход)</text:p>
          </table:table-cell>
          <table:table-cell table:style-name="Table_5f_2.A1" office:value-type="string">
            <text:p text:style-name="P6">A3 (вход)</text:p>
          </table:table-cell>
          <table:table-cell table:style-name="Table_5f_2.A1" office:value-type="string">
            <text:p text:style-name="P6">Внутренняя</text:p>
          </table:table-cell>
          <table:table-cell table:style-name="Table_5f_2.A1" office:value-type="string">
            <text:p text:style-name="P6">Готовые ПК передаются на отгрузку</text:p>
          </table:table-cell>
        </table:table-row>
        <table:table-row>
          <table:table-cell table:style-name="Table_5f_2.A1" office:value-type="string">
            <text:p text:style-name="P6">Результаты сборки</text:p>
          </table:table-cell>
          <table:table-cell table:style-name="Table_5f_2.A1" office:value-type="string">
            <text:p text:style-name="P6">A2 (выход)</text:p>
          </table:table-cell>
          <table:table-cell table:style-name="Table_5f_2.A1" office:value-type="string">
            <text:p text:style-name="P6">A1 (управление)</text:p>
          </table:table-cell>
          <table:table-cell table:style-name="Table_5f_2.A1" office:value-type="string">
            <text:p text:style-name="P6">Обратная связь</text:p>
          </table:table-cell>
          <table:table-cell table:style-name="Table_5f_2.A1" office:value-type="string">
            <text:p text:style-name="P6">Информация о статусе сборки для корректировки планов продаж</text:p>
          </table:table-cell>
        </table:table-row>
      </table:table>
      <text:p text:style-name="P6"/>
      <text:p text:style-name="P6">Стрелка «Результаты сборки» является стрелкой обратной связи по управлению: выход работы A2 подаётся на управление работы A1. Визуально она проходит справа налево, огибая промежуточные блоки. Это позволяет отделу продаж учитывать текущую загрузку сборочного цеха и наличие готовой продукции при работе с клиентами.</text:p>
      <text:p text:style-name="P1">3.5. Добавление новой граничной стрелки</text:p>
      <text:p text:style-name="P6">Добавлена новая граничная стрелка «Маркетинговые материалы» -- выход из работы A1 на границу диаграммы. Эта стрелка отражает рекламные буклеты, каталоги и прайс-листы, которые создаёт отдел продаж и маркетинга. На контекстной диаграмме A-0 эта стрелка также добавлена как выход блока «Деятельность компании Quill».</text:p>
      <text:p text:style-name="P1"/>
      <text:p text:style-name="P1"/>
      <text:p text:style-name="P1"><text:soft-page-break/>3.6. Создание диаграммы декомпозиции A2</text:p>
      <text:p text:style-name="P6">Создали новую страницу «A2» для декомпозиции работы A2 «Сборка и тестирование компьютеров». Работа A2 декомпозирована на 4 подфункции:</text:p>
      <table:table table:name="Table_3" table:style-name="Table_5f_3">
        <table:table-column table:style-name="Table_5f_3.A" table:number-columns-repeated="3"/>
        <table:table-row>
          <table:table-cell table:style-name="Table_5f_3.A1" office:value-type="string">
            <text:p text:style-name="P2">Номер работы</text:p>
          </table:table-cell>
          <table:table-cell table:style-name="Table_5f_3.A1" office:value-type="string">
            <text:p text:style-name="P2">Название</text:p>
          </table:table-cell>
          <table:table-cell table:style-name="Table_5f_3.A1" office:value-type="string">
            <text:p text:style-name="P2">Описание</text:p>
          </table:table-cell>
        </table:table-row>
        <table:table-row>
          <table:table-cell table:style-name="Table_5f_3.A1" office:value-type="string">
            <text:p text:style-name="P6">A21</text:p>
          </table:table-cell>
          <table:table-cell table:style-name="Table_5f_3.A1" office:value-type="string">
            <text:p text:style-name="P6">Отслеживание расписания</text:p>
          </table:table-cell>
          <table:table-cell table:style-name="Table_5f_3.A1" office:value-type="string">
            <text:p text:style-name="P6">Контроль сроков выполнения заказов и координация работ сборки</text:p>
          </table:table-cell>
        </table:table-row>
        <table:table-row>
          <table:table-cell table:style-name="Table_5f_3.A1" office:value-type="string">
            <text:p text:style-name="P6">A22</text:p>
          </table:table-cell>
          <table:table-cell table:style-name="Table_5f_3.A1" office:value-type="string">
            <text:p text:style-name="P6">Сборка настольных компьютеров</text:p>
          </table:table-cell>
          <table:table-cell table:style-name="Table_5f_3.A1" office:value-type="string">
            <text:p text:style-name="P6">Сборка стационарных компьютеров по спецификации заказа</text:p>
          </table:table-cell>
        </table:table-row>
        <table:table-row>
          <table:table-cell table:style-name="Table_5f_3.A1" office:value-type="string">
            <text:p text:style-name="P6">A23</text:p>
          </table:table-cell>
          <table:table-cell table:style-name="Table_5f_3.A1" office:value-type="string">
            <text:p text:style-name="P6">Сборка ноутбуков</text:p>
          </table:table-cell>
          <table:table-cell table:style-name="Table_5f_3.A1" office:value-type="string">
            <text:p text:style-name="P6">Сборка портативных компьютеров по спецификации заказа</text:p>
          </table:table-cell>
        </table:table-row>
        <table:table-row>
          <table:table-cell table:style-name="Table_5f_3.A1" office:value-type="string">
            <text:p text:style-name="P6">A24</text:p>
          </table:table-cell>
          <table:table-cell table:style-name="Table_5f_3.A1" office:value-type="string">
            <text:p text:style-name="P6">Тестирование компьютеров</text:p>
          </table:table-cell>
          <table:table-cell table:style-name="Table_5f_3.A1" office:value-type="string">
            <text:p text:style-name="P6">Проверка работоспособности и качества собранных ПК</text:p>
          </table:table-cell>
        </table:table-row>
      </table:table>
      <text:p text:style-name="P6"/>
      <text:p text:style-name="P1">3.7. Граничные стрелки диаграммы A2</text:p>
      <text:p text:style-name="P6">Граничные стрелки диаграммы A2 соответствуют стрелкам блока A2 на диаграмме A0:</text:p>
      <table:table table:name="Table_4" table:style-name="Table_5f_4">
        <table:table-column table:style-name="Table_5f_4.A" table:number-columns-repeated="3"/>
        <table:table-column table:style-name="Table_5f_4.D"/>
        <table:table-row>
          <table:table-cell table:style-name="Table_5f_4.A1" office:value-type="string">
            <text:p text:style-name="P2">Тип</text:p>
          </table:table-cell>
          <table:table-cell table:style-name="Table_5f_4.A1" office:value-type="string">
            <text:p text:style-name="P2">Название стрелки</text:p>
          </table:table-cell>
          <table:table-cell table:style-name="Table_5f_4.A1" office:value-type="string">
            <text:p text:style-name="P2">Откуда / Куда</text:p>
          </table:table-cell>
          <table:table-cell table:style-name="Table_5f_4.A1" office:value-type="string">
            <text:p text:style-name="P2">Примечание</text:p>
          </table:table-cell>
        </table:table-row>
        <table:table-row>
          <table:table-cell table:style-name="Table_5f_4.A1" office:value-type="string">
            <text:p text:style-name="P6">Вход</text:p>
          </table:table-cell>
          <table:table-cell table:style-name="Table_5f_4.A1" office:value-type="string">
            <text:p text:style-name="P6">Оформленные заказы</text:p>
          </table:table-cell>
          <table:table-cell table:style-name="Table_5f_4.A1" office:value-type="string">
            <text:p text:style-name="P6">Граница --&gt; A21</text:p>
          </table:table-cell>
          <table:table-cell table:style-name="Table_5f_4.A1" office:value-type="string">
            <text:p text:style-name="P6">Спецификации заказов из отдела продаж</text:p>
          </table:table-cell>
        </table:table-row>
        <table:table-row>
          <table:table-cell table:style-name="Table_5f_4.A1" office:value-type="string">
            <text:p text:style-name="P6">Вход</text:p>
          </table:table-cell>
          <table:table-cell table:style-name="Table_5f_4.A1" office:value-type="string">
            <text:p text:style-name="P6">Компоненты</text:p>
          </table:table-cell>
          <table:table-cell table:style-name="Table_5f_4.A1" office:value-type="string">
            <text:p text:style-name="P6">Граница --&gt; A22, A23</text:p>
          </table:table-cell>
          <table:table-cell table:style-name="Table_5f_4.A1" office:value-type="string">
            <text:p text:style-name="P6">Комплектующие для сборки, туннелированная стрелка</text:p>
          </table:table-cell>
        </table:table-row>
        <table:table-row>
          <table:table-cell table:style-name="Table_5f_4.A1" office:value-type="string">
            <text:p text:style-name="P6">Управление</text:p>
          </table:table-cell>
          <table:table-cell table:style-name="Table_5f_4.A1" office:value-type="string">
            <text:p text:style-name="P6">Стандарты <text:soft-page-break/>качества</text:p>
          </table:table-cell>
          <table:table-cell table:style-name="Table_5f_4.A1" office:value-type="string">
            <text:p text:style-name="P6">Граница --&gt; A22, <text:soft-page-break/>A23, A24</text:p>
          </table:table-cell>
          <table:table-cell table:style-name="Table_5f_4.A1" office:value-type="string">
            <text:p text:style-name="P6">Требования к <text:soft-page-break/>сборке и тестированию</text:p>
          </table:table-cell>
        </table:table-row>
        <table:table-row>
          <table:table-cell table:style-name="Table_5f_4.A1" office:value-type="string">
            <text:p text:style-name="P6">Управление</text:p>
          </table:table-cell>
          <table:table-cell table:style-name="Table_5f_4.A1" office:value-type="string">
            <text:p text:style-name="P6">Правила и регламенты</text:p>
          </table:table-cell>
          <table:table-cell table:style-name="Table_5f_4.A1" office:value-type="string">
            <text:p text:style-name="P6">Граница --&gt; A21</text:p>
          </table:table-cell>
          <table:table-cell table:style-name="Table_5f_4.A1" office:value-type="string">
            <text:p text:style-name="P6">Регламенты планирования</text:p>
          </table:table-cell>
        </table:table-row>
        <table:table-row>
          <table:table-cell table:style-name="Table_5f_4.A1" office:value-type="string">
            <text:p text:style-name="P6">Выход</text:p>
          </table:table-cell>
          <table:table-cell table:style-name="Table_5f_4.A1" office:value-type="string">
            <text:p text:style-name="P6">Собранные компьютеры</text:p>
          </table:table-cell>
          <table:table-cell table:style-name="Table_5f_4.A1" office:value-type="string">
            <text:p text:style-name="P6">A24 --&gt; Граница</text:p>
          </table:table-cell>
          <table:table-cell table:style-name="Table_5f_4.A1" office:value-type="string">
            <text:p text:style-name="P6">Прошедшие тестирование ПК</text:p>
          </table:table-cell>
        </table:table-row>
        <table:table-row>
          <table:table-cell table:style-name="Table_5f_4.A1" office:value-type="string">
            <text:p text:style-name="P6">Механизм</text:p>
          </table:table-cell>
          <table:table-cell table:style-name="Table_5f_4.A1" office:value-type="string">
            <text:p text:style-name="P6">Операторы сборки</text:p>
          </table:table-cell>
          <table:table-cell table:style-name="Table_5f_4.A1" office:value-type="string">
            <text:p text:style-name="P6">Граница --&gt; A22, A23</text:p>
          </table:table-cell>
          <table:table-cell table:style-name="Table_5f_4.A1" office:value-type="string">
            <text:p text:style-name="P6">Персонал сборочного цеха</text:p>
          </table:table-cell>
        </table:table-row>
        <table:table-row>
          <table:table-cell table:style-name="Table_5f_4.A1" office:value-type="string">
            <text:p text:style-name="P6">Механизм</text:p>
          </table:table-cell>
          <table:table-cell table:style-name="Table_5f_4.A1" office:value-type="string">
            <text:p text:style-name="P6">Оборудование</text:p>
          </table:table-cell>
          <table:table-cell table:style-name="Table_5f_4.A1" office:value-type="string">
            <text:p text:style-name="P6">Граница --&gt; A22, A23, A24</text:p>
          </table:table-cell>
          <table:table-cell table:style-name="Table_5f_4.A1" office:value-type="string">
            <text:p text:style-name="P6">Инструменты и стенды</text:p>
          </table:table-cell>
        </table:table-row>
      </table:table>
      <text:p text:style-name="P6"/>
      <text:p text:style-name="P1">3.8. Внутренние стрелки и обратная связь на диаграмме A2</text:p>
      <table:table table:name="Table_5" table:style-name="Table_5f_5">
        <table:table-column table:style-name="Table_5f_5.A" table:number-columns-repeated="3"/>
        <table:table-column table:style-name="Table_5f_5.D"/>
        <table:table-row>
          <table:table-cell table:style-name="Table_5f_5.A1" office:value-type="string">
            <text:p text:style-name="P2">Стрелка</text:p>
          </table:table-cell>
          <table:table-cell table:style-name="Table_5f_5.A1" office:value-type="string">
            <text:p text:style-name="P2">От</text:p>
          </table:table-cell>
          <table:table-cell table:style-name="Table_5f_5.A1" office:value-type="string">
            <text:p text:style-name="P2">К</text:p>
          </table:table-cell>
          <table:table-cell table:style-name="Table_5f_5.A1" office:value-type="string">
            <text:p text:style-name="P2">Описание</text:p>
          </table:table-cell>
        </table:table-row>
        <table:table-row>
          <table:table-cell table:style-name="Table_5f_5.A1" office:value-type="string">
            <text:p text:style-name="P6">Расписание сборки</text:p>
          </table:table-cell>
          <table:table-cell table:style-name="Table_5f_5.A1" office:value-type="string">
            <text:p text:style-name="P6">A21 (выход)</text:p>
          </table:table-cell>
          <table:table-cell table:style-name="Table_5f_5.A1" office:value-type="string">
            <text:p text:style-name="P6">A22, A23 (управление)</text:p>
          </table:table-cell>
          <table:table-cell table:style-name="Table_5f_5.A1" office:value-type="string">
            <text:p text:style-name="P6">Координация очерёдности и сроков сборки</text:p>
          </table:table-cell>
        </table:table-row>
        <table:table-row>
          <table:table-cell table:style-name="Table_5f_5.A1" office:value-type="string">
            <text:p text:style-name="P6">Настольные ПК</text:p>
          </table:table-cell>
          <table:table-cell table:style-name="Table_5f_5.A1" office:value-type="string">
            <text:p text:style-name="P6">A22 (выход)</text:p>
          </table:table-cell>
          <table:table-cell table:style-name="Table_5f_5.A1" office:value-type="string">
            <text:p text:style-name="P6">A24 (вход)</text:p>
          </table:table-cell>
          <table:table-cell table:style-name="Table_5f_5.A1" office:value-type="string">
            <text:p text:style-name="P6">Собранные настольные компьютеры передаются на тестирование</text:p>
          </table:table-cell>
        </table:table-row>
        <table:table-row>
          <table:table-cell table:style-name="Table_5f_5.A1" office:value-type="string">
            <text:p text:style-name="P6">Ноутбуки</text:p>
          </table:table-cell>
          <table:table-cell table:style-name="Table_5f_5.A1" office:value-type="string">
            <text:p text:style-name="P6">A23 (выход)</text:p>
          </table:table-cell>
          <table:table-cell table:style-name="Table_5f_5.A1" office:value-type="string">
            <text:p text:style-name="P6">A24 (вход)</text:p>
          </table:table-cell>
          <table:table-cell table:style-name="Table_5f_5.A1" office:value-type="string">
            <text:p text:style-name="P6">Собранные ноутбуки передаются на тестирование</text:p>
          </table:table-cell>
        </table:table-row>
        <table:table-row>
          <table:table-cell table:style-name="Table_5f_5.A1" office:value-type="string">
            <text:p text:style-name="P6">Результаты тестирования</text:p>
          </table:table-cell>
          <table:table-cell table:style-name="Table_5f_5.A1" office:value-type="string">
            <text:p text:style-name="P6">A24 (выход)</text:p>
          </table:table-cell>
          <table:table-cell table:style-name="Table_5f_5.A1" office:value-type="string">
            <text:p text:style-name="P6">A21 (управление)</text:p>
          </table:table-cell>
          <table:table-cell table:style-name="Table_5f_5.A1" office:value-type="string">
            <text:p text:style-name="P6">Обратная связь о качестве сборки</text:p>
          </table:table-cell>
        </table:table-row>
      </table:table>
      <text:p text:style-name="P6"/>
      <text:p text:style-name="P6">Стрелка «Результаты тестирования» является стрелкой обратной связи по управлению. Она идёт от выхода блока A24 «Тестирование компьютеров» к управлению блока A21 «Отслеживание расписания», позволяя корректировать <text:soft-page-break/>расписание на основе данных о выявленных дефектах и проценте брака.</text:p>
      <text:p text:style-name="P1">3.9. Туннелирование стрелок на диаграмме A2</text:p>
      <text:p text:style-name="P6">Стрелка «Компоненты» обозначена как туннелированная (круглые скобки на границе диаграммы). На диаграмме A0 эта стрелка показана как внутренняя от A3 к A2, но на диаграмме декомпозиции A2 она приходит с границы и потому является туннелированной -- она не имеет прямого соответствия граничной стрелке на A0. Туннелирование позволяет не создавать дополнительную граничную стрелку на родительской диаграмме, сохраняя информацию о поступлении компонентов на уровне декомпозиции.</text:p>
      <text:p text:style-name="P6"/>
      <text:p text:style-name="P1">4. Диаграммы</text:p>
      <text:p text:style-name="P8"><draw:frame draw:style-name="fr1" draw:name="Изображение1" text:anchor-type="char" svg:width="17cm" svg:height="10.866cm" draw:z-index="0"><draw:image xlink:href="Pictures/10000001000005140000033FC7EF23EE.png" xlink:type="simple" xlink:show="embed" xlink:actuate="onLoad" draw:mime-type="image/png"/></draw:frame>Рисунок 1. Диаграмма декомпозиции A0 «Деятельность компании Quill»</text:p>
      <text:p text:style-name="P9"/>
      <text:p text:style-name="P9"/>
      <text:p text:style-name="P9"/>
      <text:p text:style-name="P8"><draw:frame draw:style-name="fr1" draw:name="Изображение2" text:anchor-type="char" svg:width="17cm" svg:height="11.675cm" draw:z-index="1"><draw:image xlink:href="Pictures/10000001000004BA0000033F067BBC00.png" xlink:type="simple" xlink:show="embed" xlink:actuate="onLoad" draw:mime-type="image/png"/></draw:frame><text:soft-page-break/>Рисунок 2. Диаграмма декомпозиции A2 «Сборка и тестирование компьютеров»</text:p>
      <text:p text:style-name="P6"/>
      <text:p text:style-name="P3">5. Ответы на контрольные вопросы</text:p>
      <text:p text:style-name="P2">1. Что такое декомпозиция в методологии IDEF0?</text:p>
      <text:p text:style-name="P6">Декомпозиция -- это процесс разбиения функционального блока на составляющие подфункции, каждая из которых описывается более детально на диаграмме следующего уровня. Она позволяет постепенно раскрывать внутреннюю структуру системы, переходя от общего представления к частному. В нашей работе контекстный блок «Деятельность компании Quill» декомпозирован на диаграмме A0 на три работы: A1 «Продажи и маркетинг», A2 «Сборка и тестирование компьютеров», A3 «Отгрузка и получение». Далее работа A2 декомпозирована на четыре подфункции на диаграмме A2. Каждый уровень декомпозиции согласован с родительской диаграммой через граничные стрелки.</text:p>
      <text:p text:style-name="P6"/>
      <text:p text:style-name="P2">2. Какое рекомендуемое количество работ на одной диаграмме?</text:p>
      <text:p text:style-name="P6">Рекомендуемое количество функциональных блоков на одной диаграмме <text:soft-page-break/>декомпозиции составляет от 3 до 6 (правило «3--6»). Слишком малое количество блоков (1--2) делает декомпозицию бессмысленной, поскольку не раскрывает внутреннюю структуру процесса. Слишком большое количество (более 6) перегружает диаграмму и затрудняет её восприятие. В нашей модели диаграмма A0 содержит 3 блока (A1--A3), а диаграмма A2 содержит 4 блока (A21--A24), что укладывается в рекомендуемый диапазон. Если функция требует более детального описания, следует выполнить декомпозицию конкретного блока на следующий уровень.</text:p>
      <text:p text:style-name="P6"/>
      <text:p text:style-name="P2">3. Чем граничные стрелки отличаются от внутренних?</text:p>
      <text:p text:style-name="P6">Граничные стрелки приходят от границы (рамки) диаграммы декомпозиции к работам и обязательно соответствуют стрелкам родительского блока на вышестоящей диаграмме. Они обеспечивают согласованность между уровнями модели и являются «интерфейсом» декомпозиции. Внутренние стрелки связывают работы между собой внутри одной диаграммы и не имеют соответствия на родительском уровне. Например, на диаграмме A0 стрелка «Заказы клиентов» -- граничная (приходит от рамки к A1), а стрелка «Оформленные заказы» от A1 к A2 -- внутренняя, отражающая взаимодействие между подпроцессами.</text:p>
      <text:p text:style-name="P6"/>
      <text:p text:style-name="P2">4. Как визуально обозначить стрелку обратной связи?</text:p>
      <text:p text:style-name="P6">Стрелка обратной связи в IDEF0 идёт от выхода одного блока к входу или управлению блока, расположенного левее (то есть выполняемого раньше в логической последовательности). Визуально она проходит справа налево, образуя петлю или изгиб, огибая промежуточные блоки. На диаграмме A0 стрелка «Результаты сборки» идёт от выхода A2 к управлению A1, а на диаграмме A2 стрелка «Результаты тестирования» идёт от выхода A24 к управлению A21. Обратная связь по управлению считается более сильной, чем по входу, поскольку она влияет на правила и условия выполнения работы.</text:p>
      <text:p text:style-name="P6"/>
      <text:p text:style-name="P2">5. Зачем создавать ответвления стрелок?</text:p>
      <text:p text:style-name="P6">Ответвления (разветвления) стрелок позволяют показать, что один и тот же объект (информация, материал, ресурс) используется несколькими функциональными блоками одновременно. Это избавляет от необходимости рисовать несколько параллельных стрелок с одинаковыми названиями, делая диаграмму компактнее и нагляднее. Например, на диаграмме A0 стрелка <text:soft-page-break/>«Правила и регламенты компании» разветвляется ко всем трём работам A1, A2 и A3, показывая, что одни и те же регламенты действуют во всех подразделениях компании Quill. Аналогично, на диаграмме A2 стрелка «Стандарты качества» разветвляется к блокам A22, A23 и A24.</text:p>
      <text:p text:style-name="P6"/>
      <text:p text:style-name="P2">6. Что означает туннелирование стрелки?</text:p>
      <text:p text:style-name="P6">Туннелирование -- это механизм, позволяющий стрелке присутствовать на одном уровне декомпозиции, но не отображаться на родительской или дочерней диаграмме. Визуально туннелированная стрелка обозначается круглыми скобками на том конце, где она «входит в туннель». Если скобки стоят у границы диаграммы, стрелка не имеет соответствия на родительском уровне. В нашей модели стрелка «Компоненты» на диаграмме A2 туннелирована: она присутствует на диаграмме декомпозиции, но не показана как отдельная граничная стрелка блока A2 на диаграмме A0, поскольку является внутренней деталью процесса сборки.</text:p>
      <text:p text:style-name="P6"/>
      <text:p text:style-name="P2">7. Почему работа «Отслеживание расписания» находится на одном уровне с работами сборки?</text:p>
      <text:p text:style-name="P6">Работа «Отслеживание расписания» (A21) является управляющей функцией, которая координирует выполнение остальных работ по сборке и тестированию компьютеров. Она находится на одном уровне декомпозиции, поскольку является неотъемлемой частью процесса A2 -- без неё невозможно обеспечить своевременное и упорядоченное выполнение заказов компании Quill. Её выход «Расписание сборки» подаётся как управление на блоки A22 «Сборка настольных компьютеров» и A23 «Сборка ноутбуков», что показывает координирующую роль этой функции. Такой подход типичен для IDEF0, где управляющие функции моделируются на одном уровне с исполнительными.</text:p>
      <text:p text:style-name="P6"/>
      <text:p text:style-name="P2">8. Какую роль играет стрелка «Результаты тестирования»?</text:p>
      <text:p text:style-name="P6">Стрелка «Результаты тестирования» -- это стрелка обратной связи по управлению, идущая от выхода блока A24 «Тестирование компьютеров» к управлению блока A21 «Отслеживание расписания». Она позволяет учитывать информацию о качестве сборки при планировании дальнейших работ. Если тестирование выявляет системные дефекты, расписание корректируется: может быть увеличено время на сборку, изменён порядок заказов или внесены поправки в технологический процесс. Эта стрелка отражает принцип <text:soft-page-break/>замкнутого контура управления качеством в компании Quill и обеспечивает непрерывное улучшение процесса.</text:p>
      <text:p text:style-name="P6"/>
      <text:p text:style-name="P2">9. Как визуально отличить туннелированные стрелки от обычных?</text:p>
      <text:p text:style-name="P6">Туннелированные стрелки отличаются от обычных наличием круглых скобок на одном из концов. Если скобки расположены у границы диаграммы (на конце, соприкасающемся с рамкой), это означает, что стрелка не отображается на родительской диаграмме. Если скобки расположены у функционального блока, стрелка не будет показана при декомпозиции этого блока. Обычные граничные стрелки не имеют скобок и обязательно должны соответствовать стрелкам на родительской диаграмме. В Draw.io туннелированные стрелки обозначаются добавлением элемента в виде скобок или текстовой аннотации «( )» у соответствующего конца стрелки.</text:p>
      <text:p text:style-name="P6"/>
      <text:p text:style-name="P2">10. Почему «Компоненты» являются туннелированной стрелкой?</text:p>
      <text:p text:style-name="P6">Стрелка «Компоненты» туннелирована на диаграмме A2, потому что на родительской диаграмме A0 поступление компонентов в работу A2 показано как внутренняя стрелка от работы A3 «Отгрузка и получение», а не как граничная стрелка контекстного блока. На уровне A2 необходимо показать, что компоненты непосредственно поступают на вход работ сборки (A22, A23), однако прямого соответствия этой стрелке на границе блока A2 в диаграмме A0 нет. Туннелирование позволяет разрешить это противоречие: стрелка присутствует на дочернем уровне для полноты описания, но помечена скобками, указывающими на отсутствие прямого соответствия на родительском уровне.</text:p>
      <text:p text:style-name="P6"/>
      <text:p text:style-name="P1">6. Вывод</text:p>
      <text:p text:style-name="P6">В ходе лабораторной работы были изучены принципы декомпозиции в методологии IDEF0 и построены две диаграммы декомпозиции для компании Quill. Диаграмма A0 содержит 3 функциональных блока (A1 «Продажи и маркетинг», A2 «Сборка и тестирование компьютеров», A3 «Отгрузка и получение»), граничные и внутренние стрелки, стрелку обратной связи «Результаты сборки» и новую граничную стрелку «Маркетинговые материалы». Диаграмма A2 содержит 4 функциональных блока (A21--A24), стрелку обратной связи «Результаты тестирования» и туннелированную <text:soft-page-break/>стрелку «Компоненты».</text:p>
      <text:p text:style-name="P6">Освоены практические навыки работы с различными типами стрелок IDEF0: граничными, внутренними, обратной связи и туннелированными. Полученные диаграммы детализируют деятельность компании Quill, раскрывая как общую структуру бизнес-процессов (A0), так и внутреннюю логику процесса сборки и тестирования компьютеров (A2)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4.1$Windows_X86_64 LibreOffice_project/e19e193f88cd6c0525a17fb7a176ed8e6a3e2aa1</meta:generator>
    <dc:date>2026-06-20T21:20:12.010000000</dc:date>
    <meta:editing-duration>PT3M45S</meta:editing-duration>
    <meta:editing-cycles>2</meta:editing-cycles>
    <meta:document-statistic meta:table-count="6" meta:image-count="2" meta:object-count="0" meta:page-count="12" meta:paragraph-count="198" meta:word-count="1950" meta:character-count="14638" meta:non-whitespace-character-count="12907"/>
  </office:meta>
</office:document-meta>
</file>