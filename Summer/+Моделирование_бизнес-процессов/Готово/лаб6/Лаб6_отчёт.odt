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C000002B3AA2F2D69.png" manifest:media-type="image/png"/>
  <manifest:file-entry manifest:full-path="Pictures/10000001000005E60000038F7E4B31FD.png" manifest:media-type="image/png"/>
  <manifest:file-entry manifest:full-path="Pictures/1000000100000441000002C75CDF2D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5.667cm" style:rel-column-width="21845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5.667cm" style:rel-column-width="21845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4.249cm" style:rel-column-width="16383*"/>
    </style:style>
    <style:style style:name="Table_5f_2.D" style:display-name="Table_2.D" style:family="table-column">
      <style:table-column-properties style:column-width="4.251cm" style:rel-column-width="16386*"/>
    </style:style>
    <style:style style:name="Table_5f_2.A1" style:display-name="Table_2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6" style:family="paragraph" style:parent-style-name="Standard">
      <style:paragraph-properties fo:margin-left="0.801cm" fo:margin-top="0cm" fo:margin-bottom="0.101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top="0.7cm" fo:margin-bottom="0.501cm" style:contextual-spacing="false" fo:line-height="115%" fo:text-align="justify" style:justify-single-word="false"/>
      <style:text-properties style:font-name="Times New Roman" fo:font-size="14pt"/>
    </style:style>
    <style:style style:name="P8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style="italic"/>
    </style:style>
    <style:style style:name="P9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P10" style:family="paragraph" style:parent-style-name="Standard">
      <style:paragraph-properties fo:margin-top="0.3cm" fo:margin-bottom="0.3cm" style:contextual-spacing="false" fo:line-height="115%" fo:text-align="justify" style:justify-single-word="false"/>
      <style:text-properties fo:color="#666666" loext:opacity="100%" style:font-name="Times New Roman" fo:font-size="14pt" fo:font-style="itali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ОТЧЁТ</text:h>
      <text:p text:style-name="P4">по лабораторной работе №6</text:p>
      <text:p text:style-name="P4">по дисциплине «Моделирование бизнес-процессов»</text:p>
      <text:p text:style-name="P4"/>
      <text:p text:style-name="P5"><text:span text:style-name="T1">Тема:</text:span> Создание модели категории TO-BE (реинжиниринг бизнес-процессов)</text:p>
      <text:p text:style-name="P5">Выполнил: студент группы БИНOZS-331 Трофимов А.Н.</text:p>
      <text:p text:style-name="P5"/>
      <text:p text:style-name="P1">1. Цель работы</text:p>
      <text:p text:style-name="P5">Создание модели желаемого будущего состояния (TO-BE) на основе анализа текущей модели (AS-IS) с применением методов реинжиниринга бизнес-процессов. Создание диаграммы DFD. Использование межстраничных ссылок.</text:p>
      <text:p text:style-name="P5"/>
      <text:p text:style-name="P1">2. Краткие теоретические сведения</text:p>
      <text:p text:style-name="P5">Моделирование AS-IS / TO-BE — базовый подход к анализу и оптимизации бизнес-процессов, при котором сначала строится модель текущего состояния процесса (AS-IS), затем на её основе проектируется модель желаемого будущего состояния (TO-BE). Модель AS-IS фиксирует все существующие операции, потоки данных, ресурсы и управляющие воздействия, выявляя узкие места, избыточные операции и неэффективное использование ресурсов. Модель TO-BE описывает оптимизированный процесс, в котором устранены выявленные недостатки, внедрены новые технологии и перераспределены ресурсы.</text:p>
      <text:p text:style-name="P5">Реинжиниринг бизнес-процессов (Business Process Reengineering, BPR) — методология радикального перепроектирования процессов для достижения существенных улучшений по ключевым показателям: стоимости, качеству, скорости, уровню обслуживания. В отличие от постепенного улучшения (continuous improvement), реинжиниринг предполагает переосмысление процесса «с чистого листа», что может включать устранение целых операций, внедрение информационных систем, изменение организационной структуры и создание новых ролей.</text:p>
      <text:p text:style-name="P5">Диаграмма потоков данных (Data Flow Diagram, DFD) — нотация моделирования, описывающая систему с точки зрения движения данных. Основные элементы DFD: процессы (функции преобразования данных), внешние сущности (источники и получатели данных), хранилища данных <text:soft-page-break/>(места хранения информации) и потоки данных (движение информации между элементами). DFD дополняет IDEF0, фокусируясь не на функциональной структуре, а на информационных потоках, что особенно полезно при проектировании информационных систем.</text:p>
      <text:p text:style-name="P5"/>
      <text:p text:style-name="P1">3. Ход работы</text:p>
      <text:p text:style-name="P1">3.1. Анализ модели AS-IS</text:p>
      <text:p text:style-name="P5">На основе модели AS-IS компании Quill были выявлены следующие узкие места:</text:p>
      <table:table table:name="Table" table:style-name="Table">
        <table:table-column table:style-name="Table.A" table:number-columns-repeated="3"/>
        <table:table-row>
          <table:table-cell table:style-name="Table.A1" office:value-type="string">
            <text:p text:style-name="P2">Узкое место</text:p>
          </table:table-cell>
          <table:table-cell table:style-name="Table.A1" office:value-type="string">
            <text:p text:style-name="P2">Описание проблемы</text:p>
          </table:table-cell>
          <table:table-cell table:style-name="Table.A1" office:value-type="string">
            <text:p text:style-name="P2">Влияние</text:p>
          </table:table-cell>
        </table:table-row>
        <table:table-row>
          <table:table-cell table:style-name="Table.A1" office:value-type="string">
            <text:p text:style-name="P5">Ручное формирование заказов</text:p>
          </table:table-cell>
          <table:table-cell table:style-name="Table.A1" office:value-type="string">
            <text:p text:style-name="P5">Клиент звонит менеджеру, который вручную заполняет заказ</text:p>
          </table:table-cell>
          <table:table-cell table:style-name="Table.A1" office:value-type="string">
            <text:p text:style-name="P5">Ошибки в спецификациях, потеря времени</text:p>
          </table:table-cell>
        </table:table-row>
        <table:table-row>
          <table:table-cell table:style-name="Table.A1" office:value-type="string">
            <text:p text:style-name="P5">Отсутствие онлайн-конфигуратора</text:p>
          </table:table-cell>
          <table:table-cell table:style-name="Table.A1" office:value-type="string">
            <text:p text:style-name="P5">Клиент не может самостоятельно подобрать конфигурацию</text:p>
          </table:table-cell>
          <table:table-cell table:style-name="Table.A1" office:value-type="string">
            <text:p text:style-name="P5">Увеличение нагрузки на отдел продаж</text:p>
          </table:table-cell>
        </table:table-row>
        <table:table-row>
          <table:table-cell table:style-name="Table.A1" office:value-type="string">
            <text:p text:style-name="P5">Последовательное выполнение</text:p>
          </table:table-cell>
          <table:table-cell table:style-name="Table.A1" office:value-type="string">
            <text:p text:style-name="P5">Сборка настольных ПК и ноутбуков выполняется последовательно</text:p>
          </table:table-cell>
          <table:table-cell table:style-name="Table.A1" office:value-type="string">
            <text:p text:style-name="P5">Увеличение времени цикла</text:p>
          </table:table-cell>
        </table:table-row>
        <table:table-row>
          <table:table-cell table:style-name="Table.A1" office:value-type="string">
            <text:p text:style-name="P5">Ручное отслеживание расписания</text:p>
          </table:table-cell>
          <table:table-cell table:style-name="Table.A1" office:value-type="string">
            <text:p text:style-name="P5">Контроль сроков ведётся на бумаге или в электронных таблицах</text:p>
          </table:table-cell>
          <table:table-cell table:style-name="Table.A1" office:value-type="string">
            <text:p text:style-name="P5">Срыв сроков, отсутствие прозрачности</text:p>
          </table:table-cell>
        </table:table-row>
        <table:table-row>
          <table:table-cell table:style-name="Table.A1" office:value-type="string">
            <text:p text:style-name="P5">Отсутствие менеджера по качеству</text:p>
          </table:table-cell>
          <table:table-cell table:style-name="Table.A1" office:value-type="string">
            <text:p text:style-name="P5">Контроль качества не выделен как отдельная функция</text:p>
          </table:table-cell>
          <table:table-cell table:style-name="Table.A1" office:value-type="string">
            <text:p text:style-name="P5">Пропуск дефектов, возвраты</text:p>
          </table:table-cell>
        </table:table-row>
      </table:table>
      <text:p text:style-name="P5"/>
      <text:p text:style-name="P1">3.2. Создание модели TO-BE в нотации IDEF0</text:p>
      <text:p text:style-name="P5">На основе выявленных узких мест была спроектирована модель TO-BE с следующими изменениями:</text:p>
      <text:p text:style-name="P2"/>
      <text:p text:style-name="P2"><text:soft-page-break/>Контекстная диаграмма (А-0):</text:p>
      <text:p text:style-name="P6">Вход: Заказы клиентов (в т.ч. через онлайн-конфигуратор), Компоненты от поставщиков</text:p>
      <text:p text:style-name="P6">Управление: Стандарты качества ISO 9001, Бизнес-правила, Регламенты ИС</text:p>
      <text:p text:style-name="P6">Выход: Готовая продукция, Отчёты о качестве, Аналитика по заказам</text:p>
      <text:p text:style-name="P6">Механизм: Персонал, ИС управления заказами, Оборудование, ERP-система</text:p>
      <text:p text:style-name="P2"/>
      <text:p text:style-name="P2">Декомпозиция первого уровня (А0):</text:p>
      <table:table table:name="Table_1" table:style-name="Table_5f_1">
        <table:table-column table:style-name="Table_5f_1.A" table:number-columns-repeated="3"/>
        <table:table-row>
          <table:table-cell table:style-name="Table_5f_1.A1" office:value-type="string">
            <text:p text:style-name="P2">Работа</text:p>
          </table:table-cell>
          <table:table-cell table:style-name="Table_5f_1.A1" office:value-type="string">
            <text:p text:style-name="P2">Название (TO-BE)</text:p>
          </table:table-cell>
          <table:table-cell table:style-name="Table_5f_1.A1" office:value-type="string">
            <text:p text:style-name="P2">Изменения по сравнению с AS-IS</text:p>
          </table:table-cell>
        </table:table-row>
        <table:table-row>
          <table:table-cell table:style-name="Table_5f_1.A1" office:value-type="string">
            <text:p text:style-name="P5">А1</text:p>
          </table:table-cell>
          <table:table-cell table:style-name="Table_5f_1.A1" office:value-type="string">
            <text:p text:style-name="P5">Разработать конфигурацию</text:p>
          </table:table-cell>
          <table:table-cell table:style-name="Table_5f_1.A1" office:value-type="string">
            <text:p text:style-name="P5"><text:span text:style-name="T1">Новая работа.</text:span> Клиент через онлайн-конфигуратор или менеджер подбирают конфигурацию ПК</text:p>
          </table:table-cell>
        </table:table-row>
        <table:table-row>
          <table:table-cell table:style-name="Table_5f_1.A1" office:value-type="string">
            <text:p text:style-name="P5">А2</text:p>
          </table:table-cell>
          <table:table-cell table:style-name="Table_5f_1.A1" office:value-type="string">
            <text:p text:style-name="P5">Продажи и маркетинг</text:p>
          </table:table-cell>
          <table:table-cell table:style-name="Table_5f_1.A1" office:value-type="string">
            <text:p text:style-name="P5">Автоматизация приёма заказов через ИС, интеграция с конфигуратором</text:p>
          </table:table-cell>
        </table:table-row>
        <table:table-row>
          <table:table-cell table:style-name="Table_5f_1.A1" office:value-type="string">
            <text:p text:style-name="P5">А3</text:p>
          </table:table-cell>
          <table:table-cell table:style-name="Table_5f_1.A1" office:value-type="string">
            <text:p text:style-name="P5">Сборка и тестирование компьютеров</text:p>
          </table:table-cell>
          <table:table-cell table:style-name="Table_5f_1.A1" office:value-type="string">
            <text:p text:style-name="P5">Параллельная сборка настольных ПК и ноутбуков, автоматизированное отслеживание расписания</text:p>
          </table:table-cell>
        </table:table-row>
        <table:table-row>
          <table:table-cell table:style-name="Table_5f_1.A1" office:value-type="string">
            <text:p text:style-name="P5">А4</text:p>
          </table:table-cell>
          <table:table-cell table:style-name="Table_5f_1.A1" office:value-type="string">
            <text:p text:style-name="P5">Контроль качества</text:p>
          </table:table-cell>
          <table:table-cell table:style-name="Table_5f_1.A1" office:value-type="string">
            <text:p text:style-name="P5"><text:span text:style-name="T1">Новая работа.</text:span> Выделена функция управления качеством с ролью «Менеджер по качеству»</text:p>
          </table:table-cell>
        </table:table-row>
        <table:table-row>
          <table:table-cell table:style-name="Table_5f_1.A1" office:value-type="string">
            <text:p text:style-name="P5">А5</text:p>
          </table:table-cell>
          <table:table-cell table:style-name="Table_5f_1.A1" office:value-type="string">
            <text:p text:style-name="P5">Отгрузка и получение</text:p>
          </table:table-cell>
          <table:table-cell table:style-name="Table_5f_1.A1" office:value-type="string">
            <text:p text:style-name="P5">Интеграция с ERP для автоматического формирования документов</text:p>
          </table:table-cell>
        </table:table-row>
        <text:soft-page-break/>
        <table:table-row>
          <table:table-cell table:style-name="Table_5f_1.A1" office:value-type="string">
            <text:p text:style-name="P5">А6</text:p>
          </table:table-cell>
          <table:table-cell table:style-name="Table_5f_1.A1" office:value-type="string">
            <text:p text:style-name="P5">Поддержка бухгалтерии</text:p>
          </table:table-cell>
          <table:table-cell table:style-name="Table_5f_1.A1" office:value-type="string">
            <text:p text:style-name="P5">Автоматический обмен данными с ERP-системой</text:p>
          </table:table-cell>
        </table:table-row>
      </table:table>
      <text:p text:style-name="P5"/>
      <text:p text:style-name="P2">Ключевые улучшения:</text:p>
      <text:p text:style-name="P6"><text:span text:style-name="T1">Онлайн-конфигуратор</text:span> (работа А1): клиент на сайте самостоятельно выбирает компоненты, система проверяет совместимость и рассчитывает стоимость. Это снижает нагрузку на менеджеров на 40% и исключает ошибки в спецификациях.</text:p>
      <text:p text:style-name="P6"><text:span text:style-name="T1">Менеджер по качеству</text:span> (работа А4): выделенная роль, ответственная за входной контроль компонентов, промежуточный контроль на этапе сборки и финальное тестирование. Управляющее воздействие — стандарты ISO 9001.</text:p>
      <text:p text:style-name="P6"><text:span text:style-name="T1">Автоматизация расписания</text:span>: замена ручного отслеживания сроков на модуль ИС, который автоматически назначает задачи сборщикам, контролирует сроки и отправляет уведомления при задержках.</text:p>
      <text:p text:style-name="P6"><text:span text:style-name="T1">Параллельная сборка</text:span>: линии сборки настольных ПК и ноутбуков работают одновременно (а не последовательно), что сокращает общее время цикла на 30%.</text:p>
      <text:p text:style-name="P1">3.3. Создание диаграммы DFD</text:p>
      <text:p text:style-name="P5">Для модели TO-BE была построена диаграмма потоков данных (DFD), описывающая информационные потоки в системе:</text:p>
      <text:p text:style-name="P2">Внешние сущности:</text:p>
      <text:p text:style-name="P6">Клиент — источник заказов, получатель продукции и уведомлений</text:p>
      <text:p text:style-name="P6">Поставщик — источник компонентов и спецификаций</text:p>
      <text:p text:style-name="P6">Руководство — получатель аналитических отчётов</text:p>
      <text:p text:style-name="P2">Процессы:</text:p>
      <text:p text:style-name="P6">П1. Обработка заказов — приём, валидация, формирование спецификации</text:p>
      <text:p text:style-name="P6">П2. Управление запасами — контроль остатков, формирование заявок поставщикам</text:p>
      <text:p text:style-name="P6">П3. Планирование производства — составление расписания сборки</text:p>
      <text:p text:style-name="P6">П4. Управление качеством — контроль и протоколирование результатов</text:p>
      <text:p text:style-name="P2">Хранилища данных:</text:p>
      <text:p text:style-name="P6">D1. База заказов — информация о заказах клиентов, статусы, спецификации</text:p>
      <text:p text:style-name="P6"><text:soft-page-break/>D2. Каталог компонентов — номенклатура, цены, совместимость, остатки</text:p>
      <text:p text:style-name="P6">D3. База результатов тестирования — протоколы, дефекты, статистика качества</text:p>
      <text:p text:style-name="P2">Потоки данных:</text:p>
      <text:p text:style-name="P6">Клиент -&gt; П1: Заявка на конфигурацию</text:p>
      <text:p text:style-name="P6">П1 -&gt; D1: Сохранение заказа</text:p>
      <text:p text:style-name="P6">П1 -&gt; П3: Спецификация для производства</text:p>
      <text:p text:style-name="P6">П2 -&gt; Поставщик: Заявка на компоненты</text:p>
      <text:p text:style-name="P6">Поставщик -&gt; П2: Подтверждение поставки</text:p>
      <text:p text:style-name="P6">П2 -&gt; D2: Обновление остатков</text:p>
      <text:p text:style-name="P6">П3 -&gt; П4: Задание на контроль</text:p>
      <text:p text:style-name="P6">П4 -&gt; D3: Результаты тестирования</text:p>
      <text:p text:style-name="P6">П4 -&gt; П1: Уведомление о готовности</text:p>
      <text:p text:style-name="P6">П1 -&gt; Клиент: Уведомление об отгрузке</text:p>
      <text:p text:style-name="P1">3.4. Межстраничные ссылки</text:p>
      <text:p text:style-name="P5">Для обеспечения навигации между диаграммами разного типа и уровня были добавлены межстраничные ссылки (Off-Page Reference):</text:p>
      <text:p text:style-name="P6">Контекстная диаграмма IDEF0 (А-0) -&gt; Декомпозиция первого уровня (А0)</text:p>
      <text:p text:style-name="P6">Работа А1 «Разработать конфигурацию» -&gt; Диаграмма DFD процесса обработки заказов</text:p>
      <text:p text:style-name="P6">Работа А3 «Сборка и тестирование» -&gt; Декомпозиция второго уровня (А3)</text:p>
      <text:p text:style-name="P6">Работа А4 «Контроль качества» -&gt; Диаграмма DFD управления качеством</text:p>
      <text:p text:style-name="P5">Межстраничные ссылки оформлены в Draw.io как гиперссылки на соответствующие страницы документа, что обеспечивает интерактивную навигацию по модели.</text:p>
      <text:p text:style-name="P1">3.5. Сравнение AS-IS и TO-BE</text:p>
      <table:table table:name="Table_2" table:style-name="Table_5f_2">
        <table:table-column table:style-name="Table_5f_2.A" table:number-columns-repeated="3"/>
        <table:table-column table:style-name="Table_5f_2.D"/>
        <table:table-row>
          <table:table-cell table:style-name="Table_5f_2.A1" office:value-type="string">
            <text:p text:style-name="P2">Показатель</text:p>
          </table:table-cell>
          <table:table-cell table:style-name="Table_5f_2.A1" office:value-type="string">
            <text:p text:style-name="P2">AS-IS</text:p>
          </table:table-cell>
          <table:table-cell table:style-name="Table_5f_2.A1" office:value-type="string">
            <text:p text:style-name="P2">TO-BE</text:p>
          </table:table-cell>
          <table:table-cell table:style-name="Table_5f_2.A1" office:value-type="string">
            <text:p text:style-name="P2">Улучшение</text:p>
          </table:table-cell>
        </table:table-row>
        <table:table-row>
          <table:table-cell table:style-name="Table_5f_2.A1" office:value-type="string">
            <text:p text:style-name="P5">Время обработки заказа</text:p>
          </table:table-cell>
          <table:table-cell table:style-name="Table_5f_2.A1" office:value-type="string">
            <text:p text:style-name="P5">60 мин.</text:p>
          </table:table-cell>
          <table:table-cell table:style-name="Table_5f_2.A1" office:value-type="string">
            <text:p text:style-name="P5">15 мин.</text:p>
          </table:table-cell>
          <table:table-cell table:style-name="Table_5f_2.A1" office:value-type="string">
            <text:p text:style-name="P5">-75%</text:p>
          </table:table-cell>
        </table:table-row>
        <table:table-row>
          <table:table-cell table:style-name="Table_5f_2.A1" office:value-type="string">
            <text:p text:style-name="P5">Время цикла производства</text:p>
          </table:table-cell>
          <table:table-cell table:style-name="Table_5f_2.A1" office:value-type="string">
            <text:p text:style-name="P5">5 часов</text:p>
          </table:table-cell>
          <table:table-cell table:style-name="Table_5f_2.A1" office:value-type="string">
            <text:p text:style-name="P5">3,5 часа</text:p>
          </table:table-cell>
          <table:table-cell table:style-name="Table_5f_2.A1" office:value-type="string">
            <text:p text:style-name="P5">-30%</text:p>
          </table:table-cell>
        </table:table-row>
        <text:soft-page-break/>
        <table:table-row>
          <table:table-cell table:style-name="Table_5f_2.A1" office:value-type="string">
            <text:p text:style-name="P5">Ошибки в спецификациях</text:p>
          </table:table-cell>
          <table:table-cell table:style-name="Table_5f_2.A1" office:value-type="string">
            <text:p text:style-name="P5">8%</text:p>
          </table:table-cell>
          <table:table-cell table:style-name="Table_5f_2.A1" office:value-type="string">
            <text:p text:style-name="P5">1%</text:p>
          </table:table-cell>
          <table:table-cell table:style-name="Table_5f_2.A1" office:value-type="string">
            <text:p text:style-name="P5">-87%</text:p>
          </table:table-cell>
        </table:table-row>
        <table:table-row>
          <table:table-cell table:style-name="Table_5f_2.A1" office:value-type="string">
            <text:p text:style-name="P5">Процент брака (финальный)</text:p>
          </table:table-cell>
          <table:table-cell table:style-name="Table_5f_2.A1" office:value-type="string">
            <text:p text:style-name="P5">5%</text:p>
          </table:table-cell>
          <table:table-cell table:style-name="Table_5f_2.A1" office:value-type="string">
            <text:p text:style-name="P5">2%</text:p>
          </table:table-cell>
          <table:table-cell table:style-name="Table_5f_2.A1" office:value-type="string">
            <text:p text:style-name="P5">-60%</text:p>
          </table:table-cell>
        </table:table-row>
        <table:table-row>
          <table:table-cell table:style-name="Table_5f_2.A1" office:value-type="string">
            <text:p text:style-name="P5">Количество ролей</text:p>
          </table:table-cell>
          <table:table-cell table:style-name="Table_5f_2.A1" office:value-type="string">
            <text:p text:style-name="P5">4</text:p>
          </table:table-cell>
          <table:table-cell table:style-name="Table_5f_2.A1" office:value-type="string">
            <text:p text:style-name="P5">6</text:p>
          </table:table-cell>
          <table:table-cell table:style-name="Table_5f_2.A1" office:value-type="string">
            <text:p text:style-name="P5">+2 новые роли</text:p>
          </table:table-cell>
        </table:table-row>
        <table:table-row>
          <table:table-cell table:style-name="Table_5f_2.A1" office:value-type="string">
            <text:p text:style-name="P5">Уровень автоматизации</text:p>
          </table:table-cell>
          <table:table-cell table:style-name="Table_5f_2.A1" office:value-type="string">
            <text:p text:style-name="P5">Низкий</text:p>
          </table:table-cell>
          <table:table-cell table:style-name="Table_5f_2.A1" office:value-type="string">
            <text:p text:style-name="P5">Средний</text:p>
          </table:table-cell>
          <table:table-cell table:style-name="Table_5f_2.A1" office:value-type="string">
            <text:p text:style-name="P5">Внедрение ИС и ERP</text:p>
          </table:table-cell>
        </table:table-row>
      </table:table>
      <text:p text:style-name="P5"/>
      <text:p text:style-name="P5"/>
      <text:p text:style-name="P1">4. Диаграммы</text:p>
      <text:p text:style-name="P10"/>
      <text:p text:style-name="P9">Рисунок 1. Контекстная д<draw:frame draw:style-name="fr1" draw:name="Изображение1" text:anchor-type="char" svg:width="17cm" svg:height="11.516cm" draw:z-index="0"><draw:image xlink:href="Pictures/10000001000003FC000002B3AA2F2D69.png" xlink:type="simple" xlink:show="embed" xlink:actuate="onLoad" draw:mime-type="image/png"/></draw:frame>иаграмма TO-BE компании Quill (А-0)</text:p>
      <text:p text:style-name="P9"><draw:frame draw:style-name="fr2" draw:name="Изображение2" text:anchor-type="char" svg:width="17cm" svg:height="10.255cm" draw:z-index="1"><draw:image xlink:href="Pictures/10000001000005E60000038F7E4B31FD.png" xlink:type="simple" xlink:show="embed" xlink:actuate="onLoad" draw:mime-type="image/png"/></draw:frame><text:soft-page-break/>Рисунок 2. Декомпозиция первого уровня модели TO-BE с новыми работами «Разработать конфигурацию» и «Контроль качества»</text:p>
      <text:p text:style-name="P8"><draw:frame draw:style-name="fr1" draw:name="Изображение3" text:anchor-type="char" svg:width="17cm" svg:height="11.098cm" draw:z-index="2"><draw:image xlink:href="Pictures/1000000100000441000002C75CDF2DEB.png" xlink:type="simple" xlink:show="embed" xlink:actuate="onLoad" draw:mime-type="image/png"/></draw:frame>Рисунок 3. Диаграмма потоков данных (DFD) информационной системы компании Quill</text:p>
      <text:p text:style-name="P8"/>
      <text:p text:style-name="P7"><text:soft-page-break/><text:span text:style-name="T1">5. Ответы на контрольные вопросы</text:span></text:p>
      <text:p text:style-name="P2">1. В чём различие между моделями AS-IS и TO-BE? Зачем необходимо создавать обе модели?</text:p>
      <text:p text:style-name="P5">Модель AS-IS описывает текущее состояние бизнес-процесса — «как есть сейчас», со всеми существующими операциями, ресурсами, потоками данных и их недостатками. Модель TO-BE описывает желаемое будущее состояние — «как должно быть», с устранёнными узкими местами, внедрёнными улучшениями и оптимизированными потоками. Создание обеих моделей необходимо для объективной оценки эффекта изменений: без AS-IS невозможно измерить масштаб улучшений, а без TO-BE — определить направление оптимизации. В работе с компанией Quill сравнение моделей показало сокращение времени цикла на 30% и снижение ошибок в спецификациях на 87%. Кроме того, модель AS-IS служит базой для обоснования инвестиций в реинжиниринг перед руководством.</text:p>
      <text:p text:style-name="P5"/>
      <text:p text:style-name="P2">2. Перечислите основные элементы нотации IDEF0. Какие типы стрелок используются в IDEF0?</text:p>
      <text:p text:style-name="P5">Основные элементы нотации IDEF0: работы (Activities) — прямоугольники, представляющие функции или операции; стрелки — потоки информации, ресурсов и управляющих воздействий; декомпозиция — детализация работы на подработы на дочерней диаграмме. В IDEF0 используются четыре типа стрелок по принципу ICOM: Input (вход, слева) — данные или объекты, потребляемые и преобразуемые работой; Control (управление, сверху) — правила, стандарты, ограничения, регулирующие выполнение; Output (выход, справа) — результат работы; Mechanism (механизм, снизу) — ресурсы, выполняющие работу (люди, оборудование, ИС). В модели TO-BE Quill, например, для работы «Контроль качества» вход — собранные компьютеры, управление — стандарты ISO 9001, выход — протоколы тестирования, механизм — менеджер по качеству.</text:p>
      <text:p text:style-name="P5"/>
      <text:p text:style-name="P2">3. Какие элементы входят в состав диаграммы потоков данных (DFD)? Чем DFD отличается от IDEF0?</text:p>
      <text:p text:style-name="P5">Диаграмма потоков данных (DFD) включает четыре типа элементов: процессы (круги или прямоугольники с закруглёнными углами) — функции преобразования данных; внешние сущности (прямоугольники) — источники и получатели данных, находящиеся за границей системы; хранилища данных (открытые прямоугольники) — места хранения информации; потоки данных <text:soft-page-break/>(стрелки) — движение информации между элементами. Главное отличие DFD от IDEF0 — фокус: IDEF0 описывает функциональную структуру через принцип ICOM и не моделирует хранилища данных, а DFD фокусируется на движении информации и включает хранилища, но не различает типы стрелок (вход, управление, механизм). В работе для Quill DFD позволила описать информационные потоки между ИС, базой заказов и каталогом компонентов.</text:p>
      <text:p text:style-name="P5"/>
      <text:p text:style-name="P2">4. Перечислите типы перекрёстков в нотации IDEF3. Чем отличается асинхронное ИЛИ от исключающего ИЛИ?</text:p>
      <text:p text:style-name="P5">В нотации IDEF3 используются следующие типы перекрёстков (junctions): AND (И) — все исходящие пути выполняются параллельно или все входящие пути должны завершиться; OR (ИЛИ) — один или несколько путей выполняются; XOR (исключающее ИЛИ) — выполняется ровно один путь из нескольких. Каждый тип может быть синхронным (все пути начинаются/завершаются одновременно) или асинхронным (пути могут начинаться/завершаться в разное время). Асинхронное ИЛИ означает, что один или несколько путей будут выполнены, но момент их начала и завершения не синхронизирован — например, при тестировании ПК могут выполняться стресс-тест, проверка компонентов или проверка ПО в произвольном порядке. Исключающее ИЛИ (XOR) означает, что выполняется строго один путь — например, компьютер либо проходит тест, либо отправляется на доработку.</text:p>
      <text:p text:style-name="P5"/>
      <text:p text:style-name="P2">5. Какие новые роли и функции появились в модели TO-BE компании Quill по сравнению с моделью AS-IS?</text:p>
      <text:p text:style-name="P5">В модели TO-BE появились две новые роли и две новые функции. Роль «Менеджер по качеству» отвечает за входной контроль компонентов, промежуточный контроль сборки и финальное тестирование — в модели AS-IS эти функции были распределены между сборщиками и тестировщиками без единого ответственного. Роль «Администратор ИС» обеспечивает функционирование онлайн-конфигуратора и ERP-системы. Новая функция «Разработать конфигурацию» (А1) позволяет клиенту самостоятельно подобрать компоненты через онлайн-конфигуратор с автоматической проверкой совместимости. Функция «Контроль качества» (А4) выделена из работы «Сборка и тестирование» в самостоятельный блок с собственным управлением (ISO 9001) и механизмом.</text:p>
      <text:p text:style-name="P5"/>
      <text:p text:style-name="P5"/>
      <text:p text:style-name="P2"><text:soft-page-break/>6. Объясните назначение работы «Разработать конфигурацию» в модели TO-BE. Почему эта работа размещена на верхнем уровне декомпозиции?</text:p>
      <text:p text:style-name="P5">Работа «Разработать конфигурацию» предназначена для формирования технической спецификации компьютера до передачи в производство. Клиент через онлайн-конфигуратор выбирает процессор, объём памяти, тип накопителя, видеокарту и другие компоненты, а система автоматически проверяет совместимость и рассчитывает стоимость. Размещение на верхнем уровне декомпозиции обусловлено тем, что эта работа является входной точкой всего производственного цикла — её результат (утверждённая конфигурация) используется как вход для работ «Продажи и маркетинг» и «Сборка и тестирование». Кроме того, конфигурирование затрагивает взаимодействие с клиентом и каталог компонентов, что выходит за рамки любой отдельной подработы. Вынесение конфигурирования на верхний уровень подчёркивает его стратегическое значение для сокращения ошибок и повышения клиентоориентированности.</text:p>
      <text:p text:style-name="P5"/>
      <text:p text:style-name="P2">7. Какие преимущества даёт использование диаграммы IDEF3 для моделирования процесса «Сборка продукта»?</text:p>
      <text:p text:style-name="P5">IDEF3 позволяет описать процесс сборки с точки зрения последовательности операций и логики ветвления, что невозможно в IDEF0, не поддерживающей потоки управления. Для процесса «Сборка продукта» IDEF3 позволяет явно показать параллельное выполнение операций через AND-перекрёсток: установка процессора и памяти может выполняться параллельно с подготовкой корпуса. XOR-перекрёсток моделирует выбор между линией настольных ПК и линией ноутбуков в зависимости от типа заказа. Временные привязки в IDEF3 позволяют указать длительность каждой операции, что важно для планирования производства. Диаграмма IDEF3 также показывает точки принятия решений — например, результат тестирования определяет, отправляется ли компьютер на упаковку или возвращается на доработку.</text:p>
      <text:p text:style-name="P5"/>
      <text:p text:style-name="P2">8. Какие улучшения в организации производства предлагает модель TO-BE? Как это отражено на диаграммах?</text:p>
      <text:p text:style-name="P5">Модель TO-BE предлагает четыре ключевых улучшения. Первое — внедрение онлайн-конфигуратора, отражённое на диаграмме появлением новой работы А1 с входом «Запрос клиента» и выходом «Утверждённая конфигурация», направленным в работы А2 и А3. Второе — параллелизация сборки, отражённая на декомпозиции А3 наличием AND-перекрёстка перед работами <text:soft-page-break/>«Сборка настольных ПК» и «Сборка ноутбуков». Третье — выделение контроля качества в отдельную работу А4 с управляющей стрелкой «Стандарты ISO 9001» и механизмом «Менеджер по качеству». Четвёртое — автоматизация отслеживания расписания, отражённая заменой механизма «Электронные таблицы» на «ИС управления производством» в работе А3. На диаграмме DFD эти улучшения проявляются новыми потоками данных и хранилищами.</text:p>
      <text:p text:style-name="P5"/>
      <text:p text:style-name="P2">9. Предложите дополнительные улучшения для модели TO-BE компании Quill, которые не были реализованы в данной лабораторной работе.</text:p>
      <text:p text:style-name="P5">Можно предложить несколько дополнительных улучшений. Внедрение системы управления взаимоотношениями с клиентами (CRM) для автоматизации послепродажного обслуживания, отслеживания гарантийных обращений и повторных заказов. Создание системы предиктивного управления запасами на основе анализа истории заказов, которая автоматически формирует заявки поставщикам при достижении минимального уровня остатков. Внедрение штрихкодирования или RFID-меток для отслеживания каждого компьютера на всех этапах производства — от сборки до отгрузки. Организация обратной связи от клиентов через онлайн-портал для сбора информации о дефектах и пожеланиях, интегрированный с системой управления качеством. Переход на модульную архитектуру продукции, позволяющую собирать ПК из стандартизированных блоков, что сократит номенклатуру компонентов и время сборки.</text:p>
      <text:p text:style-name="P5"/>
      <text:p text:style-name="P2">10. Какие сложности могут возникнуть при внедрении модели TO-BE в реальной организации?</text:p>
      <text:p text:style-name="P5">При внедрении модели TO-BE в реальной организации могут возникнуть следующие сложности. Сопротивление персонала изменениям — сотрудники, привыкшие к текущим процессам, могут негативно воспринять новые роли и автоматизацию, опасаясь сокращений или увеличения нагрузки. Высокие начальные инвестиции — разработка онлайн-конфигуратора, внедрение ERP-системы и обучение персонала требуют значительных финансовых затрат, окупаемость которых не гарантирована в краткосрочной перспективе. Технические риски интеграции — объединение существующих систем (бухгалтерия, склад) с новой ERP может столкнуться с проблемами совместимости форматов данных. Переходный период — одновременное функционирование старых и новых процессов создаёт дополнительную нагрузку и риск ошибок. Для минимизации рисков рекомендуется поэтапное <text:soft-page-break/>внедрение с пилотным запуском на одной продуктовой линейке (например, только настольные ПК).</text:p>
      <text:p text:style-name="P5"/>
      <text:p text:style-name="P1">6. Вывод</text:p>
      <text:p text:style-name="P5">В ходе лабораторной работы была создана модель TO-BE компании Quill на основе анализа текущей модели AS-IS с применением методов реинжиниринга бизнес-процессов. Модель TO-BE включает ключевые улучшения: внедрение онлайн-конфигуратора для самостоятельного подбора компонентов клиентом, выделение функции контроля качества с ролью «Менеджер по качеству», автоматизацию отслеживания расписания через информационную систему и параллелизацию линий сборки. Сравнительный анализ показал потенциальное сокращение времени обработки заказа на 75%, времени цикла производства на 30% и снижение процента брака на 60%.</text:p>
      <text:p text:style-name="P5">Дополнительно была построена диаграмма потоков данных (DFD), описывающая информационные потоки в оптимизированной системе, и настроены межстраничные ссылки для навигации между диаграммами различных нотаций и уровней декомпозиции. Работа продемонстрировала, что совместное использование нотаций IDEF0 и DFD позволяет получить комплексное представление о бизнес-процессе — как с точки зрения функциональной структуры, так и с точки зрения движения информации, что является необходимым условием для проектирования информационных систем поддержки бизнес-процесс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41:34.706000000</dc:date>
    <meta:editing-duration>PT5M50S</meta:editing-duration>
    <meta:editing-cycles>4</meta:editing-cycles>
    <meta:document-statistic meta:table-count="3" meta:image-count="3" meta:object-count="0" meta:page-count="12" meta:paragraph-count="156" meta:word-count="2100" meta:character-count="17045" meta:non-whitespace-character-count="15050"/>
  </office:meta>
</office:document-meta>
</file>