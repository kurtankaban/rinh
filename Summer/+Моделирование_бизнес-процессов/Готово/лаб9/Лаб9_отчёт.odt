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F0000032B33C12FAA.png" manifest:media-type="image/png"/>
  <manifest:file-entry manifest:full-path="Pictures/10000001000005FF000003920CFD01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4.249cm" style:rel-column-width="16383*"/>
    </style:style>
    <style:style style:name="Table.D" style:family="table-column">
      <style:table-column-properties style:column-width="4.251cm" style:rel-column-width="16386*"/>
    </style:style>
    <style:style style:name="Table.A1" style:family="table-cell">
      <style:table-cell-properties style:vertical-align="middle" fo:padding="0.101cm" fo:border="none"/>
    </style:style>
    <style:style style:name="Table.A2" style:family="table-cell">
      <style:table-cell-properties fo:padding="0.101cm" fo:border="none"/>
    </style:style>
    <style:style style:name="Table.B2" style:family="table-cell">
      <style:table-cell-properties fo:padding="0.101cm" fo:border="none"/>
    </style:style>
    <style:style style:name="Table.D2" style:family="table-cell">
      <style:table-cell-properties fo:padding="0.101cm" fo:border="none"/>
    </style:style>
    <style:style style:name="Table.A3" style:family="table-cell">
      <style:table-cell-properties fo:padding="0.101cm" fo:border="none"/>
    </style:style>
    <style:style style:name="Table.B3" style:family="table-cell">
      <style:table-cell-properties fo:padding="0.101cm" fo:border="none"/>
    </style:style>
    <style:style style:name="Table.D3" style:family="table-cell">
      <style:table-cell-properties fo:padding="0.101cm" fo:border="none"/>
    </style:style>
    <style:style style:name="Table.A4" style:family="table-cell">
      <style:table-cell-properties fo:padding="0.101cm" fo:border="none"/>
    </style:style>
    <style:style style:name="Table.B4" style:family="table-cell">
      <style:table-cell-properties fo:padding="0.101cm" fo:border="none"/>
    </style:style>
    <style:style style:name="Table.D4" style:family="table-cell">
      <style:table-cell-properties fo:padding="0.101cm" fo:border="none"/>
    </style:style>
    <style:style style:name="Table.A5" style:family="table-cell">
      <style:table-cell-properties fo:padding="0.101cm" fo:border="none"/>
    </style:style>
    <style:style style:name="Table.B5" style:family="table-cell">
      <style:table-cell-properties fo:padding="0.101cm" fo:border="none"/>
    </style:style>
    <style:style style:name="Table.D5" style:family="table-cell">
      <style:table-cell-properties fo:padding="0.101cm" fo:border="none"/>
    </style:style>
    <style:style style:name="Table_5f_1" style:display-name="Table_1" style:family="table">
      <style:table-properties style:width="16.995cm" table:align="left"/>
    </style:style>
    <style:style style:name="Table_5f_1.A" style:display-name="Table_1.A" style:family="table-column">
      <style:table-column-properties style:column-width="0.997cm"/>
    </style:style>
    <style:style style:name="Table_5f_1.B" style:display-name="Table_1.B" style:family="table-column">
      <style:table-column-properties style:column-width="4.669cm"/>
    </style:style>
    <style:style style:name="Table_5f_1.C" style:display-name="Table_1.C" style:family="table-column">
      <style:table-column-properties style:column-width="2.833cm"/>
    </style:style>
    <style:style style:name="Table_5f_1.D" style:display-name="Table_1.D" style:family="table-column">
      <style:table-column-properties style:column-width="2.835cm"/>
    </style:style>
    <style:style style:name="Table_5f_1.F" style:display-name="Table_1.F" style:family="table-column">
      <style:table-column-properties style:column-width="2.829cm"/>
    </style:style>
    <style:style style:name="Table_5f_1.A1" style:display-name="Table_1.A1" style:family="table-cell">
      <style:table-cell-properties style:vertical-align="middle" fo:padding="0.101cm" fo:border="none"/>
    </style:style>
    <style:style style:name="Table_5f_1.B2" style:display-name="Table_1.B2" style:family="table-cell">
      <style:table-cell-properties fo:padding="0.101cm" fo:border="none"/>
    </style:style>
    <style:style style:name="Table_5f_1.F2" style:display-name="Table_1.F2" style:family="table-cell">
      <style:table-cell-properties fo:padding="0.101cm" fo:border="none"/>
    </style:style>
    <style:style style:name="Table_5f_1.B3" style:display-name="Table_1.B3" style:family="table-cell">
      <style:table-cell-properties fo:padding="0.101cm" fo:border="none"/>
    </style:style>
    <style:style style:name="Table_5f_1.F3" style:display-name="Table_1.F3" style:family="table-cell">
      <style:table-cell-properties fo:padding="0.101cm" fo:border="none"/>
    </style:style>
    <style:style style:name="Table_5f_1.B4" style:display-name="Table_1.B4" style:family="table-cell">
      <style:table-cell-properties fo:padding="0.101cm" fo:border="none"/>
    </style:style>
    <style:style style:name="Table_5f_1.F4" style:display-name="Table_1.F4" style:family="table-cell">
      <style:table-cell-properties fo:padding="0.101cm" fo:border="none"/>
    </style:style>
    <style:style style:name="Table_5f_1.B5" style:display-name="Table_1.B5" style:family="table-cell">
      <style:table-cell-properties fo:padding="0.101cm" fo:border="none"/>
    </style:style>
    <style:style style:name="Table_5f_1.F5" style:display-name="Table_1.F5" style:family="table-cell">
      <style:table-cell-properties fo:padding="0.101cm" fo:border="none"/>
    </style:style>
    <style:style style:name="Table_5f_1.B6" style:display-name="Table_1.B6" style:family="table-cell">
      <style:table-cell-properties fo:padding="0.101cm" fo:border="none"/>
    </style:style>
    <style:style style:name="Table_5f_1.F6" style:display-name="Table_1.F6" style:family="table-cell">
      <style:table-cell-properties fo:padding="0.101cm" fo:border="none"/>
    </style:style>
    <style:style style:name="Table_5f_1.B7" style:display-name="Table_1.B7" style:family="table-cell">
      <style:table-cell-properties fo:padding="0.101cm" fo:border="none"/>
    </style:style>
    <style:style style:name="Table_5f_1.F7" style:display-name="Table_1.F7" style:family="table-cell">
      <style:table-cell-properties fo:padding="0.101cm" fo:border="none"/>
    </style:style>
    <style:style style:name="Table_5f_1.B8" style:display-name="Table_1.B8" style:family="table-cell">
      <style:table-cell-properties fo:padding="0.101cm" fo:border="none"/>
    </style:style>
    <style:style style:name="Table_5f_1.F8" style:display-name="Table_1.F8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3.399cm" style:rel-column-width="13106*"/>
    </style:style>
    <style:style style:name="Table_5f_2.E" style:display-name="Table_2.E" style:family="table-column">
      <style:table-column-properties style:column-width="3.401cm" style:rel-column-width="13111*"/>
    </style:style>
    <style:style style:name="Table_5f_2.A1" style:display-name="Table_2.A1" style:family="table-cell">
      <style:table-cell-properties fo:padding="0.101cm" fo:border="none"/>
    </style:style>
    <style:style style:name="Table_5f_2.B2" style:display-name="Table_2.B2" style:family="table-cell">
      <style:table-cell-properties style:vertical-align="middle" fo:padding="0.101cm" fo:border="none"/>
    </style:style>
    <style:style style:name="Table_5f_3" style:display-name="Table_3" style:family="table">
      <style:table-properties style:width="16.995cm" table:align="left"/>
    </style:style>
    <style:style style:name="Table_5f_3.A" style:display-name="Table_3.A" style:family="table-column">
      <style:table-column-properties style:column-width="0.997cm"/>
    </style:style>
    <style:style style:name="Table_5f_3.B" style:display-name="Table_3.B" style:family="table-column">
      <style:table-column-properties style:column-width="8.304cm"/>
    </style:style>
    <style:style style:name="Table_5f_3.C" style:display-name="Table_3.C" style:family="table-column">
      <style:table-column-properties style:column-width="3.448cm"/>
    </style:style>
    <style:style style:name="Table_5f_3.D" style:display-name="Table_3.D" style:family="table-column">
      <style:table-column-properties style:column-width="4.246cm"/>
    </style:style>
    <style:style style:name="Table_5f_3.A1" style:display-name="Table_3.A1" style:family="table-cell">
      <style:table-cell-properties style:vertical-align="middle" fo:padding="0.101cm" fo:border="none"/>
    </style:style>
    <style:style style:name="Table_5f_3.B2" style:display-name="Table_3.B2" style:family="table-cell">
      <style:table-cell-properties fo:padding="0.101cm" fo:border="none"/>
    </style:style>
    <style:style style:name="Table_5f_3.B3" style:display-name="Table_3.B3" style:family="table-cell">
      <style:table-cell-properties fo:padding="0.101cm" fo:border="none"/>
    </style:style>
    <style:style style:name="Table_5f_3.B4" style:display-name="Table_3.B4" style:family="table-cell">
      <style:table-cell-properties fo:padding="0.101cm" fo:border="none"/>
    </style:style>
    <style:style style:name="Table_5f_3.B5" style:display-name="Table_3.B5" style:family="table-cell">
      <style:table-cell-properties fo:padding="0.101cm" fo:border="none"/>
    </style:style>
    <style:style style:name="Table_5f_3.B6" style:display-name="Table_3.B6" style:family="table-cell">
      <style:table-cell-properties fo:padding="0.101cm" fo:border="none"/>
    </style:style>
    <style:style style:name="Table_5f_3.B7" style:display-name="Table_3.B7" style:family="table-cell">
      <style:table-cell-properties fo:padding="0.101cm" fo:border="none"/>
    </style:style>
    <style:style style:name="Table_5f_4" style:display-name="Table_4" style:family="table">
      <style:table-properties style:width="16.995cm" table:align="left"/>
    </style:style>
    <style:style style:name="Table_5f_4.A" style:display-name="Table_4.A" style:family="table-column">
      <style:table-column-properties style:column-width="4.009cm"/>
    </style:style>
    <style:style style:name="Table_5f_4.B" style:display-name="Table_4.B" style:family="table-column">
      <style:table-column-properties style:column-width="5.292cm"/>
    </style:style>
    <style:style style:name="Table_5f_4.C" style:display-name="Table_4.C" style:family="table-column">
      <style:table-column-properties style:column-width="2.198cm"/>
    </style:style>
    <style:style style:name="Table_5f_4.D" style:display-name="Table_4.D" style:family="table-column">
      <style:table-column-properties style:column-width="2.91cm"/>
    </style:style>
    <style:style style:name="Table_5f_4.E" style:display-name="Table_4.E" style:family="table-column">
      <style:table-column-properties style:column-width="2.586cm"/>
    </style:style>
    <style:style style:name="Table_5f_4.A1" style:display-name="Table_4.A1" style:family="table-cell">
      <style:table-cell-properties style:vertical-align="middle" fo:padding="0.101cm" fo:border="none"/>
    </style:style>
    <style:style style:name="Table_5f_4.A2" style:display-name="Table_4.A2" style:family="table-cell">
      <style:table-cell-properties fo:padding="0.101cm" fo:border="none"/>
    </style:style>
    <style:style style:name="Table_5f_4.B2" style:display-name="Table_4.B2" style:family="table-cell">
      <style:table-cell-properties fo:padding="0.101cm" fo:border="none"/>
    </style:style>
    <style:style style:name="Table_5f_4.A3" style:display-name="Table_4.A3" style:family="table-cell">
      <style:table-cell-properties fo:padding="0.101cm" fo:border="none"/>
    </style:style>
    <style:style style:name="Table_5f_4.B3" style:display-name="Table_4.B3" style:family="table-cell">
      <style:table-cell-properties fo:padding="0.101cm" fo:border="none"/>
    </style:style>
    <style:style style:name="Table_5f_5" style:display-name="Table_5" style:family="table">
      <style:table-properties style:width="17cm" table:align="margins"/>
    </style:style>
    <style:style style:name="Table_5f_5.A" style:display-name="Table_5.A" style:family="table-column">
      <style:table-column-properties style:column-width="4.249cm" style:rel-column-width="16383*"/>
    </style:style>
    <style:style style:name="Table_5f_5.D" style:display-name="Table_5.D" style:family="table-column">
      <style:table-column-properties style:column-width="4.251cm" style:rel-column-width="16386*"/>
    </style:style>
    <style:style style:name="Table_5f_5.A1" style:display-name="Table_5.A1" style:family="table-cell">
      <style:table-cell-properties style:vertical-align="middle" fo:padding="0.101cm" fo:border="none"/>
    </style:style>
    <style:style style:name="Table_5f_5.A2" style:display-name="Table_5.A2" style:family="table-cell">
      <style:table-cell-properties fo:padding="0.101cm" fo:border="none"/>
    </style:style>
    <style:style style:name="Table_5f_5.A3" style:display-name="Table_5.A3" style:family="table-cell">
      <style:table-cell-properties fo:padding="0.101cm" fo:border="none"/>
    </style:style>
    <style:style style:name="Table_5f_5.A4" style:display-name="Table_5.A4" style:family="table-cell">
      <style:table-cell-properties fo:padding="0.101cm" fo:border="none"/>
    </style:style>
    <style:style style:name="Table_5f_5.A5" style:display-name="Table_5.A5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/>
      <style:text-properties style:font-name="Times New Roman" fo:font-size="14pt" fo:font-weight="bold" style:font-size-asian="14pt" style:font-size-complex="14pt"/>
    </style:style>
    <style:style style:name="P2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fo:font-weight="bold" style:font-size-asian="14pt" style:font-size-complex="14pt"/>
    </style:style>
    <style:style style:name="P3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size-complex="14pt"/>
    </style:style>
    <style:style style:name="P6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.801cm" fo:margin-top="0cm" fo:margin-bottom="0.101cm" style:contextual-spacing="false" fo:line-height="115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.199cm" style:contextual-spacing="false" fo:line-height="115%"/>
      <style:text-properties style:font-name="Times New Roman" fo:font-size="14pt" fo:font-style="italic" style:font-size-asian="14pt" style:font-size-complex="14pt"/>
    </style:style>
    <style:style style:name="P11" style:family="paragraph" style:parent-style-name="Standard">
      <style:paragraph-properties fo:margin-top="0.3cm" fo:margin-bottom="0.3cm" style:contextual-spacing="false" fo:line-height="115%"/>
      <style:text-properties fo:color="#666666" loext:opacity="100%" style:font-name="Times New Roman" fo:font-size="14pt" fo:font-style="italic" style:font-size-asian="14pt" style:font-size-complex="14pt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ОТЧЁТ</text:h>
      <text:p text:style-name="P4">по лабораторной работе №9</text:p>
      <text:p text:style-name="P4">по дисциплине «Моделирование бизнес-процессов»</text:p>
      <text:p text:style-name="P6"><text:span text:style-name="T1"/></text:p>
      <text:p text:style-name="P6"><text:span text:style-name="T1">Тема:</text:span> Анализ бизнес-процессов компании</text:p>
      <text:p text:style-name="P6">Выполнил: студент группы БИНOZS-331 Трофимов А.Н.</text:p>
      <text:p text:style-name="P6"/>
      <text:p text:style-name="P1">1. Введение</text:p>
      <text:p text:style-name="P6">Контроллинг и мониторинг бизнес-процессов являются неотъемлемыми элементами системы управления современными организациями. Эффективное управление процессами невозможно без объективной количественной оценки их состояния, выявления отклонений от плановых показателей и своевременного принятия корректирующих мер.</text:p>
      <text:p text:style-name="P6">Контроллинг представляет собой систему управления, направленную на повышение эффективности деятельности предприятия путём анализа, контроля и оптимизации процессов. Мониторинг — это непрерывное наблюдение за процессом для отслеживания его состояния и производительности в режиме реального времени.</text:p>
      <text:p text:style-name="P6">Ключевые показатели производительности (KPI) — это измеримые метрики, позволяющие количественно оценить эффективность процесса по различным измерениям: времени, стоимости, качеству и загрузке ресурсов. Использование KPI обеспечивает объективную основу для принятия управленческих решений по оптимизации процессов.</text:p>
      <text:p text:style-name="P6">Целью данной лабораторной работы является освоение методов анализа бизнес-процессов через системы контроллинга и мониторинга, выявление узких мест и неэффективных операций, а также создание инструментов для отслеживания KPI процессов.</text:p>
      <text:p text:style-name="P6"/>
      <text:p text:style-name="P1">2. Теоретическая часть</text:p>
      <text:p text:style-name="P1">2.1. Контроллинг и мониторинг</text:p>
      <text:p text:style-name="P6"><text:span text:style-name="T1">Контроллинг</text:span> — это система управления, направленная на повышение эффективности деятельности предприятия. В контексте бизнес-процессов контроллинг решает следующие задачи:</text:p>
      <text:p text:style-name="P7"><text:soft-page-break/>определение плановых показателей выполнения процесса;</text:p>
      <text:p text:style-name="P7">сравнение фактических показателей с плановыми;</text:p>
      <text:p text:style-name="P7">выявление отклонений и причин их возникновения;</text:p>
      <text:p text:style-name="P7">принятие корректирующих мер;</text:p>
      <text:p text:style-name="P7">оптимизация затрат и сроков выполнения.</text:p>
      <text:p text:style-name="P6"><text:span text:style-name="T1">Мониторинг</text:span> — это непрерывное наблюдение за процессом для отслеживания его состояния и производительности. Основные элементы системы мониторинга:</text:p>
      <text:p text:style-name="P7">сбор данных о процессе в реальном времени;</text:p>
      <text:p text:style-name="P7">анализ ключевых показателей эффективности (KPI);</text:p>
      <text:p text:style-name="P7">выявление аномалий и отклонений от норм;</text:p>
      <text:p text:style-name="P7">визуализация данных через дашборды;</text:p>
      <text:p text:style-name="P7">алертинг — оповещение о проблемах.</text:p>
      <text:p text:style-name="P6">Ключевое различие: мониторинг отвечает на вопрос «что происходит сейчас?», а контроллинг — на вопрос «почему это происходит и что делать?».</text:p>
      <text:p text:style-name="P1">2.2. Методы анализа процессов</text:p>
      <text:p text:style-name="P6"><text:span text:style-name="T1">Анализ потока стоимости (Value Stream Mapping, VSM)</text:span> — методология визуализации потока создания ценности, позволяющая отобразить все этапы процесса (как добавляющие, так и не добавляющие ценность), потоки материалов и информации. VSM помогает выявить потери (muda): ожидание, лишние перемещения, дефекты, перепроизводство.</text:p>
      <text:p text:style-name="P6"><text:span text:style-name="T1">Анализ узких мест (Bottleneck Analysis)</text:span> — выявление операций, лимитирующих пропускную способность всего процесса. Узкое место определяется по наибольшему времени выполнения, наибольшей стоимости или наибольшему проценту ошибок.</text:p>
      <text:p text:style-name="P6"><text:span text:style-name="T1">Диаграмма Парето</text:span> — гистограмма, которая демонстрирует количественные соотношения различных показателей в порядке их убывания по частоте. Основана на правиле 80/20: примерно 80% проблем вызваны 20% причин. Выделяют два вида: по результатам деятельности (для выявления главной проблемы) и по причинам (для выявления главной причины). Построение диаграммы включает: составление списка критериев, подсчёт частоты, расчёт процентов и накопительных долей, построение столбцов в порядке убывания с кривой накопления.</text:p>
      <text:p text:style-name="P1"/>
      <text:p text:style-name="P1"><text:soft-page-break/>2.3. Обоснование выбранных KPI</text:p>
      <text:p text:style-name="P6">Для анализа процесса выбраны четыре ключевых показателя:</text:p>
      <table:table table:name="Table" table:style-name="Table">
        <table:table-column table:style-name="Table.A" table:number-columns-repeated="3"/>
        <table:table-column table:style-name="Table.D"/>
        <table:table-row>
          <table:table-cell table:style-name="Table.A1" office:value-type="string">
            <text:p text:style-name="P5">KPI</text:p>
          </table:table-cell>
          <table:table-cell table:style-name="Table.A1" office:value-type="string">
            <text:p text:style-name="P5">Описание</text:p>
          </table:table-cell>
          <table:table-cell table:style-name="Table.A1" office:value-type="string">
            <text:p text:style-name="P5">Единица</text:p>
          </table:table-cell>
          <table:table-cell table:style-name="Table.A1" office:value-type="string">
            <text:p text:style-name="P5">Обоснование выбора</text:p>
          </table:table-cell>
        </table:table-row>
        <table:table-row>
          <table:table-cell table:style-name="Table.A2" office:value-type="string">
            <text:p text:style-name="P8">Время цикла (Cycle Time)</text:p>
          </table:table-cell>
          <table:table-cell table:style-name="Table.A2" office:value-type="string">
            <text:p text:style-name="P8">Время от начала до завершения процесса</text:p>
          </table:table-cell>
          <table:table-cell table:style-name="Table.A1" office:value-type="string">
            <text:p text:style-name="P9">Минуты</text:p>
          </table:table-cell>
          <table:table-cell table:style-name="Table.D2" office:value-type="string">
            <text:p text:style-name="P8">Характеризует скорость процесса</text:p>
          </table:table-cell>
        </table:table-row>
        <table:table-row>
          <table:table-cell table:style-name="Table.A2" office:value-type="string">
            <text:p text:style-name="P8">Пропускная способность (Throughput)</text:p>
          </table:table-cell>
          <table:table-cell table:style-name="Table.A2" office:value-type="string">
            <text:p text:style-name="P8">Количество завершённых процессов в единицу времени</text:p>
          </table:table-cell>
          <table:table-cell table:style-name="Table.A1" office:value-type="string">
            <text:p text:style-name="P9">Единиц/день</text:p>
          </table:table-cell>
          <table:table-cell table:style-name="Table.D2" office:value-type="string">
            <text:p text:style-name="P8">Характеризует производительность</text:p>
          </table:table-cell>
        </table:table-row>
        <table:table-row>
          <table:table-cell table:style-name="Table.A2" office:value-type="string">
            <text:p text:style-name="P8">Коэффициент ошибок (Error Rate)</text:p>
          </table:table-cell>
          <table:table-cell table:style-name="Table.A2" office:value-type="string">
            <text:p text:style-name="P8">Доля ошибочно выполненных операций</text:p>
          </table:table-cell>
          <table:table-cell table:style-name="Table.A1" office:value-type="string">
            <text:p text:style-name="P9">%</text:p>
          </table:table-cell>
          <table:table-cell table:style-name="Table.D2" office:value-type="string">
            <text:p text:style-name="P8">Характеризует качество выполнения</text:p>
          </table:table-cell>
        </table:table-row>
        <table:table-row>
          <table:table-cell table:style-name="Table.A2" office:value-type="string">
            <text:p text:style-name="P8">Стоимость процесса (Process Cost)</text:p>
          </table:table-cell>
          <table:table-cell table:style-name="Table.A2" office:value-type="string">
            <text:p text:style-name="P8">Затраты на выполнение процесса</text:p>
          </table:table-cell>
          <table:table-cell table:style-name="Table.A1" office:value-type="string">
            <text:p text:style-name="P9">Руб.</text:p>
          </table:table-cell>
          <table:table-cell table:style-name="Table.D2" office:value-type="string">
            <text:p text:style-name="P8">Характеризует экономическую эффективность</text:p>
          </table:table-cell>
        </table:table-row>
      </table:table>
      <text:p text:style-name="P6"/>
      <text:p text:style-name="P6">Совокупность этих четырёх показателей обеспечивает комплексную оценку процесса по ключевым измерениям: скорость, производительность, качество и стоимость.</text:p>
      <text:p text:style-name="P6"/>
      <text:p text:style-name="P1">3. Описание процесса анализа</text:p>
      <text:p text:style-name="P1">3.1. Объект анализа</text:p>
      <text:p text:style-name="P6">В качестве объекта анализа выбран процесс <text:span text:style-name="T1">«Сборка и тестирование компьютеров»</text:span> компании <text:span text:style-name="T1">Quill</text:span>, смоделированный в предыдущих лабораторных работах. Компания Quill специализируется на сборке и продаже компьютеров по индивидуальным заказам клиентов.</text:p>
      <text:p text:style-name="P1">3.2. Источники данных</text:p>
      <text:p text:style-name="P6">Данные для анализа получены из следующих источников:</text:p>
      <text:p text:style-name="P7">операционные журналы компании за период анализа;</text:p>
      <text:p text:style-name="P7"><text:soft-page-break/>отчёты отдела качества о количестве дефектов и переделок;</text:p>
      <text:p text:style-name="P7">финансовые отчёты с данными о затратах на каждую операцию;</text:p>
      <text:p text:style-name="P7">данные системы учёта рабочего времени сотрудников.</text:p>
      <text:p text:style-name="P1">3.3. Методология сбора информации</text:p>
      <text:p text:style-name="P6">Для каждой операции процесса зафиксированы три основных показателя: время выполнения (в минутах), стоимость (в рублях) и процент ошибок. Данные собраны методом хронометража и анализа операционной отчётности.</text:p>
      <text:p text:style-name="P1">3.4. Временной период анализа</text:p>
      <text:p text:style-name="P6">Анализ проведён за период одного производственного месяца (20 рабочих дней, 8-часовая смена).</text:p>
      <text:p text:style-name="P6"/>
      <text:p text:style-name="P1">4. Сбор данных о процессе (Этап 1)</text:p>
      <text:p text:style-name="P6">Процесс «Сборка и тестирование компьютеров» включает 7 операций. Для каждой операции зафиксированы показатели времени, стоимости и процента ошибок.</text:p>
      <text:p text:style-name="P10">Таблица 1 — Операции процесса с KPI-показателями</text:p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C"/>
        <table:table-column table:style-name="Table_5f_1.F"/>
        <table:table-row>
          <table:table-cell table:style-name="Table_5f_1.A1" office:value-type="string">
            <text:p text:style-name="P5">№</text:p>
          </table:table-cell>
          <table:table-cell table:style-name="Table_5f_1.A1" office:value-type="string">
            <text:p text:style-name="P5">Операция</text:p>
          </table:table-cell>
          <table:table-cell table:style-name="Table_5f_1.A1" office:value-type="string">
            <text:p text:style-name="P5">Время, мин</text:p>
          </table:table-cell>
          <table:table-cell table:style-name="Table_5f_1.A1" office:value-type="string">
            <text:p text:style-name="P5">Стоимость, руб.</text:p>
          </table:table-cell>
          <table:table-cell table:style-name="Table_5f_1.A1" office:value-type="string">
            <text:p text:style-name="P5">Ошибки, %</text:p>
          </table:table-cell>
          <table:table-cell table:style-name="Table_5f_1.A1" office:value-type="string">
            <text:p text:style-name="P5">Статус</text:p>
          </table:table-cell>
        </table:table-row>
        <table:table-row>
          <table:table-cell table:style-name="Table_5f_1.A1" office:value-type="string">
            <text:p text:style-name="P9">1</text:p>
          </table:table-cell>
          <table:table-cell table:style-name="Table_5f_1.B2" office:value-type="string">
            <text:p text:style-name="P8">Приём заказа</text:p>
          </table:table-cell>
          <table:table-cell table:style-name="Table_5f_1.A1" office:value-type="string">
            <text:p text:style-name="P9">15</text:p>
          </table:table-cell>
          <table:table-cell table:style-name="Table_5f_1.A1" office:value-type="string">
            <text:p text:style-name="P9">200</text:p>
          </table:table-cell>
          <table:table-cell table:style-name="Table_5f_1.A1" office:value-type="string">
            <text:p text:style-name="P9">2</text:p>
          </table:table-cell>
          <table:table-cell table:style-name="Table_5f_1.F2" office:value-type="string">
            <text:p text:style-name="P8">Норма</text:p>
          </table:table-cell>
        </table:table-row>
        <table:table-row>
          <table:table-cell table:style-name="Table_5f_1.A1" office:value-type="string">
            <text:p text:style-name="P9">2</text:p>
          </table:table-cell>
          <table:table-cell table:style-name="Table_5f_1.B2" office:value-type="string">
            <text:p text:style-name="P8">Подбор комплектующих</text:p>
          </table:table-cell>
          <table:table-cell table:style-name="Table_5f_1.A1" office:value-type="string">
            <text:p text:style-name="P9">45</text:p>
          </table:table-cell>
          <table:table-cell table:style-name="Table_5f_1.A1" office:value-type="string">
            <text:p text:style-name="P9">500</text:p>
          </table:table-cell>
          <table:table-cell table:style-name="Table_5f_1.A1" office:value-type="string">
            <text:p text:style-name="P9">8</text:p>
          </table:table-cell>
          <table:table-cell table:style-name="Table_5f_1.F3" office:value-type="string">
            <text:p text:style-name="P8">Внимание</text:p>
          </table:table-cell>
        </table:table-row>
        <table:table-row>
          <table:table-cell table:style-name="Table_5f_1.A1" office:value-type="string">
            <text:p text:style-name="P9">3</text:p>
          </table:table-cell>
          <table:table-cell table:style-name="Table_5f_1.B2" office:value-type="string">
            <text:p text:style-name="P8">Сборка компьютера</text:p>
          </table:table-cell>
          <table:table-cell table:style-name="Table_5f_1.A1" office:value-type="string">
            <text:p text:style-name="P9">120</text:p>
          </table:table-cell>
          <table:table-cell table:style-name="Table_5f_1.A1" office:value-type="string">
            <text:p text:style-name="P9">3 000</text:p>
          </table:table-cell>
          <table:table-cell table:style-name="Table_5f_1.A1" office:value-type="string">
            <text:p text:style-name="P9">5</text:p>
          </table:table-cell>
          <table:table-cell table:style-name="Table_5f_1.F4" office:value-type="string">
            <text:p text:style-name="P8">Внимание</text:p>
          </table:table-cell>
        </table:table-row>
        <table:table-row>
          <table:table-cell table:style-name="Table_5f_1.A1" office:value-type="string">
            <text:p text:style-name="P9">4</text:p>
          </table:table-cell>
          <table:table-cell table:style-name="Table_5f_1.B2" office:value-type="string">
            <text:p text:style-name="P8">Тестирование</text:p>
          </table:table-cell>
          <table:table-cell table:style-name="Table_5f_1.A1" office:value-type="string">
            <text:p text:style-name="P9">60</text:p>
          </table:table-cell>
          <table:table-cell table:style-name="Table_5f_1.A1" office:value-type="string">
            <text:p text:style-name="P9">800</text:p>
          </table:table-cell>
          <table:table-cell table:style-name="Table_5f_1.A1" office:value-type="string">
            <text:p text:style-name="P9">3</text:p>
          </table:table-cell>
          <table:table-cell table:style-name="Table_5f_1.F5" office:value-type="string">
            <text:p text:style-name="P8">Норма</text:p>
          </table:table-cell>
        </table:table-row>
        <table:table-row>
          <table:table-cell table:style-name="Table_5f_1.A1" office:value-type="string">
            <text:p text:style-name="P9">5</text:p>
          </table:table-cell>
          <table:table-cell table:style-name="Table_5f_1.B2" office:value-type="string">
            <text:p text:style-name="P8">Диагностика дефектов</text:p>
          </table:table-cell>
          <table:table-cell table:style-name="Table_5f_1.A1" office:value-type="string">
            <text:p text:style-name="P9">90</text:p>
          </table:table-cell>
          <table:table-cell table:style-name="Table_5f_1.A1" office:value-type="string">
            <text:p text:style-name="P9">1 500</text:p>
          </table:table-cell>
          <table:table-cell table:style-name="Table_5f_1.A1" office:value-type="string">
            <text:p text:style-name="P9">15</text:p>
          </table:table-cell>
          <table:table-cell table:style-name="Table_5f_1.F6" office:value-type="string">
            <text:p text:style-name="P8">Критично</text:p>
          </table:table-cell>
        </table:table-row>
        <table:table-row>
          <table:table-cell table:style-name="Table_5f_1.A1" office:value-type="string">
            <text:p text:style-name="P9">6</text:p>
          </table:table-cell>
          <table:table-cell table:style-name="Table_5f_1.B2" office:value-type="string">
            <text:p text:style-name="P8">Упаковка и отгрузка</text:p>
          </table:table-cell>
          <table:table-cell table:style-name="Table_5f_1.A1" office:value-type="string">
            <text:p text:style-name="P9">30</text:p>
          </table:table-cell>
          <table:table-cell table:style-name="Table_5f_1.A1" office:value-type="string">
            <text:p text:style-name="P9">400</text:p>
          </table:table-cell>
          <table:table-cell table:style-name="Table_5f_1.A1" office:value-type="string">
            <text:p text:style-name="P9">4</text:p>
          </table:table-cell>
          <table:table-cell table:style-name="Table_5f_1.F7" office:value-type="string">
            <text:p text:style-name="P8">Норма</text:p>
          </table:table-cell>
        </table:table-row>
        <table:table-row>
          <table:table-cell table:style-name="Table_5f_1.A1" office:value-type="string">
            <text:p text:style-name="P9">7</text:p>
          </table:table-cell>
          <table:table-cell table:style-name="Table_5f_1.B2" office:value-type="string">
            <text:p text:style-name="P8">Обработка возврата</text:p>
          </table:table-cell>
          <table:table-cell table:style-name="Table_5f_1.A1" office:value-type="string">
            <text:p text:style-name="P9">180</text:p>
          </table:table-cell>
          <table:table-cell table:style-name="Table_5f_1.A1" office:value-type="string">
            <text:p text:style-name="P9">2 500</text:p>
          </table:table-cell>
          <table:table-cell table:style-name="Table_5f_1.A1" office:value-type="string">
            <text:p text:style-name="P9">20</text:p>
          </table:table-cell>
          <table:table-cell table:style-name="Table_5f_1.F8" office:value-type="string">
            <text:p text:style-name="P8">Критично</text:p>
          </table:table-cell>
        </table:table-row>
      </table:table>
      <text:p text:style-name="P6"/>
      <text:p text:style-name="P6">Цветовое кодирование статусов:</text:p>
      <text:p text:style-name="P7"><text:span text:style-name="T1">Норма (зелёный)</text:span> — показатели в пределах плана (ошибки ≤ 5%);</text:p>
      <text:p text:style-name="P7"><text:soft-page-break/><text:span text:style-name="T1">Внимание (жёлтый)</text:span> — показатели близки к пороговым значениям (ошибки 5–10%);</text:p>
      <text:p text:style-name="P7"><text:span text:style-name="T1">Критично (красный)</text:span> — показатели существенно превышают плановые значения (ошибки &gt; 10%).</text:p>
      <text:p text:style-name="P6">Логика ветвления процесса: после операции «Тестирование» расположен XOR-шлюз «Дефект?». При обнаружении дефекта (ветка «Да») поток направляется к операции «Диагностика дефектов», после чего следует петля на повторную сборку. При отсутствии дефекта (ветка «Нет») процесс переходит к операции «Упаковка и отгрузка».</text:p>
      <text:p text:style-name="P6"/>
      <text:p text:style-name="P1">5. Расчёт KPI (Этап 2)</text:p>
      <text:p text:style-name="P1">5.1. Время цикла (Cycle Time)</text:p>
      <text:p text:style-name="P6"><text:span text:style-name="T1">Формула:</text:span> Время цикла = Σ (время выполнения всех операций)</text:p>
      <text:p text:style-name="P2">Расчёт:</text:p>
      <text:p text:style-name="P6">Время цикла = 15 + 45 + 120 + 60 + 90 + 30 + 180 = <text:span text:style-name="T1">540 минут</text:span> (9 часов)</text:p>
      <text:p text:style-name="P6">Это полное время от приёма заказа до завершения обработки возврата при условии прохождения всех операций, включая диагностику дефектов.</text:p>
      <text:p text:style-name="P1">5.2. Пропускная способность (Throughput)</text:p>
      <text:p text:style-name="P6"><text:span text:style-name="T1">Формула:</text:span> Пропускная способность = Доступное время / Время цикла</text:p>
      <text:p text:style-name="P2">Расчёт:</text:p>
      <text:p text:style-name="P6">При 8-часовом рабочем дне (480 минут):</text:p>
      <text:p text:style-name="P6">Пропускная способность = 480 / 540 = <text:span text:style-name="T1">0,89 компьютера/день</text:span></text:p>
      <text:p text:style-name="P6">Это означает, что один рабочий поток не способен завершить полный цикл за одну смену, что указывает на необходимость параллелизации или сокращения времени отдельных операций.</text:p>
      <text:p text:style-name="P1">5.3. Коэффициент ошибок (Error Rate)</text:p>
      <text:p text:style-name="P6"><text:span text:style-name="T1">Формула:</text:span> Коэффициент ошибок = Σ (% ошибок по операциям) / N операций</text:p>
      <text:p text:style-name="P2">Расчёт:</text:p>
      <text:p text:style-name="P6">Коэффициент ошибок = (2 + 8 + 5 + 3 + 15 + 4 + 20) / 7 = 57 / 7 = <text:span text:style-name="T1">8,1%</text:span></text:p>
      <text:p text:style-name="P6">Критичные операции с наибольшей долей ошибок: «Обработка возврата» (20%) <text:soft-page-break/>и «Диагностика дефектов» (15%). Эти две операции требуют первоочередного внимания при оптимизации.</text:p>
      <text:p text:style-name="P1">5.4. Стоимость процесса (Process Cost)</text:p>
      <text:p text:style-name="P6"><text:span text:style-name="T1">Формула:</text:span> Стоимость процесса = Σ (стоимость всех операций)</text:p>
      <text:p text:style-name="P2">Расчёт:</text:p>
      <text:p text:style-name="P6">Стоимость = 200 + 500 + 3 000 + 800 + 1 500 + 400 + 2 500 = <text:span text:style-name="T1">8 900 руб.</text:span></text:p>
      <text:p text:style-name="P6">Плановая стоимость составляет 7 000 руб., отклонение — <text:span text:style-name="T1">+27% (критично)</text:span>. Наибольший вклад в стоимость вносят операции «Сборка компьютера» (3 000 руб.) и «Обработка возврата» (2 500 руб.).</text:p>
      <text:p text:style-name="P6"/>
      <text:p text:style-name="P1">6. Визуализация процесса с KPI-аннотациями (Этап 3)</text:p>
      <text:p text:style-name="P6">На странице «Процесс с KPI» диаграммы KPI_Анализ_Quill.drawio построена модель бизнес-процесса с аннотациями, содержащими значения KPI для каждой операции. Каждая операция снабжена информационным блоком с тремя показателями: время, стоимость и процент ошибок.</text:p>
      <text:p text:style-name="P11"><draw:frame draw:style-name="fr1" draw:name="Изображение1" text:anchor-type="char" svg:width="17cm" svg:height="8.982cm" draw:z-index="0"><draw:image xlink:href="Pictures/10000001000005FF0000032B33C12FAA.png" xlink:type="simple" xlink:show="embed" xlink:actuate="onLoad" draw:mime-type="image/png"/></draw:frame></text:p>
      <text:p text:style-name="P10">Рисунок 1. Модель процесса с KPI-аннотациями</text:p>
      <text:p text:style-name="P6">Цветовое кодирование операций позволяет визуально определить проблемные зоны:</text:p>
      <text:p text:style-name="P7"><text:soft-page-break/><text:span text:style-name="T1">Зелёный (норма):</text:span> «Приём заказа» (2%), «Тестирование» (3%), «Упаковка и отгрузка» (4%);</text:p>
      <text:p text:style-name="P7"><text:span text:style-name="T1">Жёлтый (внимание):</text:span> «Подбор комплектующих» (8%), «Сборка компьютера» (5%);</text:p>
      <text:p text:style-name="P7"><text:span text:style-name="T1">Красный (критично):</text:span> «Диагностика дефектов» (15%), «Обработка возврата» (20%).</text:p>
      <text:p text:style-name="P6">Итоговые показатели процесса, указанные на диаграмме: общее время — 540 мин, общая стоимость — 8 900 руб., количество критичных точек — 2, общая доля брака — 8%.</text:p>
      <text:p text:style-name="P6"/>
      <text:p text:style-name="P1">7. Дашборд контроллинга (Этап 4)</text:p>
      <text:p text:style-name="P6">На странице «Дашборд KPI» диаграммы построен аналитический дашборд, включающий таблицу сравнения плановых и фактических значений KPI, а также диаграмму Парето для анализа причин дефектов.</text:p>
      <text:p text:style-name="P11"><draw:frame draw:style-name="fr1" draw:name="Изображение2" text:anchor-type="char" svg:width="17cm" svg:height="10.121cm" draw:z-index="1"><draw:image xlink:href="Pictures/10000001000005FF000003920CFD0182.png" xlink:type="simple" xlink:show="embed" xlink:actuate="onLoad" draw:mime-type="image/png"/></draw:frame></text:p>
      <text:p text:style-name="P10">Рисунок 2. Дашборд контроллинга</text:p>
      <text:p text:style-name="P1"/>
      <text:p text:style-name="P1"/>
      <text:p text:style-name="P1"><text:soft-page-break/>7.1. Сравнение плановых и фактических значений KPI</text:p>
      <text:p text:style-name="P10">Таблица 2 — Сравнение плановых и фактических значений KPI</text:p>
      <table:table table:name="Table_2" table:style-name="Table_5f_2">
        <table:table-column table:style-name="Table_5f_2.A" table:number-columns-repeated="4"/>
        <table:table-column table:style-name="Table_5f_2.E"/>
        <table:table-row>
          <table:table-cell table:style-name="Table_5f_2.A1" office:value-type="string">
            <text:p text:style-name="P5">KPI</text:p>
          </table:table-cell>
          <table:table-cell table:style-name="Table_5f_2.A1" office:value-type="string">
            <text:p text:style-name="P5">План</text:p>
          </table:table-cell>
          <table:table-cell table:style-name="Table_5f_2.A1" office:value-type="string">
            <text:p text:style-name="P5">Факт</text:p>
          </table:table-cell>
          <table:table-cell table:style-name="Table_5f_2.A1" office:value-type="string">
            <text:p text:style-name="P5">Отклонение</text:p>
          </table:table-cell>
          <table:table-cell table:style-name="Table_5f_2.A1" office:value-type="string">
            <text:p text:style-name="P5">Статус</text:p>
          </table:table-cell>
        </table:table-row>
        <table:table-row>
          <table:table-cell table:style-name="Table_5f_2.A1" office:value-type="string">
            <text:p text:style-name="P8">Среднее время сборки</text:p>
          </table:table-cell>
          <table:table-cell table:style-name="Table_5f_2.B2" office:value-type="string">
            <text:p text:style-name="P9">100 мин</text:p>
          </table:table-cell>
          <table:table-cell table:style-name="Table_5f_2.B2" office:value-type="string">
            <text:p text:style-name="P9">120 мин</text:p>
          </table:table-cell>
          <table:table-cell table:style-name="Table_5f_2.B2" office:value-type="string">
            <text:p text:style-name="P9">+20%</text:p>
          </table:table-cell>
          <table:table-cell table:style-name="Table_5f_2.A1" office:value-type="string">
            <text:p text:style-name="P8">Превышение</text:p>
          </table:table-cell>
        </table:table-row>
        <table:table-row>
          <table:table-cell table:style-name="Table_5f_2.A1" office:value-type="string">
            <text:p text:style-name="P8">Стоимость на единицу</text:p>
          </table:table-cell>
          <table:table-cell table:style-name="Table_5f_2.B2" office:value-type="string">
            <text:p text:style-name="P9">7 000 руб.</text:p>
          </table:table-cell>
          <table:table-cell table:style-name="Table_5f_2.B2" office:value-type="string">
            <text:p text:style-name="P9">8 900 руб.</text:p>
          </table:table-cell>
          <table:table-cell table:style-name="Table_5f_2.B2" office:value-type="string">
            <text:p text:style-name="P9">+27%</text:p>
          </table:table-cell>
          <table:table-cell table:style-name="Table_5f_2.A1" office:value-type="string">
            <text:p text:style-name="P8">Критично</text:p>
          </table:table-cell>
        </table:table-row>
        <table:table-row>
          <table:table-cell table:style-name="Table_5f_2.A1" office:value-type="string">
            <text:p text:style-name="P8">Доля брака</text:p>
          </table:table-cell>
          <table:table-cell table:style-name="Table_5f_2.B2" office:value-type="string">
            <text:p text:style-name="P9">≤5%</text:p>
          </table:table-cell>
          <table:table-cell table:style-name="Table_5f_2.B2" office:value-type="string">
            <text:p text:style-name="P9">8%</text:p>
          </table:table-cell>
          <table:table-cell table:style-name="Table_5f_2.B2" office:value-type="string">
            <text:p text:style-name="P9">+3 п.п.</text:p>
          </table:table-cell>
          <table:table-cell table:style-name="Table_5f_2.A1" office:value-type="string">
            <text:p text:style-name="P8">Превышение</text:p>
          </table:table-cell>
        </table:table-row>
        <table:table-row>
          <table:table-cell table:style-name="Table_5f_2.A1" office:value-type="string">
            <text:p text:style-name="P8">Время обработки возврата</text:p>
          </table:table-cell>
          <table:table-cell table:style-name="Table_5f_2.B2" office:value-type="string">
            <text:p text:style-name="P9">≤120 мин</text:p>
          </table:table-cell>
          <table:table-cell table:style-name="Table_5f_2.B2" office:value-type="string">
            <text:p text:style-name="P9">180 мин</text:p>
          </table:table-cell>
          <table:table-cell table:style-name="Table_5f_2.B2" office:value-type="string">
            <text:p text:style-name="P9">+50%</text:p>
          </table:table-cell>
          <table:table-cell table:style-name="Table_5f_2.A1" office:value-type="string">
            <text:p text:style-name="P8">Критично</text:p>
          </table:table-cell>
        </table:table-row>
        <table:table-row>
          <table:table-cell table:style-name="Table_5f_2.A1" office:value-type="string">
            <text:p text:style-name="P8">Удовлетворённость клиентов</text:p>
          </table:table-cell>
          <table:table-cell table:style-name="Table_5f_2.B2" office:value-type="string">
            <text:p text:style-name="P9">≥4,5</text:p>
          </table:table-cell>
          <table:table-cell table:style-name="Table_5f_2.B2" office:value-type="string">
            <text:p text:style-name="P9">3,8</text:p>
          </table:table-cell>
          <table:table-cell table:style-name="Table_5f_2.B2" office:value-type="string">
            <text:p text:style-name="P9">−0,7</text:p>
          </table:table-cell>
          <table:table-cell table:style-name="Table_5f_2.A1" office:value-type="string">
            <text:p text:style-name="P8">Ниже нормы</text:p>
          </table:table-cell>
        </table:table-row>
      </table:table>
      <text:p text:style-name="P6"/>
      <text:p text:style-name="P6">Из пяти ключевых показателей ни один не соответствует плановым значениям. Два показателя имеют статус «Критично»: стоимость на единицу (+27%) и время обработки возврата (+50%). Это указывает на системные проблемы в процессе.</text:p>
      <text:p text:style-name="P2">Сводка статусов KPI:</text:p>
      <text:p text:style-name="P7">Стоимость: 8 900 руб. / план 7 000 руб. — Критично +27%;</text:p>
      <text:p text:style-name="P7">Время сборки: 120 мин / план 100 мин — Превышение +20%;</text:p>
      <text:p text:style-name="P7">Доля брака: 8% / план ≤5% — Превышение +3 п.п.;</text:p>
      <text:p text:style-name="P7">Время возврата: 180 мин / план ≤120 мин — Критично +50%;</text:p>
      <text:p text:style-name="P7">Удовлетворённость: 3,8 / план ≥4,5 — Ниже нормы −0,7.</text:p>
      <text:p text:style-name="P1">7.2. Диаграмма Парето — причины дефектов</text:p>
      <text:p text:style-name="P6">Для определения приоритетов в устранении дефектов построена диаграмма Парето. Распределение причин дефектов представлено в таблице 3.</text:p>
      <text:p text:style-name="P10"/>
      <text:p text:style-name="P10"/>
      <text:p text:style-name="P10"/>
      <text:p text:style-name="P10"/>
      <text:p text:style-name="P10"><text:soft-page-break/>Таблица 3 — Причины дефектов (диаграмма Парето)</text:p>
      <table:table table:name="Table_3" table:style-name="Table_5f_3">
        <table:table-column table:style-name="Table_5f_3.A"/>
        <table:table-column table:style-name="Table_5f_3.B"/>
        <table:table-column table:style-name="Table_5f_3.C"/>
        <table:table-column table:style-name="Table_5f_3.D"/>
        <table:table-row>
          <table:table-cell table:style-name="Table_5f_3.A1" office:value-type="string">
            <text:p text:style-name="P5">№</text:p>
          </table:table-cell>
          <table:table-cell table:style-name="Table_5f_3.A1" office:value-type="string">
            <text:p text:style-name="P5">Причина дефекта</text:p>
          </table:table-cell>
          <table:table-cell table:style-name="Table_5f_3.A1" office:value-type="string">
            <text:p text:style-name="P5">Доля, %</text:p>
          </table:table-cell>
          <table:table-cell table:style-name="Table_5f_3.A1" office:value-type="string">
            <text:p text:style-name="P5">Накопленная доля, %</text:p>
          </table:table-cell>
        </table:table-row>
        <table:table-row>
          <table:table-cell table:style-name="Table_5f_3.A1" office:value-type="string">
            <text:p text:style-name="P9">1</text:p>
          </table:table-cell>
          <table:table-cell table:style-name="Table_5f_3.B2" office:value-type="string">
            <text:p text:style-name="P8">Неисправные комплектующие</text:p>
          </table:table-cell>
          <table:table-cell table:style-name="Table_5f_3.A1" office:value-type="string">
            <text:p text:style-name="P9">35</text:p>
          </table:table-cell>
          <table:table-cell table:style-name="Table_5f_3.A1" office:value-type="string">
            <text:p text:style-name="P9">35</text:p>
          </table:table-cell>
        </table:table-row>
        <table:table-row>
          <table:table-cell table:style-name="Table_5f_3.A1" office:value-type="string">
            <text:p text:style-name="P9">2</text:p>
          </table:table-cell>
          <table:table-cell table:style-name="Table_5f_3.B2" office:value-type="string">
            <text:p text:style-name="P8">Ошибки сборки</text:p>
          </table:table-cell>
          <table:table-cell table:style-name="Table_5f_3.A1" office:value-type="string">
            <text:p text:style-name="P9">25</text:p>
          </table:table-cell>
          <table:table-cell table:style-name="Table_5f_3.A1" office:value-type="string">
            <text:p text:style-name="P9">60</text:p>
          </table:table-cell>
        </table:table-row>
        <table:table-row>
          <table:table-cell table:style-name="Table_5f_3.A1" office:value-type="string">
            <text:p text:style-name="P9">3</text:p>
          </table:table-cell>
          <table:table-cell table:style-name="Table_5f_3.B2" office:value-type="string">
            <text:p text:style-name="P8">Программные сбои</text:p>
          </table:table-cell>
          <table:table-cell table:style-name="Table_5f_3.A1" office:value-type="string">
            <text:p text:style-name="P9">18</text:p>
          </table:table-cell>
          <table:table-cell table:style-name="Table_5f_3.A1" office:value-type="string">
            <text:p text:style-name="P9">78</text:p>
          </table:table-cell>
        </table:table-row>
        <table:table-row>
          <table:table-cell table:style-name="Table_5f_3.A1" office:value-type="string">
            <text:p text:style-name="P9">4</text:p>
          </table:table-cell>
          <table:table-cell table:style-name="Table_5f_3.B2" office:value-type="string">
            <text:p text:style-name="P8">Повреждения при транспортировке</text:p>
          </table:table-cell>
          <table:table-cell table:style-name="Table_5f_3.A1" office:value-type="string">
            <text:p text:style-name="P9">12</text:p>
          </table:table-cell>
          <table:table-cell table:style-name="Table_5f_3.A1" office:value-type="string">
            <text:p text:style-name="P9">90</text:p>
          </table:table-cell>
        </table:table-row>
        <table:table-row>
          <table:table-cell table:style-name="Table_5f_3.A1" office:value-type="string">
            <text:p text:style-name="P9">5</text:p>
          </table:table-cell>
          <table:table-cell table:style-name="Table_5f_3.B2" office:value-type="string">
            <text:p text:style-name="P8">Некорректная диагностика</text:p>
          </table:table-cell>
          <table:table-cell table:style-name="Table_5f_3.A1" office:value-type="string">
            <text:p text:style-name="P9">7</text:p>
          </table:table-cell>
          <table:table-cell table:style-name="Table_5f_3.A1" office:value-type="string">
            <text:p text:style-name="P9">97</text:p>
          </table:table-cell>
        </table:table-row>
        <table:table-row>
          <table:table-cell table:style-name="Table_5f_3.A1" office:value-type="string">
            <text:p text:style-name="P9">6</text:p>
          </table:table-cell>
          <table:table-cell table:style-name="Table_5f_3.B2" office:value-type="string">
            <text:p text:style-name="P8">Прочее</text:p>
          </table:table-cell>
          <table:table-cell table:style-name="Table_5f_3.A1" office:value-type="string">
            <text:p text:style-name="P9">3</text:p>
          </table:table-cell>
          <table:table-cell table:style-name="Table_5f_3.A1" office:value-type="string">
            <text:p text:style-name="P9">100</text:p>
          </table:table-cell>
        </table:table-row>
      </table:table>
      <text:p text:style-name="P6"/>
      <text:p text:style-name="P6"><text:span text:style-name="T1">Вывод по Парето:</text:span> три основные причины (неисправные комплектующие, ошибки сборки и программные сбои) охватывают 78% всех дефектов. Согласно правилу Парето (80/20), устранение этих трёх причин позволит значительно сократить общий уровень брака.</text:p>
      <text:p text:style-name="P6"/>
      <text:p text:style-name="P1">8. Интерпретация результатов</text:p>
      <text:p text:style-name="P1">8.1. Анализ текущего состояния процесса</text:p>
      <text:p text:style-name="P6">Процесс «Сборка и тестирование компьютеров» характеризуется следующими проблемами:</text:p>
      <text:p text:style-name="P7">Время цикла (540 мин) превышает длительность одной рабочей смены (480 мин), что делает невозможным полный цикл обработки за один день;</text:p>
      <text:p text:style-name="P7">Стоимость на единицу (8 900 руб.) превышает план на 27%;</text:p>
      <text:p text:style-name="P7">Средний коэффициент ошибок (8,1%) существенно выше целевого значения (≤5%);</text:p>
      <text:p text:style-name="P7">Ни один из пяти контролируемых KPI не соответствует плановым значениям.</text:p>
      <text:p text:style-name="P1">8.2. Определение узких мест</text:p>
      <text:p text:style-name="P6">Выявлены два критичных узких места:</text:p>
      <text:p text:style-name="P7"><text:span text:style-name="T1">Обработка возврата</text:span> — 180 мин при плане ≤120 мин (+50%), стоимость 2 500 руб., процент ошибок 20%. Является наиболее длительной и дорогой операцией с наихудшим показателем качества.</text:p>
      <text:p text:style-name="P7"><text:soft-page-break/><text:span text:style-name="T1">Диагностика дефектов</text:span> — 90 мин, стоимость 1 500 руб., процент ошибок 15%. Высокая доля ошибок свидетельствует о недостаточной квалификации персонала или отсутствии стандартизованных процедур диагностики.</text:p>
      <text:p text:style-name="P1">8.3. Оценка операций, добавляющих и не добавляющих стоимость</text:p>
      <table:table table:name="Table_4" table:style-name="Table_5f_4">
        <table:table-column table:style-name="Table_5f_4.A"/>
        <table:table-column table:style-name="Table_5f_4.B"/>
        <table:table-column table:style-name="Table_5f_4.C"/>
        <table:table-column table:style-name="Table_5f_4.D"/>
        <table:table-column table:style-name="Table_5f_4.E"/>
        <table:table-row>
          <table:table-cell table:style-name="Table_5f_4.A1" office:value-type="string">
            <text:p text:style-name="P5">Тип операции</text:p>
          </table:table-cell>
          <table:table-cell table:style-name="Table_5f_4.A1" office:value-type="string">
            <text:p text:style-name="P5">Операции</text:p>
          </table:table-cell>
          <table:table-cell table:style-name="Table_5f_4.A1" office:value-type="string">
            <text:p text:style-name="P5">Время, мин</text:p>
          </table:table-cell>
          <table:table-cell table:style-name="Table_5f_4.A1" office:value-type="string">
            <text:p text:style-name="P5">Стоимость, руб.</text:p>
          </table:table-cell>
          <table:table-cell table:style-name="Table_5f_4.A1" office:value-type="string">
            <text:p text:style-name="P5">Доля в стоимости</text:p>
          </table:table-cell>
        </table:table-row>
        <table:table-row>
          <table:table-cell table:style-name="Table_5f_4.A2" office:value-type="string">
            <text:p text:style-name="P8">Добавляющие стоимость (VA)</text:p>
          </table:table-cell>
          <table:table-cell table:style-name="Table_5f_4.B2" office:value-type="string">
            <text:p text:style-name="P8">Приём заказа, Подбор комплектующих, Сборка, Тестирование, Упаковка</text:p>
          </table:table-cell>
          <table:table-cell table:style-name="Table_5f_4.A1" office:value-type="string">
            <text:p text:style-name="P9">270</text:p>
          </table:table-cell>
          <table:table-cell table:style-name="Table_5f_4.A1" office:value-type="string">
            <text:p text:style-name="P9">4 900</text:p>
          </table:table-cell>
          <table:table-cell table:style-name="Table_5f_4.A1" office:value-type="string">
            <text:p text:style-name="P9">55%</text:p>
          </table:table-cell>
        </table:table-row>
        <table:table-row>
          <table:table-cell table:style-name="Table_5f_4.A2" office:value-type="string">
            <text:p text:style-name="P8">Не добавляющие стоимость (NVA)</text:p>
          </table:table-cell>
          <table:table-cell table:style-name="Table_5f_4.B2" office:value-type="string">
            <text:p text:style-name="P8">Диагностика дефектов, Обработка возврата</text:p>
          </table:table-cell>
          <table:table-cell table:style-name="Table_5f_4.A1" office:value-type="string">
            <text:p text:style-name="P9">270</text:p>
          </table:table-cell>
          <table:table-cell table:style-name="Table_5f_4.A1" office:value-type="string">
            <text:p text:style-name="P9">4 000</text:p>
          </table:table-cell>
          <table:table-cell table:style-name="Table_5f_4.A1" office:value-type="string">
            <text:p text:style-name="P9">45%</text:p>
          </table:table-cell>
        </table:table-row>
      </table:table>
      <text:p text:style-name="P6"/>
      <text:p text:style-name="P6">Операции «Диагностика дефектов» и «Обработка возврата» не создают ценности для клиента — они существуют только из-за дефектов на предыдущих этапах. Их суммарная стоимость составляет 4 000 руб. из 8 900 руб. (45% от общей стоимости процесса).</text:p>
      <text:p text:style-name="P6"/>
      <text:p text:style-name="P1">9. Рекомендации по оптимизации (Этап 5)</text:p>
      <text:p text:style-name="P1">9.1. Внедрить входной контроль комплектующих</text:p>
      <text:p text:style-name="P6"><text:span text:style-name="T1">Проблема:</text:span> Неисправные комплектующие являются причиной 35% дефектов.</text:p>
      <text:p text:style-name="P6"><text:span text:style-name="T1">Решение:</text:span> Введение обязательной проверки при поступлении комплектующих на склад.</text:p>
      <text:p text:style-name="P6"><text:span text:style-name="T1">Ожидаемый эффект:</text:span> Снижение доли брака примерно на 35%. Сокращение нагрузки на операцию «Диагностика дефектов» (15% ошибок) и уменьшение количества повторных сборок.</text:p>
      <text:p text:style-name="P1">9.2. Стандартизировать процесс сборки</text:p>
      <text:p text:style-name="P6"><text:span text:style-name="T1">Проблема:</text:span> Ошибки сборки составляют 25% дефектов.</text:p>
      <text:p text:style-name="P6"><text:span text:style-name="T1">Решение:</text:span> Разработка и внедрение чек-листов для каждого этапа сборки.</text:p>
      <text:p text:style-name="P6"><text:span text:style-name="T1">Ожидаемый эффект:</text:span> Снижение количества ошибок на 40–50%. Положительное влияние на стоимость операции «Сборка компьютера» (3 000 <text:soft-page-break/>руб. — наиболее дорогая операция).</text:p>
      <text:p text:style-name="P1">9.3. Оптимизировать процесс обработки возврата</text:p>
      <text:p text:style-name="P6"><text:span text:style-name="T1">Проблема:</text:span> Текущее время обработки возврата составляет 180 мин при плане ≤120 мин (отклонение +50%).</text:p>
      <text:p text:style-name="P6"><text:span text:style-name="T1">Решение:</text:span> Сокращение времени до 90 мин за счёт автоматизации документооборота и упрощения процедуры диагностики возвращённых изделий.</text:p>
      <text:p text:style-name="P6"><text:span text:style-name="T1">Ожидаемый эффект:</text:span> Снижение времени цикла с 540 до 450 мин, увеличение пропускной способности с 0,89 до 1,07 компьютера/день.</text:p>
      <text:p text:style-name="P1">9.4. Повысить квалификацию сборщиков</text:p>
      <text:p text:style-name="P6"><text:span text:style-name="T1">Проблема:</text:span> Высокий процент ошибок на операциях «Подбор комплектующих» (8%) и «Сборка компьютера» (5%).</text:p>
      <text:p text:style-name="P6"><text:span text:style-name="T1">Решение:</text:span> Проведение обучения сборщиков раз в квартал.</text:p>
      <text:p text:style-name="P6"><text:span text:style-name="T1">Ожидаемый эффект:</text:span> Снижение процента ошибок на указанных операциях, повышение удовлетворённости клиентов с текущего уровня 3,8 до планового 4,5 и выше.</text:p>
      <text:p text:style-name="P1">9.5. Сводная таблица ожидаемых улучшений</text:p>
      <table:table table:name="Table_5" table:style-name="Table_5f_5">
        <table:table-column table:style-name="Table_5f_5.A" table:number-columns-repeated="3"/>
        <table:table-column table:style-name="Table_5f_5.D"/>
        <table:table-row>
          <table:table-cell table:style-name="Table_5f_5.A1" office:value-type="string">
            <text:p text:style-name="P5">KPI</text:p>
          </table:table-cell>
          <table:table-cell table:style-name="Table_5f_5.A1" office:value-type="string">
            <text:p text:style-name="P5">Текущее значение</text:p>
          </table:table-cell>
          <table:table-cell table:style-name="Table_5f_5.A1" office:value-type="string">
            <text:p text:style-name="P5">Ожидаемое значение</text:p>
          </table:table-cell>
          <table:table-cell table:style-name="Table_5f_5.A1" office:value-type="string">
            <text:p text:style-name="P5">Улучшение</text:p>
          </table:table-cell>
        </table:table-row>
        <table:table-row>
          <table:table-cell table:style-name="Table_5f_5.A2" office:value-type="string">
            <text:p text:style-name="P8">Время цикла</text:p>
          </table:table-cell>
          <table:table-cell table:style-name="Table_5f_5.A1" office:value-type="string">
            <text:p text:style-name="P9">540 мин</text:p>
          </table:table-cell>
          <table:table-cell table:style-name="Table_5f_5.A1" office:value-type="string">
            <text:p text:style-name="P9">450 мин</text:p>
          </table:table-cell>
          <table:table-cell table:style-name="Table_5f_5.A1" office:value-type="string">
            <text:p text:style-name="P9">−17%</text:p>
          </table:table-cell>
        </table:table-row>
        <table:table-row>
          <table:table-cell table:style-name="Table_5f_5.A2" office:value-type="string">
            <text:p text:style-name="P8">Пропускная способность</text:p>
          </table:table-cell>
          <table:table-cell table:style-name="Table_5f_5.A1" office:value-type="string">
            <text:p text:style-name="P9">0,89 ед./день</text:p>
          </table:table-cell>
          <table:table-cell table:style-name="Table_5f_5.A1" office:value-type="string">
            <text:p text:style-name="P9">1,07 ед./день</text:p>
          </table:table-cell>
          <table:table-cell table:style-name="Table_5f_5.A1" office:value-type="string">
            <text:p text:style-name="P9">+20%</text:p>
          </table:table-cell>
        </table:table-row>
        <table:table-row>
          <table:table-cell table:style-name="Table_5f_5.A2" office:value-type="string">
            <text:p text:style-name="P8">Коэффициент ошибок</text:p>
          </table:table-cell>
          <table:table-cell table:style-name="Table_5f_5.A1" office:value-type="string">
            <text:p text:style-name="P9">8,1%</text:p>
          </table:table-cell>
          <table:table-cell table:style-name="Table_5f_5.A1" office:value-type="string">
            <text:p text:style-name="P9">≤5%</text:p>
          </table:table-cell>
          <table:table-cell table:style-name="Table_5f_5.A1" office:value-type="string">
            <text:p text:style-name="P9">−3,1 п.п.</text:p>
          </table:table-cell>
        </table:table-row>
        <table:table-row>
          <table:table-cell table:style-name="Table_5f_5.A2" office:value-type="string">
            <text:p text:style-name="P8">Стоимость процесса</text:p>
          </table:table-cell>
          <table:table-cell table:style-name="Table_5f_5.A1" office:value-type="string">
            <text:p text:style-name="P9">8 900 руб.</text:p>
          </table:table-cell>
          <table:table-cell table:style-name="Table_5f_5.A1" office:value-type="string">
            <text:p text:style-name="P9">≤7 000 руб.</text:p>
          </table:table-cell>
          <table:table-cell table:style-name="Table_5f_5.A1" office:value-type="string">
            <text:p text:style-name="P9">−21%</text:p>
          </table:table-cell>
        </table:table-row>
      </table:table>
      <text:p text:style-name="P6"/>
      <text:p text:style-name="P6"/>
      <text:p text:style-name="P6"/>
      <text:p text:style-name="P6"/>
      <text:p text:style-name="P1"><text:soft-page-break/>10. Ответы на контрольные вопросы</text:p>
      <text:p text:style-name="P2">1. В чём заключается разница между контроллингом и мониторингом?</text:p>
      <text:p text:style-name="P6">Мониторинг — это непрерывное наблюдение за текущими показателями процесса в режиме реального времени (сбор данных, визуализация, сигнализация отклонений). Контроллинг — более широкое понятие, включающее не только наблюдение, но и планирование целевых значений, анализ причин отклонений и выработку корректирующих мер. В нашем примере мониторинг — это отслеживание того, что стоимость на единицу составляет 8 900 руб. вместо плановых 7 000 руб. (+27%). Контроллинг — это анализ причин этого отклонения и разработка рекомендаций (входной контроль комплектующих, стандартизация сборки).</text:p>
      <text:p text:style-name="P2">2. Какие KPI вы выбрали и почему они релевантны для вашего процесса?</text:p>
      <text:p text:style-name="P6">Были выбраны четыре KPI: время цикла (540 мин), пропускная способность (0,89 компьютера/день), коэффициент ошибок (8,1%) и стоимость процесса (8 900 руб.). Время цикла характеризует скорость процесса; пропускная способность — его производительность; коэффициент ошибок — качество выполнения; стоимость — экономическую эффективность. Совокупность этих показателей даёт комплексную оценку процесса по четырём ключевым измерениям.</text:p>
      <text:p text:style-name="P2">3. Как определяется узкое место в процессе и почему оно критично?</text:p>
      <text:p text:style-name="P6">Узкое место (bottleneck) — это операция, которая ограничивает пропускную способность всего процесса. Определяется по наибольшему времени выполнения, наибольшей стоимости или наибольшему проценту ошибок. В нашем процессе узким местом является операция «Обработка возврата» — 180 мин при плане ≤120 мин (+50%), стоимость 2 500 руб., процент ошибок 20% (критично). Также проблемной является «Диагностика дефектов» — 90 мин, 1 500 руб., 15% ошибок.</text:p>
      <text:p text:style-name="P2">4. Что такое Value Stream Mapping и как его применить?</text:p>
      <text:p text:style-name="P6">Value Stream Mapping — методология визуализации потока создания ценности, позволяющая отобразить все этапы процесса (как добавляющие, так и не добавляющие ценность), потоки материалов и информации. VSM помогает выявить потери (muda): ожидание, лишние перемещения, дефекты. В контексте нашего процесса VSM показал бы, что операции «Диагностика дефектов» и «Обработка возврата» не добавляют ценности для клиента и являются следствием дефектов на предыдущих этапах.</text:p>
      <text:p text:style-name="P2"/>
      <text:p text:style-name="P2"><text:soft-page-break/>5. Как использование диаграммы Парето помогает в приоритизации улучшений?</text:p>
      <text:p text:style-name="P6">Диаграмма Парето визуализирует вклад каждой причины в общую проблему в порядке убывания. Правило 80/20 гласит: примерно 80% проблем вызваны 20% причин. В нашем анализе три причины (неисправные комплектующие — 35%, ошибки сборки — 25%, программные сбои — 18%) охватывают 78% всех дефектов. Это позволяет сконцентрировать ресурсы на устранении именно этих трёх причин вместо распыления усилий.</text:p>
      <text:p text:style-name="P2">6. Какова взаимосвязь между временем цикла и пропускной способностью?</text:p>
      <text:p text:style-name="P6">Время цикла и пропускная способность обратно пропорциональны: чем меньше время цикла, тем выше пропускная способность. Формула: пропускная способность = доступное время / время цикла. В нашем случае: 480 мин / 540 мин = 0,89 компьютера/день. Если сократить время цикла, например, за счёт оптимизации обработки возврата (с 180 до 90 мин), время цикла составит 450 мин, а пропускная способность вырастет до 480/450 = 1,07 компьютера/день.</text:p>
      <text:p text:style-name="P2">7. Как измеряется и анализируется коэффициент ошибок?</text:p>
      <text:p text:style-name="P6">Коэффициент ошибок измеряется как отношение числа дефектных единиц (или операций с ошибками) к общему числу обработанных единиц, выраженное в процентах. Может рассчитываться для каждой операции отдельно и для процесса в целом. В нашем процессе средний коэффициент ошибок: (2 + 8 + 5 + 3 + 15 + 4 + 20) / 7 = 8,1%. Наибольшие значения у операций «Обработка возврата» (20%) и «Диагностика дефектов» (15%), которые имеют статус «Критично» на KPI-диаграмме.</text:p>
      <text:p text:style-name="P2">8. Что означает операция «без добавленной стоимости» и как её выявить?</text:p>
      <text:p text:style-name="P6">Операция без добавленной стоимости (Non-Value-Added, NVA) — это действие, которое не увеличивает ценность продукта или услуги для конечного клиента. К NVA-операциям относятся исправление дефектов, ожидание, излишний контроль, перемещение. В нашем процессе типичными NVA-операциями являются «Диагностика дефектов» (90 мин, 1 500 руб.) и «Обработка возврата» (180 мин, 2 500 руб.) — они существуют только из-за дефектов и не создают ценности. Их суммарная стоимость — 4 000 руб. из 8 900 руб. (45% от общей стоимости процесса).</text:p>
      <text:p text:style-name="P2">9. Как часто должен проводиться мониторинг процесса?</text:p>
      <text:p text:style-name="P6">Частота мониторинга зависит от типа KPI и динамичности процесса. Оперативные показатели (время выполнения операций, количество ошибок) <text:soft-page-break/>следует мониторить ежедневно или в режиме реального времени. Тактические показатели (стоимость на единицу, пропускная способность) — еженедельно. Стратегические показатели (удовлетворённость клиентов, общая доля брака) — ежемесячно или ежеквартально. В нашем случае, учитывая критичные отклонения по стоимости (+27%) и времени возврата (+50%), рекомендуется проводить мониторинг этих показателей ежедневно до достижения плановых значений.</text:p>
      <text:p text:style-name="P6"/>
      <text:p text:style-name="P1">11. Заключение</text:p>
      <text:p text:style-name="P6">В ходе лабораторной работы был проведён комплексный анализ бизнес-процесса «Сборка и тестирование компьютеров» компании Quill. Процесс включает 7 операций с общим временем цикла 540 минут и стоимостью 8 900 руб. на единицу продукции.</text:p>
      <text:p text:style-name="P6">Анализ выявил две критичные точки: операцию «Диагностика дефектов» (15% ошибок, 1 500 руб.) и «Обработка возврата» (20% ошибок, 180 мин при плане 120 мин, 2 500 руб.). Ни один из пяти ключевых KPI не соответствует плановым значениям: стоимость превышает план на 27%, время обработки возврата — на 50%, удовлетворённость клиентов ниже нормы на 0,7 балла.</text:p>
      <text:p text:style-name="P6">С помощью диаграммы Парето установлено, что три основные причины (неисправные комплектующие — 35%, ошибки сборки — 25%, программные сбои — 18%) охватывают 78% дефектов. Сформулированы четыре рекомендации по оптимизации: входной контроль комплектующих, стандартизация сборки, оптимизация процесса возврата и регулярное повышение квалификации сборщиков.</text:p>
      <text:p text:style-name="P6">Полученные результаты оформлены в виде диаграммы процесса с KPI-аннотациями и аналитического дашборда (файл KPI_Анализ_Quill.drawio), что обеспечивает наглядность и удобство для принятия управленческих решений.</text:p>
      <text:p text:style-name="P6">Проведённый анализ подтверждает необходимость оптимизации процесса: при реализации предложенных мероприятий ожидается сокращение времени цикла на 17%, снижение стоимости на 21%, повышение пропускной способности на 20% и достижение целевого уровня доли брака (≤5%).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6T21:04:49.705000000</dc:date>
    <meta:editing-duration>PT16M6S</meta:editing-duration>
    <meta:editing-cycles>8</meta:editing-cycles>
    <meta:document-statistic meta:table-count="6" meta:image-count="2" meta:object-count="0" meta:page-count="14" meta:paragraph-count="316" meta:word-count="2626" meta:character-count="19542" meta:non-whitespace-character-count="17181"/>
  </office:meta>
</office:document-meta>
</file>