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8000004CFFCA6C705.png" manifest:media-type="image/png"/>
  <manifest:file-entry manifest:full-path="Pictures/10000001000004B40000066CF62D512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" style:family="table">
      <style:table-properties style:width="17cm" table:align="margins"/>
    </style:style>
    <style:style style:name="Table.A" style:family="table-column">
      <style:table-column-properties style:column-width="4.249cm" style:rel-column-width="16383*"/>
    </style:style>
    <style:style style:name="Table.D" style:family="table-column">
      <style:table-column-properties style:column-width="4.251cm" style:rel-column-width="16386*"/>
    </style:style>
    <style:style style:name="Table.A1" style:family="table-cell">
      <style:table-cell-properties fo:padding="0.101cm" fo:border="none"/>
    </style:style>
    <style:style style:name="Table_5f_1" style:display-name="Table_1" style:family="table">
      <style:table-properties style:width="17cm" table:align="margins"/>
    </style:style>
    <style:style style:name="Table_5f_1.A" style:display-name="Table_1.A" style:family="table-column">
      <style:table-column-properties style:column-width="8.5cm" style:rel-column-width="32767*"/>
    </style:style>
    <style:style style:name="Table_5f_1.B" style:display-name="Table_1.B" style:family="table-column">
      <style:table-column-properties style:column-width="8.5cm" style:rel-column-width="32768*"/>
    </style:style>
    <style:style style:name="Table_5f_1.A1" style:display-name="Table_1.A1" style:family="table-cell">
      <style:table-cell-properties fo:padding="0.101cm" fo:border="none"/>
    </style:style>
    <style:style style:name="Table_5f_2" style:display-name="Table_2" style:family="table">
      <style:table-properties style:width="17cm" table:align="margins"/>
    </style:style>
    <style:style style:name="Table_5f_2.A" style:display-name="Table_2.A" style:family="table-column">
      <style:table-column-properties style:column-width="3.399cm" style:rel-column-width="13106*"/>
    </style:style>
    <style:style style:name="Table_5f_2.E" style:display-name="Table_2.E" style:family="table-column">
      <style:table-column-properties style:column-width="3.401cm" style:rel-column-width="13111*"/>
    </style:style>
    <style:style style:name="Table_5f_2.A1" style:display-name="Table_2.A1" style:family="table-cell">
      <style:table-cell-properties style:vertical-align="middle" fo:padding="0.101cm" fo:border="none"/>
    </style:style>
    <style:style style:name="Table_5f_2.A2" style:display-name="Table_2.A2" style:family="table-cell">
      <style:table-cell-properties fo:padding="0.101cm" fo:border="none"/>
    </style:style>
    <style:style style:name="Table_5f_2.B2" style:display-name="Table_2.B2" style:family="table-cell">
      <style:table-cell-properties fo:padding="0.101cm" fo:border="none"/>
    </style:style>
    <style:style style:name="Table_5f_2.C2" style:display-name="Table_2.C2" style:family="table-cell">
      <style:table-cell-properties fo:padding="0.101cm" fo:border="none"/>
    </style:style>
    <style:style style:name="Table_5f_2.D2" style:display-name="Table_2.D2" style:family="table-cell">
      <style:table-cell-properties fo:padding="0.101cm" fo:border="none"/>
    </style:style>
    <style:style style:name="Table_5f_2.E2" style:display-name="Table_2.E2" style:family="table-cell">
      <style:table-cell-properties fo:padding="0.101cm" fo:border="none"/>
    </style:style>
    <style:style style:name="Table_5f_2.A3" style:display-name="Table_2.A3" style:family="table-cell">
      <style:table-cell-properties fo:padding="0.101cm" fo:border="none"/>
    </style:style>
    <style:style style:name="Table_5f_2.B3" style:display-name="Table_2.B3" style:family="table-cell">
      <style:table-cell-properties fo:padding="0.101cm" fo:border="none"/>
    </style:style>
    <style:style style:name="Table_5f_2.C3" style:display-name="Table_2.C3" style:family="table-cell">
      <style:table-cell-properties fo:padding="0.101cm" fo:border="none"/>
    </style:style>
    <style:style style:name="Table_5f_2.D3" style:display-name="Table_2.D3" style:family="table-cell">
      <style:table-cell-properties fo:padding="0.101cm" fo:border="none"/>
    </style:style>
    <style:style style:name="Table_5f_2.E3" style:display-name="Table_2.E3" style:family="table-cell">
      <style:table-cell-properties fo:padding="0.101cm" fo:border="none"/>
    </style:style>
    <style:style style:name="Table_5f_2.A4" style:display-name="Table_2.A4" style:family="table-cell">
      <style:table-cell-properties fo:padding="0.101cm" fo:border="none"/>
    </style:style>
    <style:style style:name="Table_5f_2.B4" style:display-name="Table_2.B4" style:family="table-cell">
      <style:table-cell-properties fo:padding="0.101cm" fo:border="none"/>
    </style:style>
    <style:style style:name="Table_5f_2.C4" style:display-name="Table_2.C4" style:family="table-cell">
      <style:table-cell-properties fo:padding="0.101cm" fo:border="none"/>
    </style:style>
    <style:style style:name="Table_5f_2.D4" style:display-name="Table_2.D4" style:family="table-cell">
      <style:table-cell-properties fo:padding="0.101cm" fo:border="none"/>
    </style:style>
    <style:style style:name="Table_5f_2.E4" style:display-name="Table_2.E4" style:family="table-cell">
      <style:table-cell-properties fo:padding="0.101cm" fo:border="none"/>
    </style:style>
    <style:style style:name="Table_5f_2.A5" style:display-name="Table_2.A5" style:family="table-cell">
      <style:table-cell-properties fo:padding="0.101cm" fo:border="none"/>
    </style:style>
    <style:style style:name="Table_5f_2.B5" style:display-name="Table_2.B5" style:family="table-cell">
      <style:table-cell-properties fo:padding="0.101cm" fo:border="none"/>
    </style:style>
    <style:style style:name="Table_5f_2.C5" style:display-name="Table_2.C5" style:family="table-cell">
      <style:table-cell-properties fo:padding="0.101cm" fo:border="none"/>
    </style:style>
    <style:style style:name="Table_5f_2.D5" style:display-name="Table_2.D5" style:family="table-cell">
      <style:table-cell-properties fo:padding="0.101cm" fo:border="none"/>
    </style:style>
    <style:style style:name="Table_5f_2.E5" style:display-name="Table_2.E5" style:family="table-cell">
      <style:table-cell-properties fo:padding="0.101cm" fo:border="none"/>
    </style:style>
    <style:style style:name="Table_5f_2.A6" style:display-name="Table_2.A6" style:family="table-cell">
      <style:table-cell-properties fo:padding="0.101cm" fo:border="none"/>
    </style:style>
    <style:style style:name="Table_5f_2.B6" style:display-name="Table_2.B6" style:family="table-cell">
      <style:table-cell-properties fo:padding="0.101cm" fo:border="none"/>
    </style:style>
    <style:style style:name="Table_5f_2.C6" style:display-name="Table_2.C6" style:family="table-cell">
      <style:table-cell-properties fo:padding="0.101cm" fo:border="none"/>
    </style:style>
    <style:style style:name="Table_5f_2.D6" style:display-name="Table_2.D6" style:family="table-cell">
      <style:table-cell-properties fo:padding="0.101cm" fo:border="none"/>
    </style:style>
    <style:style style:name="Table_5f_2.E6" style:display-name="Table_2.E6" style:family="table-cell">
      <style:table-cell-properties fo:padding="0.101cm" fo:border="none"/>
    </style:style>
    <style:style style:name="Table_5f_2.A7" style:display-name="Table_2.A7" style:family="table-cell">
      <style:table-cell-properties fo:padding="0.101cm" fo:border="none"/>
    </style:style>
    <style:style style:name="Table_5f_2.B7" style:display-name="Table_2.B7" style:family="table-cell">
      <style:table-cell-properties fo:padding="0.101cm" fo:border="none"/>
    </style:style>
    <style:style style:name="Table_5f_2.C7" style:display-name="Table_2.C7" style:family="table-cell">
      <style:table-cell-properties fo:padding="0.101cm" fo:border="none"/>
    </style:style>
    <style:style style:name="Table_5f_2.D7" style:display-name="Table_2.D7" style:family="table-cell">
      <style:table-cell-properties fo:padding="0.101cm" fo:border="none"/>
    </style:style>
    <style:style style:name="Table_5f_2.E7" style:display-name="Table_2.E7" style:family="table-cell">
      <style:table-cell-properties fo:padding="0.101cm" fo:border="none"/>
    </style:style>
    <style:style style:name="Table_5f_2.A8" style:display-name="Table_2.A8" style:family="table-cell">
      <style:table-cell-properties fo:padding="0.101cm" fo:border="none"/>
    </style:style>
    <style:style style:name="Table_5f_2.B8" style:display-name="Table_2.B8" style:family="table-cell">
      <style:table-cell-properties fo:padding="0.101cm" fo:border="none"/>
    </style:style>
    <style:style style:name="Table_5f_2.C8" style:display-name="Table_2.C8" style:family="table-cell">
      <style:table-cell-properties fo:padding="0.101cm" fo:border="none"/>
    </style:style>
    <style:style style:name="Table_5f_2.D8" style:display-name="Table_2.D8" style:family="table-cell">
      <style:table-cell-properties fo:padding="0.101cm" fo:border="none"/>
    </style:style>
    <style:style style:name="Table_5f_2.E8" style:display-name="Table_2.E8" style:family="table-cell">
      <style:table-cell-properties fo:padding="0.101cm" fo:border="none"/>
    </style:style>
    <style:style style:name="Table_5f_2.A9" style:display-name="Table_2.A9" style:family="table-cell">
      <style:table-cell-properties fo:padding="0.101cm" fo:border="none"/>
    </style:style>
    <style:style style:name="Table_5f_2.B9" style:display-name="Table_2.B9" style:family="table-cell">
      <style:table-cell-properties fo:padding="0.101cm" fo:border="none"/>
    </style:style>
    <style:style style:name="Table_5f_2.C9" style:display-name="Table_2.C9" style:family="table-cell">
      <style:table-cell-properties fo:padding="0.101cm" fo:border="none"/>
    </style:style>
    <style:style style:name="Table_5f_2.D9" style:display-name="Table_2.D9" style:family="table-cell">
      <style:table-cell-properties fo:padding="0.101cm" fo:border="none"/>
    </style:style>
    <style:style style:name="Table_5f_2.E9" style:display-name="Table_2.E9" style:family="table-cell">
      <style:table-cell-properties fo:padding="0.101cm" fo:border="none"/>
    </style:style>
    <style:style style:name="Table_5f_3" style:display-name="Table_3" style:family="table">
      <style:table-properties style:width="17cm" table:align="margins"/>
    </style:style>
    <style:style style:name="Table_5f_3.A" style:display-name="Table_3.A" style:family="table-column">
      <style:table-column-properties style:column-width="5.667cm" style:rel-column-width="21845*"/>
    </style:style>
    <style:style style:name="Table_5f_3.A1" style:display-name="Table_3.A1" style:family="table-cell">
      <style:table-cell-properties fo:padding="0.101cm" fo:border="none"/>
    </style:style>
    <style:style style:name="Table_5f_4" style:display-name="Table_4" style:family="table">
      <style:table-properties style:width="17cm" table:align="margins"/>
    </style:style>
    <style:style style:name="Table_5f_4.A" style:display-name="Table_4.A" style:family="table-column">
      <style:table-column-properties style:column-width="5.667cm" style:rel-column-width="21845*"/>
    </style:style>
    <style:style style:name="Table_5f_4.A1" style:display-name="Table_4.A1" style:family="table-cell">
      <style:table-cell-properties fo:padding="0.101cm" fo:border="none"/>
    </style:style>
    <style:style style:name="Table_5f_5" style:display-name="Table_5" style:family="table">
      <style:table-properties style:width="17cm" table:align="margins"/>
    </style:style>
    <style:style style:name="Table_5f_5.A" style:display-name="Table_5.A" style:family="table-column">
      <style:table-column-properties style:column-width="4.249cm" style:rel-column-width="16383*"/>
    </style:style>
    <style:style style:name="Table_5f_5.D" style:display-name="Table_5.D" style:family="table-column">
      <style:table-column-properties style:column-width="4.251cm" style:rel-column-width="16386*"/>
    </style:style>
    <style:style style:name="Table_5f_5.A1" style:display-name="Table_5.A1" style:family="table-cell">
      <style:table-cell-properties fo:padding="0.101cm" fo:border="none"/>
    </style:style>
    <style:style style:name="Table_5f_6" style:display-name="Table_6" style:family="table">
      <style:table-properties style:width="17cm" table:align="margins"/>
    </style:style>
    <style:style style:name="Table_5f_6.A" style:display-name="Table_6.A" style:family="table-column">
      <style:table-column-properties style:column-width="1.184cm" style:rel-column-width="671*"/>
    </style:style>
    <style:style style:name="Table_5f_6.B" style:display-name="Table_6.B" style:family="table-column">
      <style:table-column-properties style:column-width="3.298cm" style:rel-column-width="1870*"/>
    </style:style>
    <style:style style:name="Table_5f_6.C" style:display-name="Table_6.C" style:family="table-column">
      <style:table-column-properties style:column-width="5.717cm" style:rel-column-width="3241*"/>
    </style:style>
    <style:style style:name="Table_5f_6.D" style:display-name="Table_6.D" style:family="table-column">
      <style:table-column-properties style:column-width="3.399cm" style:rel-column-width="1927*"/>
    </style:style>
    <style:style style:name="Table_5f_6.E" style:display-name="Table_6.E" style:family="table-column">
      <style:table-column-properties style:column-width="3.403cm" style:rel-column-width="1929*"/>
    </style:style>
    <style:style style:name="Table_5f_6.A1" style:display-name="Table_6.A1" style:family="table-cell">
      <style:table-cell-properties style:vertical-align="middle" fo:padding="0.101cm" fo:border="none"/>
    </style:style>
    <style:style style:name="Table_5f_6.B2" style:display-name="Table_6.B2" style:family="table-cell">
      <style:table-cell-properties fo:padding="0.101cm" fo:border="none"/>
    </style:style>
    <style:style style:name="Table_5f_6.C2" style:display-name="Table_6.C2" style:family="table-cell">
      <style:table-cell-properties fo:padding="0.101cm" fo:border="none"/>
    </style:style>
    <style:style style:name="Table_5f_6.D2" style:display-name="Table_6.D2" style:family="table-cell">
      <style:table-cell-properties fo:padding="0.101cm" fo:border="none"/>
    </style:style>
    <style:style style:name="Table_5f_6.E2" style:display-name="Table_6.E2" style:family="table-cell">
      <style:table-cell-properties fo:padding="0.101cm" fo:border="none"/>
    </style:style>
    <style:style style:name="Table_5f_6.B3" style:display-name="Table_6.B3" style:family="table-cell">
      <style:table-cell-properties fo:padding="0.101cm" fo:border="none"/>
    </style:style>
    <style:style style:name="Table_5f_6.C3" style:display-name="Table_6.C3" style:family="table-cell">
      <style:table-cell-properties fo:padding="0.101cm" fo:border="none"/>
    </style:style>
    <style:style style:name="Table_5f_6.D3" style:display-name="Table_6.D3" style:family="table-cell">
      <style:table-cell-properties fo:padding="0.101cm" fo:border="none"/>
    </style:style>
    <style:style style:name="Table_5f_6.E3" style:display-name="Table_6.E3" style:family="table-cell">
      <style:table-cell-properties fo:padding="0.101cm" fo:border="none"/>
    </style:style>
    <style:style style:name="Table_5f_6.B4" style:display-name="Table_6.B4" style:family="table-cell">
      <style:table-cell-properties fo:padding="0.101cm" fo:border="none"/>
    </style:style>
    <style:style style:name="Table_5f_6.C4" style:display-name="Table_6.C4" style:family="table-cell">
      <style:table-cell-properties fo:padding="0.101cm" fo:border="none"/>
    </style:style>
    <style:style style:name="Table_5f_6.D4" style:display-name="Table_6.D4" style:family="table-cell">
      <style:table-cell-properties fo:padding="0.101cm" fo:border="none"/>
    </style:style>
    <style:style style:name="Table_5f_6.E4" style:display-name="Table_6.E4" style:family="table-cell">
      <style:table-cell-properties fo:padding="0.101cm" fo:border="none"/>
    </style:style>
    <style:style style:name="Table_5f_6.B5" style:display-name="Table_6.B5" style:family="table-cell">
      <style:table-cell-properties fo:padding="0.101cm" fo:border="none"/>
    </style:style>
    <style:style style:name="Table_5f_6.C5" style:display-name="Table_6.C5" style:family="table-cell">
      <style:table-cell-properties fo:padding="0.101cm" fo:border="none"/>
    </style:style>
    <style:style style:name="Table_5f_6.D5" style:display-name="Table_6.D5" style:family="table-cell">
      <style:table-cell-properties fo:padding="0.101cm" fo:border="none"/>
    </style:style>
    <style:style style:name="Table_5f_6.E5" style:display-name="Table_6.E5" style:family="table-cell">
      <style:table-cell-properties fo:padding="0.101cm" fo:border="none"/>
    </style:style>
    <style:style style:name="Table_5f_6.B6" style:display-name="Table_6.B6" style:family="table-cell">
      <style:table-cell-properties fo:padding="0.101cm" fo:border="none"/>
    </style:style>
    <style:style style:name="Table_5f_6.C6" style:display-name="Table_6.C6" style:family="table-cell">
      <style:table-cell-properties fo:padding="0.101cm" fo:border="none"/>
    </style:style>
    <style:style style:name="Table_5f_6.D6" style:display-name="Table_6.D6" style:family="table-cell">
      <style:table-cell-properties fo:padding="0.101cm" fo:border="none"/>
    </style:style>
    <style:style style:name="Table_5f_6.E6" style:display-name="Table_6.E6" style:family="table-cell">
      <style:table-cell-properties fo:padding="0.101cm" fo:border="none"/>
    </style:style>
    <style:style style:name="Table_5f_7" style:display-name="Table_7" style:family="table">
      <style:table-properties style:width="17cm" table:align="margins"/>
    </style:style>
    <style:style style:name="Table_5f_7.A" style:display-name="Table_7.A" style:family="table-column">
      <style:table-column-properties style:column-width="1.184cm" style:rel-column-width="671*"/>
    </style:style>
    <style:style style:name="Table_5f_7.B" style:display-name="Table_7.B" style:family="table-column">
      <style:table-column-properties style:column-width="3.298cm" style:rel-column-width="1870*"/>
    </style:style>
    <style:style style:name="Table_5f_7.C" style:display-name="Table_7.C" style:family="table-column">
      <style:table-column-properties style:column-width="5.717cm" style:rel-column-width="3241*"/>
    </style:style>
    <style:style style:name="Table_5f_7.D" style:display-name="Table_7.D" style:family="table-column">
      <style:table-column-properties style:column-width="3.399cm" style:rel-column-width="1927*"/>
    </style:style>
    <style:style style:name="Table_5f_7.E" style:display-name="Table_7.E" style:family="table-column">
      <style:table-column-properties style:column-width="3.403cm" style:rel-column-width="1929*"/>
    </style:style>
    <style:style style:name="Table_5f_7.A1" style:display-name="Table_7.A1" style:family="table-cell">
      <style:table-cell-properties style:vertical-align="middle" fo:padding="0.101cm" fo:border="none"/>
    </style:style>
    <style:style style:name="Table_5f_7.B2" style:display-name="Table_7.B2" style:family="table-cell">
      <style:table-cell-properties fo:padding="0.101cm" fo:border="none"/>
    </style:style>
    <style:style style:name="Table_5f_7.C2" style:display-name="Table_7.C2" style:family="table-cell">
      <style:table-cell-properties fo:padding="0.101cm" fo:border="none"/>
    </style:style>
    <style:style style:name="Table_5f_7.D2" style:display-name="Table_7.D2" style:family="table-cell">
      <style:table-cell-properties fo:padding="0.101cm" fo:border="none"/>
    </style:style>
    <style:style style:name="Table_5f_7.E2" style:display-name="Table_7.E2" style:family="table-cell">
      <style:table-cell-properties fo:padding="0.101cm" fo:border="none"/>
    </style:style>
    <style:style style:name="Table_5f_7.B3" style:display-name="Table_7.B3" style:family="table-cell">
      <style:table-cell-properties fo:padding="0.101cm" fo:border="none"/>
    </style:style>
    <style:style style:name="Table_5f_7.C3" style:display-name="Table_7.C3" style:family="table-cell">
      <style:table-cell-properties fo:padding="0.101cm" fo:border="none"/>
    </style:style>
    <style:style style:name="Table_5f_7.D3" style:display-name="Table_7.D3" style:family="table-cell">
      <style:table-cell-properties fo:padding="0.101cm" fo:border="none"/>
    </style:style>
    <style:style style:name="Table_5f_7.E3" style:display-name="Table_7.E3" style:family="table-cell">
      <style:table-cell-properties fo:padding="0.101cm" fo:border="none"/>
    </style:style>
    <style:style style:name="Table_5f_7.B4" style:display-name="Table_7.B4" style:family="table-cell">
      <style:table-cell-properties fo:padding="0.101cm" fo:border="none"/>
    </style:style>
    <style:style style:name="Table_5f_7.C4" style:display-name="Table_7.C4" style:family="table-cell">
      <style:table-cell-properties fo:padding="0.101cm" fo:border="none"/>
    </style:style>
    <style:style style:name="Table_5f_7.D4" style:display-name="Table_7.D4" style:family="table-cell">
      <style:table-cell-properties fo:padding="0.101cm" fo:border="none"/>
    </style:style>
    <style:style style:name="Table_5f_7.E4" style:display-name="Table_7.E4" style:family="table-cell">
      <style:table-cell-properties fo:padding="0.101cm" fo:border="none"/>
    </style:style>
    <style:style style:name="Table_5f_7.B5" style:display-name="Table_7.B5" style:family="table-cell">
      <style:table-cell-properties fo:padding="0.101cm" fo:border="none"/>
    </style:style>
    <style:style style:name="Table_5f_7.C5" style:display-name="Table_7.C5" style:family="table-cell">
      <style:table-cell-properties fo:padding="0.101cm" fo:border="none"/>
    </style:style>
    <style:style style:name="Table_5f_7.D5" style:display-name="Table_7.D5" style:family="table-cell">
      <style:table-cell-properties fo:padding="0.101cm" fo:border="none"/>
    </style:style>
    <style:style style:name="Table_5f_7.E5" style:display-name="Table_7.E5" style:family="table-cell">
      <style:table-cell-properties fo:padding="0.101cm" fo:border="none"/>
    </style:style>
    <style:style style:name="Table_5f_7.B6" style:display-name="Table_7.B6" style:family="table-cell">
      <style:table-cell-properties fo:padding="0.101cm" fo:border="none"/>
    </style:style>
    <style:style style:name="Table_5f_7.C6" style:display-name="Table_7.C6" style:family="table-cell">
      <style:table-cell-properties fo:padding="0.101cm" fo:border="none"/>
    </style:style>
    <style:style style:name="Table_5f_7.D6" style:display-name="Table_7.D6" style:family="table-cell">
      <style:table-cell-properties fo:padding="0.101cm" fo:border="none"/>
    </style:style>
    <style:style style:name="Table_5f_7.E6" style:display-name="Table_7.E6" style:family="table-cell">
      <style:table-cell-properties fo:padding="0.101cm" fo:border="none"/>
    </style:style>
    <style:style style:name="Table_5f_7.B7" style:display-name="Table_7.B7" style:family="table-cell">
      <style:table-cell-properties fo:padding="0.101cm" fo:border="none"/>
    </style:style>
    <style:style style:name="Table_5f_7.C7" style:display-name="Table_7.C7" style:family="table-cell">
      <style:table-cell-properties fo:padding="0.101cm" fo:border="none"/>
    </style:style>
    <style:style style:name="Table_5f_7.D7" style:display-name="Table_7.D7" style:family="table-cell">
      <style:table-cell-properties fo:padding="0.101cm" fo:border="none"/>
    </style:style>
    <style:style style:name="Table_5f_7.E7" style:display-name="Table_7.E7" style:family="table-cell">
      <style:table-cell-properties fo:padding="0.101cm" fo:border="none"/>
    </style:style>
    <style:style style:name="Table_5f_8" style:display-name="Table_8" style:family="table">
      <style:table-properties style:width="17cm" table:align="margins"/>
    </style:style>
    <style:style style:name="Table_5f_8.A" style:display-name="Table_8.A" style:family="table-column">
      <style:table-column-properties style:column-width="1.184cm" style:rel-column-width="671*"/>
    </style:style>
    <style:style style:name="Table_5f_8.B" style:display-name="Table_8.B" style:family="table-column">
      <style:table-column-properties style:column-width="3.298cm" style:rel-column-width="1870*"/>
    </style:style>
    <style:style style:name="Table_5f_8.C" style:display-name="Table_8.C" style:family="table-column">
      <style:table-column-properties style:column-width="5.717cm" style:rel-column-width="3241*"/>
    </style:style>
    <style:style style:name="Table_5f_8.D" style:display-name="Table_8.D" style:family="table-column">
      <style:table-column-properties style:column-width="3.399cm" style:rel-column-width="1927*"/>
    </style:style>
    <style:style style:name="Table_5f_8.E" style:display-name="Table_8.E" style:family="table-column">
      <style:table-column-properties style:column-width="3.403cm" style:rel-column-width="1929*"/>
    </style:style>
    <style:style style:name="Table_5f_8.A1" style:display-name="Table_8.A1" style:family="table-cell">
      <style:table-cell-properties style:vertical-align="middle" fo:padding="0.101cm" fo:border="none"/>
    </style:style>
    <style:style style:name="Table_5f_8.B2" style:display-name="Table_8.B2" style:family="table-cell">
      <style:table-cell-properties fo:padding="0.101cm" fo:border="none"/>
    </style:style>
    <style:style style:name="Table_5f_8.C2" style:display-name="Table_8.C2" style:family="table-cell">
      <style:table-cell-properties fo:padding="0.101cm" fo:border="none"/>
    </style:style>
    <style:style style:name="Table_5f_8.D2" style:display-name="Table_8.D2" style:family="table-cell">
      <style:table-cell-properties fo:padding="0.101cm" fo:border="none"/>
    </style:style>
    <style:style style:name="Table_5f_8.E2" style:display-name="Table_8.E2" style:family="table-cell">
      <style:table-cell-properties fo:padding="0.101cm" fo:border="none"/>
    </style:style>
    <style:style style:name="Table_5f_8.B3" style:display-name="Table_8.B3" style:family="table-cell">
      <style:table-cell-properties fo:padding="0.101cm" fo:border="none"/>
    </style:style>
    <style:style style:name="Table_5f_8.C3" style:display-name="Table_8.C3" style:family="table-cell">
      <style:table-cell-properties fo:padding="0.101cm" fo:border="none"/>
    </style:style>
    <style:style style:name="Table_5f_8.D3" style:display-name="Table_8.D3" style:family="table-cell">
      <style:table-cell-properties fo:padding="0.101cm" fo:border="none"/>
    </style:style>
    <style:style style:name="Table_5f_8.E3" style:display-name="Table_8.E3" style:family="table-cell">
      <style:table-cell-properties fo:padding="0.101cm" fo:border="none"/>
    </style:style>
    <style:style style:name="Table_5f_8.B4" style:display-name="Table_8.B4" style:family="table-cell">
      <style:table-cell-properties fo:padding="0.101cm" fo:border="none"/>
    </style:style>
    <style:style style:name="Table_5f_8.C4" style:display-name="Table_8.C4" style:family="table-cell">
      <style:table-cell-properties fo:padding="0.101cm" fo:border="none"/>
    </style:style>
    <style:style style:name="Table_5f_8.D4" style:display-name="Table_8.D4" style:family="table-cell">
      <style:table-cell-properties fo:padding="0.101cm" fo:border="none"/>
    </style:style>
    <style:style style:name="Table_5f_8.E4" style:display-name="Table_8.E4" style:family="table-cell">
      <style:table-cell-properties fo:padding="0.101cm" fo:border="none"/>
    </style:style>
    <style:style style:name="Table_5f_8.B5" style:display-name="Table_8.B5" style:family="table-cell">
      <style:table-cell-properties fo:padding="0.101cm" fo:border="none"/>
    </style:style>
    <style:style style:name="Table_5f_8.C5" style:display-name="Table_8.C5" style:family="table-cell">
      <style:table-cell-properties fo:padding="0.101cm" fo:border="none"/>
    </style:style>
    <style:style style:name="Table_5f_8.D5" style:display-name="Table_8.D5" style:family="table-cell">
      <style:table-cell-properties fo:padding="0.101cm" fo:border="none"/>
    </style:style>
    <style:style style:name="Table_5f_8.E5" style:display-name="Table_8.E5" style:family="table-cell">
      <style:table-cell-properties fo:padding="0.101cm" fo:border="none"/>
    </style:style>
    <style:style style:name="Table_5f_9" style:display-name="Table_9" style:family="table">
      <style:table-properties style:width="17cm" table:align="margins"/>
    </style:style>
    <style:style style:name="Table_5f_9.A" style:display-name="Table_9.A" style:family="table-column">
      <style:table-column-properties style:column-width="1.184cm" style:rel-column-width="671*"/>
    </style:style>
    <style:style style:name="Table_5f_9.B" style:display-name="Table_9.B" style:family="table-column">
      <style:table-column-properties style:column-width="6.225cm" style:rel-column-width="3529*"/>
    </style:style>
    <style:style style:name="Table_5f_9.C" style:display-name="Table_9.C" style:family="table-column">
      <style:table-column-properties style:column-width="9.592cm" style:rel-column-width="5438*"/>
    </style:style>
    <style:style style:name="Table_5f_9.A1" style:display-name="Table_9.A1" style:family="table-cell">
      <style:table-cell-properties style:vertical-align="middle" fo:padding="0.101cm" fo:border="none"/>
    </style:style>
    <style:style style:name="Table_5f_9.B2" style:display-name="Table_9.B2" style:family="table-cell">
      <style:table-cell-properties fo:padding="0.101cm" fo:border="none"/>
    </style:style>
    <style:style style:name="Table_5f_9.C2" style:display-name="Table_9.C2" style:family="table-cell">
      <style:table-cell-properties fo:padding="0.101cm" fo:border="none"/>
    </style:style>
    <style:style style:name="Table_5f_9.B3" style:display-name="Table_9.B3" style:family="table-cell">
      <style:table-cell-properties fo:padding="0.101cm" fo:border="none"/>
    </style:style>
    <style:style style:name="Table_5f_9.C3" style:display-name="Table_9.C3" style:family="table-cell">
      <style:table-cell-properties fo:padding="0.101cm" fo:border="none"/>
    </style:style>
    <style:style style:name="Table_5f_9.B4" style:display-name="Table_9.B4" style:family="table-cell">
      <style:table-cell-properties fo:padding="0.101cm" fo:border="none"/>
    </style:style>
    <style:style style:name="Table_5f_9.C4" style:display-name="Table_9.C4" style:family="table-cell">
      <style:table-cell-properties fo:padding="0.101cm" fo:border="none"/>
    </style:style>
    <style:style style:name="Table_5f_10" style:display-name="Table_10" style:family="table">
      <style:table-properties style:width="17cm" table:align="margins"/>
    </style:style>
    <style:style style:name="Table_5f_10.A" style:display-name="Table_10.A" style:family="table-column">
      <style:table-column-properties style:column-width="1.184cm" style:rel-column-width="671*"/>
    </style:style>
    <style:style style:name="Table_5f_10.B" style:display-name="Table_10.B" style:family="table-column">
      <style:table-column-properties style:column-width="2.708cm" style:rel-column-width="1535*"/>
    </style:style>
    <style:style style:name="Table_5f_10.C" style:display-name="Table_10.C" style:family="table-column">
      <style:table-column-properties style:column-width="4.108cm" style:rel-column-width="2329*"/>
    </style:style>
    <style:style style:name="Table_5f_10.D" style:display-name="Table_10.D" style:family="table-column">
      <style:table-column-properties style:column-width="4.39cm" style:rel-column-width="2489*"/>
    </style:style>
    <style:style style:name="Table_5f_10.E" style:display-name="Table_10.E" style:family="table-column">
      <style:table-column-properties style:column-width="4.611cm" style:rel-column-width="2614*"/>
    </style:style>
    <style:style style:name="Table_5f_10.A1" style:display-name="Table_10.A1" style:family="table-cell">
      <style:table-cell-properties style:vertical-align="middle" fo:padding="0.101cm" fo:border="none"/>
    </style:style>
    <style:style style:name="Table_5f_10.B2" style:display-name="Table_10.B2" style:family="table-cell">
      <style:table-cell-properties fo:padding="0.101cm" fo:border="none"/>
    </style:style>
    <style:style style:name="Table_5f_10.C2" style:display-name="Table_10.C2" style:family="table-cell">
      <style:table-cell-properties fo:padding="0.101cm" fo:border="none"/>
    </style:style>
    <style:style style:name="Table_5f_10.D2" style:display-name="Table_10.D2" style:family="table-cell">
      <style:table-cell-properties fo:padding="0.101cm" fo:border="none"/>
    </style:style>
    <style:style style:name="Table_5f_10.E2" style:display-name="Table_10.E2" style:family="table-cell">
      <style:table-cell-properties fo:padding="0.101cm" fo:border="none"/>
    </style:style>
    <style:style style:name="Table_5f_10.B3" style:display-name="Table_10.B3" style:family="table-cell">
      <style:table-cell-properties fo:padding="0.101cm" fo:border="none"/>
    </style:style>
    <style:style style:name="Table_5f_10.C3" style:display-name="Table_10.C3" style:family="table-cell">
      <style:table-cell-properties fo:padding="0.101cm" fo:border="none"/>
    </style:style>
    <style:style style:name="Table_5f_10.D3" style:display-name="Table_10.D3" style:family="table-cell">
      <style:table-cell-properties fo:padding="0.101cm" fo:border="none"/>
    </style:style>
    <style:style style:name="Table_5f_10.E3" style:display-name="Table_10.E3" style:family="table-cell">
      <style:table-cell-properties fo:padding="0.101cm" fo:border="none"/>
    </style:style>
    <style:style style:name="Table_5f_10.B4" style:display-name="Table_10.B4" style:family="table-cell">
      <style:table-cell-properties fo:padding="0.101cm" fo:border="none"/>
    </style:style>
    <style:style style:name="Table_5f_10.C4" style:display-name="Table_10.C4" style:family="table-cell">
      <style:table-cell-properties fo:padding="0.101cm" fo:border="none"/>
    </style:style>
    <style:style style:name="Table_5f_10.D4" style:display-name="Table_10.D4" style:family="table-cell">
      <style:table-cell-properties fo:padding="0.101cm" fo:border="none"/>
    </style:style>
    <style:style style:name="Table_5f_10.E4" style:display-name="Table_10.E4" style:family="table-cell">
      <style:table-cell-properties fo:padding="0.101cm" fo:border="none"/>
    </style:style>
    <style:style style:name="Table_5f_10.B5" style:display-name="Table_10.B5" style:family="table-cell">
      <style:table-cell-properties fo:padding="0.101cm" fo:border="none"/>
    </style:style>
    <style:style style:name="Table_5f_10.C5" style:display-name="Table_10.C5" style:family="table-cell">
      <style:table-cell-properties fo:padding="0.101cm" fo:border="none"/>
    </style:style>
    <style:style style:name="Table_5f_10.D5" style:display-name="Table_10.D5" style:family="table-cell">
      <style:table-cell-properties fo:padding="0.101cm" fo:border="none"/>
    </style:style>
    <style:style style:name="Table_5f_10.E5" style:display-name="Table_10.E5" style:family="table-cell">
      <style:table-cell-properties fo:padding="0.101cm" fo:border="none"/>
    </style:style>
    <style:style style:name="Table_5f_10.B6" style:display-name="Table_10.B6" style:family="table-cell">
      <style:table-cell-properties fo:padding="0.101cm" fo:border="none"/>
    </style:style>
    <style:style style:name="Table_5f_10.C6" style:display-name="Table_10.C6" style:family="table-cell">
      <style:table-cell-properties fo:padding="0.101cm" fo:border="none"/>
    </style:style>
    <style:style style:name="Table_5f_10.D6" style:display-name="Table_10.D6" style:family="table-cell">
      <style:table-cell-properties fo:padding="0.101cm" fo:border="none"/>
    </style:style>
    <style:style style:name="Table_5f_10.E6" style:display-name="Table_10.E6" style:family="table-cell">
      <style:table-cell-properties fo:padding="0.101cm" fo:border="none"/>
    </style:style>
    <style:style style:name="Table_5f_10.B7" style:display-name="Table_10.B7" style:family="table-cell">
      <style:table-cell-properties fo:padding="0.101cm" fo:border="none"/>
    </style:style>
    <style:style style:name="Table_5f_10.C7" style:display-name="Table_10.C7" style:family="table-cell">
      <style:table-cell-properties fo:padding="0.101cm" fo:border="none"/>
    </style:style>
    <style:style style:name="Table_5f_10.D7" style:display-name="Table_10.D7" style:family="table-cell">
      <style:table-cell-properties fo:padding="0.101cm" fo:border="none"/>
    </style:style>
    <style:style style:name="Table_5f_10.E7" style:display-name="Table_10.E7" style:family="table-cell">
      <style:table-cell-properties fo:padding="0.101cm" fo:border="none"/>
    </style:style>
    <style:style style:name="Table_5f_11" style:display-name="Table_11" style:family="table">
      <style:table-properties style:width="17cm" table:align="margins"/>
    </style:style>
    <style:style style:name="Table_5f_11.A" style:display-name="Table_11.A" style:family="table-column">
      <style:table-column-properties style:column-width="1.184cm" style:rel-column-width="671*"/>
    </style:style>
    <style:style style:name="Table_5f_11.B" style:display-name="Table_11.B" style:family="table-column">
      <style:table-column-properties style:column-width="2.708cm" style:rel-column-width="1535*"/>
    </style:style>
    <style:style style:name="Table_5f_11.C" style:display-name="Table_11.C" style:family="table-column">
      <style:table-column-properties style:column-width="4.108cm" style:rel-column-width="2329*"/>
    </style:style>
    <style:style style:name="Table_5f_11.D" style:display-name="Table_11.D" style:family="table-column">
      <style:table-column-properties style:column-width="5.599cm" style:rel-column-width="3174*"/>
    </style:style>
    <style:style style:name="Table_5f_11.E" style:display-name="Table_11.E" style:family="table-column">
      <style:table-column-properties style:column-width="3.403cm" style:rel-column-width="1929*"/>
    </style:style>
    <style:style style:name="Table_5f_11.A1" style:display-name="Table_11.A1" style:family="table-cell">
      <style:table-cell-properties style:vertical-align="middle" fo:padding="0.101cm" fo:border="none"/>
    </style:style>
    <style:style style:name="Table_5f_11.B2" style:display-name="Table_11.B2" style:family="table-cell">
      <style:table-cell-properties fo:padding="0.101cm" fo:border="none"/>
    </style:style>
    <style:style style:name="Table_5f_11.C2" style:display-name="Table_11.C2" style:family="table-cell">
      <style:table-cell-properties fo:padding="0.101cm" fo:border="none"/>
    </style:style>
    <style:style style:name="Table_5f_11.D2" style:display-name="Table_11.D2" style:family="table-cell">
      <style:table-cell-properties fo:padding="0.101cm" fo:border="none"/>
    </style:style>
    <style:style style:name="Table_5f_11.E2" style:display-name="Table_11.E2" style:family="table-cell">
      <style:table-cell-properties fo:padding="0.101cm" fo:border="none"/>
    </style:style>
    <style:style style:name="Table_5f_11.B3" style:display-name="Table_11.B3" style:family="table-cell">
      <style:table-cell-properties fo:padding="0.101cm" fo:border="none"/>
    </style:style>
    <style:style style:name="Table_5f_11.C3" style:display-name="Table_11.C3" style:family="table-cell">
      <style:table-cell-properties fo:padding="0.101cm" fo:border="none"/>
    </style:style>
    <style:style style:name="Table_5f_11.D3" style:display-name="Table_11.D3" style:family="table-cell">
      <style:table-cell-properties fo:padding="0.101cm" fo:border="none"/>
    </style:style>
    <style:style style:name="Table_5f_11.E3" style:display-name="Table_11.E3" style:family="table-cell">
      <style:table-cell-properties fo:padding="0.101cm" fo:border="none"/>
    </style:style>
    <style:style style:name="Table_5f_11.B4" style:display-name="Table_11.B4" style:family="table-cell">
      <style:table-cell-properties fo:padding="0.101cm" fo:border="none"/>
    </style:style>
    <style:style style:name="Table_5f_11.C4" style:display-name="Table_11.C4" style:family="table-cell">
      <style:table-cell-properties fo:padding="0.101cm" fo:border="none"/>
    </style:style>
    <style:style style:name="Table_5f_11.D4" style:display-name="Table_11.D4" style:family="table-cell">
      <style:table-cell-properties fo:padding="0.101cm" fo:border="none"/>
    </style:style>
    <style:style style:name="Table_5f_11.E4" style:display-name="Table_11.E4" style:family="table-cell">
      <style:table-cell-properties fo:padding="0.101cm" fo:border="none"/>
    </style:style>
    <style:style style:name="Table_5f_11.B5" style:display-name="Table_11.B5" style:family="table-cell">
      <style:table-cell-properties fo:padding="0.101cm" fo:border="none"/>
    </style:style>
    <style:style style:name="Table_5f_11.C5" style:display-name="Table_11.C5" style:family="table-cell">
      <style:table-cell-properties fo:padding="0.101cm" fo:border="none"/>
    </style:style>
    <style:style style:name="Table_5f_11.D5" style:display-name="Table_11.D5" style:family="table-cell">
      <style:table-cell-properties fo:padding="0.101cm" fo:border="none"/>
    </style:style>
    <style:style style:name="Table_5f_11.E5" style:display-name="Table_11.E5" style:family="table-cell">
      <style:table-cell-properties fo:padding="0.101cm" fo:border="none"/>
    </style:style>
    <style:style style:name="Table_5f_11.B6" style:display-name="Table_11.B6" style:family="table-cell">
      <style:table-cell-properties fo:padding="0.101cm" fo:border="none"/>
    </style:style>
    <style:style style:name="Table_5f_11.C6" style:display-name="Table_11.C6" style:family="table-cell">
      <style:table-cell-properties fo:padding="0.101cm" fo:border="none"/>
    </style:style>
    <style:style style:name="Table_5f_11.D6" style:display-name="Table_11.D6" style:family="table-cell">
      <style:table-cell-properties fo:padding="0.101cm" fo:border="none"/>
    </style:style>
    <style:style style:name="Table_5f_11.E6" style:display-name="Table_11.E6" style:family="table-cell">
      <style:table-cell-properties fo:padding="0.101cm" fo:border="none"/>
    </style:style>
    <style:style style:name="Table_5f_11.B7" style:display-name="Table_11.B7" style:family="table-cell">
      <style:table-cell-properties fo:padding="0.101cm" fo:border="none"/>
    </style:style>
    <style:style style:name="Table_5f_11.C7" style:display-name="Table_11.C7" style:family="table-cell">
      <style:table-cell-properties fo:padding="0.101cm" fo:border="none"/>
    </style:style>
    <style:style style:name="Table_5f_11.D7" style:display-name="Table_11.D7" style:family="table-cell">
      <style:table-cell-properties fo:padding="0.101cm" fo:border="none"/>
    </style:style>
    <style:style style:name="Table_5f_11.E7" style:display-name="Table_11.E7" style:family="table-cell">
      <style:table-cell-properties fo:padding="0.101cm" fo:border="none"/>
    </style:style>
    <style:style style:name="Table_5f_12" style:display-name="Table_12" style:family="table">
      <style:table-properties style:width="17cm" table:align="margins"/>
    </style:style>
    <style:style style:name="Table_5f_12.A" style:display-name="Table_12.A" style:family="table-column">
      <style:table-column-properties style:column-width="1.307cm" style:rel-column-width="741*"/>
    </style:style>
    <style:style style:name="Table_5f_12.B" style:display-name="Table_12.B" style:family="table-column">
      <style:table-column-properties style:column-width="3.891cm" style:rel-column-width="2206*"/>
    </style:style>
    <style:style style:name="Table_5f_12.C" style:display-name="Table_12.C" style:family="table-column">
      <style:table-column-properties style:column-width="4.389cm" style:rel-column-width="2488*"/>
    </style:style>
    <style:style style:name="Table_5f_12.D" style:display-name="Table_12.D" style:family="table-column">
      <style:table-column-properties style:column-width="4.011cm" style:rel-column-width="2274*"/>
    </style:style>
    <style:style style:name="Table_5f_12.E" style:display-name="Table_12.E" style:family="table-column">
      <style:table-column-properties style:column-width="3.403cm" style:rel-column-width="1929*"/>
    </style:style>
    <style:style style:name="Table_5f_12.A1" style:display-name="Table_12.A1" style:family="table-cell">
      <style:table-cell-properties style:vertical-align="middle" fo:padding="0.101cm" fo:border="none"/>
    </style:style>
    <style:style style:name="Table_5f_12.B2" style:display-name="Table_12.B2" style:family="table-cell">
      <style:table-cell-properties fo:padding="0.101cm" fo:border="none"/>
    </style:style>
    <style:style style:name="Table_5f_12.C2" style:display-name="Table_12.C2" style:family="table-cell">
      <style:table-cell-properties fo:padding="0.101cm" fo:border="none"/>
    </style:style>
    <style:style style:name="Table_5f_12.D2" style:display-name="Table_12.D2" style:family="table-cell">
      <style:table-cell-properties fo:padding="0.101cm" fo:border="none"/>
    </style:style>
    <style:style style:name="Table_5f_12.E2" style:display-name="Table_12.E2" style:family="table-cell">
      <style:table-cell-properties fo:padding="0.101cm" fo:border="none"/>
    </style:style>
    <style:style style:name="Table_5f_12.B3" style:display-name="Table_12.B3" style:family="table-cell">
      <style:table-cell-properties fo:padding="0.101cm" fo:border="none"/>
    </style:style>
    <style:style style:name="Table_5f_12.C3" style:display-name="Table_12.C3" style:family="table-cell">
      <style:table-cell-properties fo:padding="0.101cm" fo:border="none"/>
    </style:style>
    <style:style style:name="Table_5f_12.D3" style:display-name="Table_12.D3" style:family="table-cell">
      <style:table-cell-properties fo:padding="0.101cm" fo:border="none"/>
    </style:style>
    <style:style style:name="Table_5f_12.E3" style:display-name="Table_12.E3" style:family="table-cell">
      <style:table-cell-properties fo:padding="0.101cm" fo:border="none"/>
    </style:style>
    <style:style style:name="Table_5f_12.B4" style:display-name="Table_12.B4" style:family="table-cell">
      <style:table-cell-properties fo:padding="0.101cm" fo:border="none"/>
    </style:style>
    <style:style style:name="Table_5f_12.C4" style:display-name="Table_12.C4" style:family="table-cell">
      <style:table-cell-properties fo:padding="0.101cm" fo:border="none"/>
    </style:style>
    <style:style style:name="Table_5f_12.D4" style:display-name="Table_12.D4" style:family="table-cell">
      <style:table-cell-properties fo:padding="0.101cm" fo:border="none"/>
    </style:style>
    <style:style style:name="Table_5f_12.E4" style:display-name="Table_12.E4" style:family="table-cell">
      <style:table-cell-properties fo:padding="0.101cm" fo:border="none"/>
    </style:style>
    <style:style style:name="Table_5f_13" style:display-name="Table_13" style:family="table">
      <style:table-properties style:width="17cm" table:align="margins"/>
    </style:style>
    <style:style style:name="Table_5f_13.A" style:display-name="Table_13.A" style:family="table-column">
      <style:table-column-properties style:column-width="4.249cm" style:rel-column-width="16383*"/>
    </style:style>
    <style:style style:name="Table_5f_13.D" style:display-name="Table_13.D" style:family="table-column">
      <style:table-column-properties style:column-width="4.251cm" style:rel-column-width="16386*"/>
    </style:style>
    <style:style style:name="Table_5f_13.A1" style:display-name="Table_13.A1" style:family="table-cell">
      <style:table-cell-properties fo:padding="0.101cm" fo:border="none"/>
    </style:style>
    <style:style style:name="Table_5f_14" style:display-name="Table_14" style:family="table">
      <style:table-properties style:width="17cm" table:align="margins"/>
    </style:style>
    <style:style style:name="Table_5f_14.A" style:display-name="Table_14.A" style:family="table-column">
      <style:table-column-properties style:column-width="5.667cm" style:rel-column-width="21845*"/>
    </style:style>
    <style:style style:name="Table_5f_14.A1" style:display-name="Table_14.A1" style:family="table-cell">
      <style:table-cell-properties fo:padding="0.101cm" fo:border="none"/>
    </style:style>
    <style:style style:name="P1" style:family="paragraph" style:parent-style-name="Standard" style:list-style-name="">
      <style:paragraph-properties fo:margin-top="0cm" fo:margin-bottom="0cm" style:contextual-spacing="false" fo:line-height="115%" fo:text-align="center" style:justify-single-word="false"/>
      <style:text-properties style:font-name="Times New Roman" fo:font-size="14pt" fo:font-weight="bold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4pt" fo:font-weight="bold" style:font-size-asian="14pt" style:font-size-complex="14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style:font-size-asian="14pt" style:font-size-complex="14pt"/>
    </style:style>
    <style:style style:name="P4" style:family="paragraph" style:parent-style-name="Standard">
      <style:paragraph-properties fo:margin-top="0.499cm" fo:margin-bottom="0.3cm" style:contextual-spacing="false" fo:line-height="115%"/>
      <style:text-properties style:font-name="Times New Roman" fo:font-size="14pt" fo:font-weight="bold" style:font-size-asian="14pt" style:font-size-complex="14pt"/>
    </style:style>
    <style:style style:name="P5" style:family="paragraph" style:parent-style-name="Standard">
      <style:paragraph-properties fo:line-height="115%"/>
      <style:text-properties style:font-name="Times New Roman" fo:font-size="14pt" fo:font-weight="bold" style:font-size-asian="14pt" style:font-size-complex="14pt"/>
    </style:style>
    <style:style style:name="P6" style:family="paragraph" style:parent-style-name="Standard">
      <style:paragraph-properties fo:margin-left="0.801cm" fo:margin-top="0cm" fo:margin-bottom="0.101cm" style:contextual-spacing="false" fo:line-height="115%"/>
      <style:text-properties style:font-name="Times New Roman" fo:font-size="14pt" fo:font-weight="bold" style:font-size-asian="14pt" style:font-size-complex="14pt"/>
    </style:style>
    <style:style style:name="P7" style:family="paragraph" style:parent-style-name="Standard">
      <style:paragraph-properties fo:margin-top="0cm" fo:margin-bottom="0.199cm" style:contextual-spacing="false" fo:line-height="115%"/>
      <style:text-properties style:font-name="Times New Roman" fo:font-size="14pt" fo:font-weight="bold" style:font-size-asian="14pt" style:font-size-complex="14pt"/>
    </style:style>
    <style:style style:name="P8" style:family="paragraph" style:parent-style-name="Standard">
      <style:paragraph-properties fo:margin-top="0.097cm" fo:margin-bottom="0cm" style:contextual-spacing="false" fo:line-height="115%"/>
      <style:text-properties style:font-name="Times New Roman" fo:font-size="14pt" fo:font-weight="bold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style:font-name="Times New Roman" fo:font-size="14pt" fo:font-weight="bold" style:font-size-asian="14pt" style:font-size-complex="14pt"/>
    </style:style>
    <style:style style:name="P10" style:family="paragraph" style:parent-style-name="Standard">
      <style:paragraph-properties fo:margin-top="0cm" fo:margin-bottom="0.199cm" style:contextual-spacing="false" fo:line-height="115%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left="0.801cm" fo:margin-top="0cm" fo:margin-bottom="0.101cm" style:contextual-spacing="false" fo:line-height="115%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line-height="115%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line-height="115%" fo:text-align="center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top="0cm" fo:margin-bottom="0.199cm" style:contextual-spacing="false" fo:line-height="115%"/>
      <style:text-properties style:font-name="Times New Roman" fo:font-size="14pt" fo:font-style="italic" style:font-size-asian="14pt" style:font-size-complex="14pt"/>
    </style:style>
    <style:style style:name="P15" style:family="paragraph" style:parent-style-name="Standard">
      <style:paragraph-properties fo:margin-top="0.3cm" fo:margin-bottom="0.3cm" style:contextual-spacing="false" fo:line-height="115%"/>
      <style:text-properties fo:color="#666666" loext:opacity="100%" style:font-name="Times New Roman" fo:font-size="14pt" fo:font-style="italic" style:font-size-asian="14pt" style:font-size-complex="14pt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ОТЧЁТ</text:h>
      <text:p text:style-name="P2">по лабораторной работе №8</text:p>
      <text:p text:style-name="P2">по дисциплине «Моделирование бизнес-процессов»</text:p>
      <text:p text:style-name="P10"><text:span text:style-name="T1"/></text:p>
      <text:p text:style-name="P10"><text:span text:style-name="T1">Тема:</text:span> Моделирование бизнес-процессов предприятия с использованием инструментальной среды Draw.io</text:p>
      <text:p text:style-name="P10">Выполнил: студент группы БИНOZS-331 Трофимов А.Н.</text:p>
      <text:p text:style-name="P10"/>
      <text:p text:style-name="P4">1. Введение</text:p>
      <text:p text:style-name="P10">Моделирование бизнес-процессов является ключевым инструментом управления современными организациями. Формализация процессов позволяет выявить узкие места, устранить дублирование функций, оптимизировать распределение ресурсов и повысить прозрачность операционной деятельности.</text:p>
      <text:p text:style-name="P10">Нотация BPMN 2.0 (Business Process Model and Notation) представляет собой международный стандарт (ISO/IEC 19510:2013), разработанный организацией OMG, для графического описания бизнес-процессов. BPMN обеспечивает единый визуальный язык, понятный как бизнес-аналитикам, так и техническим специалистам, что делает её наиболее распространённой нотацией в области процессного управления.</text:p>
      <text:p text:style-name="P10">Целью данной лабораторной работы является практическое освоение моделирования бизнес-процессов в нотации BPMN 2.0 с использованием инструментальной среды Draw.io, а также анализ функциональных возможностей данного инструмента.</text:p>
      <text:p text:style-name="P10"/>
      <text:p text:style-name="P9">2. Теоретическая часть</text:p>
      <text:p text:style-name="P4">2.1. Стандарт BPMN 2.0</text:p>
      <text:p text:style-name="P10">BPMN 2.0 — стандарт визуального моделирования бизнес-процессов, определяющий набор графических элементов и правил их соединения. Основные категории элементов:</text:p>
      <text:p text:style-name="P11"><text:span text:style-name="T1">Объекты потока (Flow Objects):</text:span> события (Events), задачи (Activities/Tasks), шлюзы (Gateways);</text:p>
      <text:p text:style-name="P11"><text:span text:style-name="T1">Соединяющие объекты (Connecting Objects):</text:span> потоки управления (Sequence Flow), потоки сообщений (Message Flow), ассоциации (Associations);</text:p>
      <text:p text:style-name="P11"><text:soft-page-break/><text:span text:style-name="T1">Зоны ответственности (Swimlanes):</text:span> пулы (Pools) и дорожки (Lanes);</text:p>
      <text:p text:style-name="P11"><text:span text:style-name="T1">Артефакты (Artifacts):</text:span> объекты данных (Data Objects), группы (Groups), аннотации (Text Annotations).</text:p>
      <text:p text:style-name="P10">Ключевые особенности BPMN 2.0:</text:p>
      <text:p text:style-name="P11">поддержка межорганизационного взаимодействия через пулы и потоки сообщений;</text:p>
      <text:p text:style-name="P11">развитая система шлюзов (XOR, AND, OR, Event-Based, Complex);</text:p>
      <text:p text:style-name="P11">типизация задач (User Task, Service Task, Script Task и др.);</text:p>
      <text:p text:style-name="P11">возможность сериализации в исполняемый XML для BPMS-систем;</text:p>
      <text:p text:style-name="P11">стандартизация на уровне ISO/IEC 19510.</text:p>
      <text:p text:style-name="P4">2.2. Сравнение BPMN с другими нотациями</text:p>
      <table:table table:name="Table" table:style-name="Table">
        <table:table-column table:style-name="Table.A" table:number-columns-repeated="3"/>
        <table:table-column table:style-name="Table.D"/>
        <table:table-row>
          <table:table-cell table:style-name="Table.A1" office:value-type="string">
            <text:p text:style-name="P3">Критерий</text:p>
          </table:table-cell>
          <table:table-cell table:style-name="Table.A1" office:value-type="string">
            <text:p text:style-name="P3">BPMN 2.0</text:p>
          </table:table-cell>
          <table:table-cell table:style-name="Table.A1" office:value-type="string">
            <text:p text:style-name="P3">ARIS EPC</text:p>
          </table:table-cell>
          <table:table-cell table:style-name="Table.A1" office:value-type="string">
            <text:p text:style-name="P3">IDEF0</text:p>
          </table:table-cell>
        </table:table-row>
        <table:table-row>
          <table:table-cell table:style-name="Table.A1" office:value-type="string">
            <text:p text:style-name="P12">Стандарт</text:p>
          </table:table-cell>
          <table:table-cell table:style-name="Table.A1" office:value-type="string">
            <text:p text:style-name="P12">ISO/IEC 19510</text:p>
          </table:table-cell>
          <table:table-cell table:style-name="Table.A1" office:value-type="string">
            <text:p text:style-name="P12">Нет (проприетарный)</text:p>
          </table:table-cell>
          <table:table-cell table:style-name="Table.A1" office:value-type="string">
            <text:p text:style-name="P12">FIPS 183</text:p>
          </table:table-cell>
        </table:table-row>
        <table:table-row>
          <table:table-cell table:style-name="Table.A1" office:value-type="string">
            <text:p text:style-name="P12">Основной принцип</text:p>
          </table:table-cell>
          <table:table-cell table:style-name="Table.A1" office:value-type="string">
            <text:p text:style-name="P12">Поток задач с событиями</text:p>
          </table:table-cell>
          <table:table-cell table:style-name="Table.A1" office:value-type="string">
            <text:p text:style-name="P12">Чередование событий и функций</text:p>
          </table:table-cell>
          <table:table-cell table:style-name="Table.A1" office:value-type="string">
            <text:p text:style-name="P12">Функциональная декомпозиция (ICOM)</text:p>
          </table:table-cell>
        </table:table-row>
        <table:table-row>
          <table:table-cell table:style-name="Table.A1" office:value-type="string">
            <text:p text:style-name="P12">Межорганизационное взаимодействие</text:p>
          </table:table-cell>
          <table:table-cell table:style-name="Table.A1" office:value-type="string">
            <text:p text:style-name="P12">Пулы + Message Flow</text:p>
          </table:table-cell>
          <table:table-cell table:style-name="Table.A1" office:value-type="string">
            <text:p text:style-name="P12">Организационные единицы</text:p>
          </table:table-cell>
          <table:table-cell table:style-name="Table.A1" office:value-type="string">
            <text:p text:style-name="P12">Не поддерживается</text:p>
          </table:table-cell>
        </table:table-row>
        <table:table-row>
          <table:table-cell table:style-name="Table.A1" office:value-type="string">
            <text:p text:style-name="P12">Шлюзы</text:p>
          </table:table-cell>
          <table:table-cell table:style-name="Table.A1" office:value-type="string">
            <text:p text:style-name="P12">XOR, AND, OR, Event-Based, Complex</text:p>
          </table:table-cell>
          <table:table-cell table:style-name="Table.A1" office:value-type="string">
            <text:p text:style-name="P12">XOR, AND, OR</text:p>
          </table:table-cell>
          <table:table-cell table:style-name="Table.A1" office:value-type="string">
            <text:p text:style-name="P12">Нет (нет потоков управления)</text:p>
          </table:table-cell>
        </table:table-row>
        <table:table-row>
          <table:table-cell table:style-name="Table.A1" office:value-type="string">
            <text:p text:style-name="P12">Исполняемость</text:p>
          </table:table-cell>
          <table:table-cell table:style-name="Table.A1" office:value-type="string">
            <text:p text:style-name="P12">Да (BPMN XML)</text:p>
          </table:table-cell>
          <table:table-cell table:style-name="Table.A1" office:value-type="string">
            <text:p text:style-name="P12">Нет</text:p>
          </table:table-cell>
          <table:table-cell table:style-name="Table.A1" office:value-type="string">
            <text:p text:style-name="P12">Нет</text:p>
          </table:table-cell>
        </table:table-row>
        <table:table-row>
          <table:table-cell table:style-name="Table.A1" office:value-type="string">
            <text:p text:style-name="P12">Уровень детализации</text:p>
          </table:table-cell>
          <table:table-cell table:style-name="Table.A1" office:value-type="string">
            <text:p text:style-name="P12">От стратегического до исполняемого</text:p>
          </table:table-cell>
          <table:table-cell table:style-name="Table.A1" office:value-type="string">
            <text:p text:style-name="P12">Аналитический</text:p>
          </table:table-cell>
          <table:table-cell table:style-name="Table.A1" office:value-type="string">
            <text:p text:style-name="P12">Функциональный (верхнеуровневый)</text:p>
          </table:table-cell>
        </table:table-row>
        <table:table-row>
          <table:table-cell table:style-name="Table.A1" office:value-type="string">
            <text:p text:style-name="P12">Инструменты</text:p>
          </table:table-cell>
          <table:table-cell table:style-name="Table.A1" office:value-type="string">
            <text:p text:style-name="P12">Draw.io, Bizagi, Camunda, Visio</text:p>
          </table:table-cell>
          <table:table-cell table:style-name="Table.A1" office:value-type="string">
            <text:p text:style-name="P12">ARIS Platform</text:p>
          </table:table-cell>
          <table:table-cell table:style-name="Table.A1" office:value-type="string">
            <text:p text:style-name="P12">BPwin, Ramus</text:p>
          </table:table-cell>
        </table:table-row>
        <table:table-row>
          <table:table-cell table:style-name="Table.A1" office:value-type="string">
            <text:p text:style-name="P12">Целевая аудитория</text:p>
          </table:table-cell>
          <table:table-cell table:style-name="Table.A1" office:value-type="string">
            <text:p text:style-name="P12">Бизнес-аналитики + разработчики</text:p>
          </table:table-cell>
          <table:table-cell table:style-name="Table.A1" office:value-type="string">
            <text:p text:style-name="P12">Бизнес-аналитики</text:p>
          </table:table-cell>
          <table:table-cell table:style-name="Table.A1" office:value-type="string">
            <text:p text:style-name="P12">Системные аналитики</text:p>
          </table:table-cell>
        </table:table-row>
      </table:table>
      <text:p text:style-name="P10"/>
      <text:p text:style-name="P10"><text:span text:style-name="T1">BPMN vs ARIS EPC:</text:span> EPC строится на строгом чередовании событий и <text:soft-page-break/>функций, где каждая функция инициируется событием и завершается событием. BPMN более гибка — события используются для обозначения начала, конца и промежуточных точек процесса, а основной поток строится из задач. BPMN поддерживает пулы для отображения межорганизационного взаимодействия, тогда как EPC привязывает организационные единицы к функциям.</text:p>
      <text:p text:style-name="P10"><text:span text:style-name="T1">BPMN vs IDEF0:</text:span> IDEF0 описывает процесс через функциональную декомпозицию по принципу ICOM (Input, Control, Output, Mechanism) и не моделирует поток управления. BPMN, напротив, ориентирована на описание последовательности действий, условий ветвления и параллелизма. IDEF0 лучше подходит для верхнеуровневого описания «что делает система», а BPMN — для описания «как именно выполняется процесс».</text:p>
      <text:p text:style-name="P10"/>
      <text:p text:style-name="P9">3. Описание моделируемого процесса</text:p>
      <text:p text:style-name="P4">3.1. Общая характеристика</text:p>
      <text:p text:style-name="P10">В рамках лабораторной работы смоделирован бизнес-процесс <text:span text:style-name="T1">«Обработка заказа клиента»</text:span> компании <text:span text:style-name="T1">Quill</text:span>. Компания Quill специализируется на сборке и продаже компьютеров по индивидуальным заказам клиентов.</text:p>
      <text:p text:style-name="P4">3.2. Участники процесса</text:p>
      <table:table table:name="Table_1" table:style-name="Table_5f_1">
        <table:table-column table:style-name="Table_5f_1.A"/>
        <table:table-column table:style-name="Table_5f_1.B"/>
        <table:table-row>
          <table:table-cell table:style-name="Table_5f_1.A1" office:value-type="string">
            <text:p text:style-name="P5">Участник</text:p>
          </table:table-cell>
          <table:table-cell table:style-name="Table_5f_1.A1" office:value-type="string">
            <text:p text:style-name="P5">Роль в процессе</text:p>
          </table:table-cell>
        </table:table-row>
        <table:table-row>
          <table:table-cell table:style-name="Table_5f_1.A1" office:value-type="string">
            <text:p text:style-name="P12">Клиент</text:p>
          </table:table-cell>
          <table:table-cell table:style-name="Table_5f_1.A1" office:value-type="string">
            <text:p text:style-name="P12">Внешний участник — инициирует процесс звонком, получает подтверждение и готовый товар</text:p>
          </table:table-cell>
        </table:table-row>
        <table:table-row>
          <table:table-cell table:style-name="Table_5f_1.A1" office:value-type="string">
            <text:p text:style-name="P12">Отдел продаж</text:p>
          </table:table-cell>
          <table:table-cell table:style-name="Table_5f_1.A1" office:value-type="string">
            <text:p text:style-name="P12">Приём звонков, проверка наличия товара, оформление заказов, работа с альтернативами</text:p>
          </table:table-cell>
        </table:table-row>
        <table:table-row>
          <table:table-cell table:style-name="Table_5f_1.A1" office:value-type="string">
            <text:p text:style-name="P12">Производственный отдел</text:p>
          </table:table-cell>
          <table:table-cell table:style-name="Table_5f_1.A1" office:value-type="string">
            <text:p text:style-name="P12">Получение заказа на сборку, параллельная подготовка комплектующих и сборка, тестирование</text:p>
          </table:table-cell>
        </table:table-row>
        <table:table-row>
          <table:table-cell table:style-name="Table_5f_1.A1" office:value-type="string">
            <text:p text:style-name="P12">Склад / Логистика</text:p>
          </table:table-cell>
          <table:table-cell table:style-name="Table_5f_1.A1" office:value-type="string">
            <text:p text:style-name="P12">Приёмка готовой продукции, упаковка, оформление доставки, отгрузка клиенту</text:p>
          </table:table-cell>
        </table:table-row>
      </table:table>
      <text:p text:style-name="P10"/>
      <text:p text:style-name="P4"><text:soft-page-break/>3.3. Цель процесса</text:p>
      <text:p text:style-name="P10">Обеспечить полный цикл обработки заказа клиента — от приёма звонка до отгрузки готового компьютера, включая проверку наличия товара, возможность предложения альтернативы, параллельную сборку и подготовку комплектующих, тестирование качества и логистику доставки.</text:p>
      <text:p text:style-name="P4">3.4. Описание хода процесса</text:p>
      <text:p text:style-name="P11">Клиент звонит в компанию Quill (поток сообщений «Звонок клиента»).</text:p>
      <text:p text:style-name="P11">Отдел продаж принимает звонок и проверяет наличие запрашиваемого товара.</text:p>
      <text:p text:style-name="P6">XOR-шлюз «Товар в наличии?»:</text:p>
      <text:p text:style-name="P11"><text:span text:style-name="T1">Да</text:span> → Оформление заказа (с использованием бланка заказа) → Отправка подтверждения клиенту (поток сообщений «Подтверждение») → Завершение в отделе продаж.</text:p>
      <text:p text:style-name="P11"><text:span text:style-name="T1">Нет</text:span> → Предложение альтернативы клиенту → <text:span text:style-name="T1">XOR-шлюз «Клиент согласен?»:</text:span></text:p>
      <text:p text:style-name="P11"><text:span text:style-name="T1">Да</text:span> → Слияние с основным потоком → Завершение.</text:p>
      <text:p text:style-name="P11"><text:span text:style-name="T1">Нет</text:span> → Конечное событие «Заказ отклонён».</text:p>
      <text:p text:style-name="P11">После оформления заказа он передаётся в Производственный отдел (межлейновый поток).</text:p>
      <text:p text:style-name="P11"><text:span text:style-name="T1">AND-шлюз (параллельное разветвление):</text:span> одновременно запускаются две задачи — «Собрать компьютер» и «Подготовить комплектующие».</text:p>
      <text:p text:style-name="P11"><text:span text:style-name="T1">AND-шлюз (параллельное слияние):</text:span> оба потока объединяются после завершения.</text:p>
      <text:p text:style-name="P11">Проведение тестирования собранного компьютера.</text:p>
      <text:p text:style-name="P6">XOR-шлюз «Тест пройден?»:</text:p>
      <text:p text:style-name="P11"><text:span text:style-name="T1">Да</text:span> → Передать на склад.</text:p>
      <text:p text:style-name="P11"><text:span text:style-name="T1">Нет</text:span> → Вернуть на доработку → Повтор сборки (петля обратной связи).</text:p>
      <text:p text:style-name="P11">Склад / Логистика: принять на склад → упаковать заказ → оформить доставку (с использованием накладной) → отгрузить клиенту (поток сообщений «Отгрузка товара»).</text:p>
      <text:p text:style-name="P11">Конечное событие «Заказ выполнен».</text:p>
      <text:p text:style-name="P10"/>
      <text:p text:style-name="P4"/>
      <text:p text:style-name="P9"><text:soft-page-break/>4. Описание инструментальной среды Draw.io</text:p>
      <text:p text:style-name="P4">4.1. Функциональные возможности, использованные в работе</text:p>
      <text:p text:style-name="P10">Draw.io (diagrams.net) — бесплатный инструмент с открытым исходным кодом для создания диаграмм. При построении BPMN-модели были использованы следующие возможности:</text:p>
      <text:p text:style-name="P11"><text:span text:style-name="T1">Библиотека BPMN-элементов:</text:span> встроенный набор шаблонов для событий (начальное, конечное), задач (скруглённые прямоугольники), шлюзов (ромбы с маркерами X и +), пулов и дорожек (swimlanes).</text:p>
      <text:p text:style-name="P11"><text:span text:style-name="T1">Пулы и дорожки:</text:span> создание контейнеров-пулов с вертикальным разделением на горизонтальные дорожки. Поддержка вложенности элементов — задачи автоматически привязываются к дорожке.</text:p>
      <text:p text:style-name="P11"><text:span text:style-name="T1">Объекты данных:</text:span> элемент «Note» (shape=note) использован для отображения документов «Бланк заказа» и «Накладная» с пунктирными ассоциациями к задачам.</text:p>
      <text:p text:style-name="P11"><text:span text:style-name="T1">Стилизация элементов:</text:span> задание цветовой схемы через свойства fillColor/strokeColor (голубой — отдел продаж, фиолетовый — производство, зелёный — склад, оранжевый — клиент, жёлтый — шлюзы и данные, зелёный/красный — события).</text:p>
      <text:p text:style-name="P11"><text:span text:style-name="T1">Потоки сообщений:</text:span> пунктирные линии (dashed=1) с открытыми стрелками (endArrow=open) оранжевого цвета (#FF8000) между пулами.</text:p>
      <text:p text:style-name="P11"><text:span text:style-name="T1">Потоки управления:</text:span> сплошные линии с заполненными стрелками внутри пула.</text:p>
      <text:p text:style-name="P11"><text:span text:style-name="T1">Легенда:</text:span> отдельный блок-контейнер (swimlane) с образцами всех используемых символов и их пояснениями.</text:p>
      <text:p text:style-name="P11"><text:span text:style-name="T1">Экспорт:</text:span> поддержка форматов PNG (высокое разрешение), PDF, SVG, XML (.drawio).</text:p>
      <text:p text:style-name="P4">4.2. Оценка удобства интерфейса</text:p>
      <text:p text:style-name="P7">Положительные стороны:</text:p>
      <text:p text:style-name="P11">Интуитивно понятный drag-and-drop интерфейс — элементы перетаскиваются из боковой панели на холст.</text:p>
      <text:p text:style-name="P11">Автоматическая привязка к сетке (snap to grid) обеспечивает аккуратное выравнивание элементов.</text:p>
      <text:p text:style-name="P11">Контекстное подключение — при наведении курсора на элемент появляются «синие точки» для быстрого создания связей.</text:p>
      <text:p text:style-name="P11"><text:soft-page-break/>Работа в браузере без установки — достаточно открыть app.diagrams.net.</text:p>
      <text:p text:style-name="P11">Интеграция с облачными хранилищами (Google Drive, OneDrive, Dropbox) для совместной работы.</text:p>
      <text:p text:style-name="P11">XML-формат файлов (.drawio) совместим с системами контроля версий (Git).</text:p>
      <text:p text:style-name="P11">Бесплатность — отсутствие лицензионных ограничений.</text:p>
      <text:p text:style-name="P11">Поддержка нескольких страниц (вкладок) в одном файле.</text:p>
      <text:p text:style-name="P11">Горячие клавиши для быстрого редактирования (Ctrl+D — дублирование, Ctrl+Shift+F — поиск).</text:p>
      <text:p text:style-name="P7">Отрицательные стороны:</text:p>
      <text:p text:style-name="P11">Отсутствие встроенной валидации BPMN-диаграмм — инструмент не проверяет корректность соединений (например, поток управления между пулами).</text:p>
      <text:p text:style-name="P11">Нет симуляции или исполнения процессов — невозможно оценить время цикла, загрузку ресурсов, стоимость операций (в отличие от Bizagi, Camunda).</text:p>
      <text:p text:style-name="P11">При работе со сложными пулами (stackLayout) стили могут «съезжать» при редактировании — требуется ручная корректировка XML.</text:p>
      <text:p text:style-name="P11">Отсутствие автоматической компоновки (auto-layout) специально для BPMN — элементы размещаются вручную.</text:p>
      <text:p text:style-name="P11">Нет генерации исполняемого BPMN XML для импорта в BPMS-системы.</text:p>
      <text:p text:style-name="P11">Ограниченные средства документирования — нет встроенного генератора описаний процессов.</text:p>
      <text:p text:style-name="P4">4.3. Сравнение с другими инструментами</text:p>
      <table:table table:name="Table_2" table:style-name="Table_5f_2">
        <table:table-column table:style-name="Table_5f_2.A" table:number-columns-repeated="4"/>
        <table:table-column table:style-name="Table_5f_2.E"/>
        <table:table-row>
          <table:table-cell table:style-name="Table_5f_2.A1" office:value-type="string">
            <text:p text:style-name="P3">Критерий</text:p>
          </table:table-cell>
          <table:table-cell table:style-name="Table_5f_2.A1" office:value-type="string">
            <text:p text:style-name="P3">Draw.io</text:p>
          </table:table-cell>
          <table:table-cell table:style-name="Table_5f_2.A1" office:value-type="string">
            <text:p text:style-name="P3">Microsoft Visio</text:p>
          </table:table-cell>
          <table:table-cell table:style-name="Table_5f_2.A1" office:value-type="string">
            <text:p text:style-name="P3">Lucidchart</text:p>
          </table:table-cell>
          <table:table-cell table:style-name="Table_5f_2.A1" office:value-type="string">
            <text:p text:style-name="P3">Bizagi Modeler</text:p>
          </table:table-cell>
        </table:table-row>
        <table:table-row>
          <table:table-cell table:style-name="Table_5f_2.A2" office:value-type="string">
            <text:p text:style-name="P12">Стоимость</text:p>
          </table:table-cell>
          <table:table-cell table:style-name="Table_5f_2.A2" office:value-type="string">
            <text:p text:style-name="P12">Бесплатно</text:p>
          </table:table-cell>
          <table:table-cell table:style-name="Table_5f_2.A2" office:value-type="string">
            <text:p text:style-name="P12">Платно (от $5/мес)</text:p>
          </table:table-cell>
          <table:table-cell table:style-name="Table_5f_2.A2" office:value-type="string">
            <text:p text:style-name="P12">Freemium (от $7.95/мес)</text:p>
          </table:table-cell>
          <table:table-cell table:style-name="Table_5f_2.E2" office:value-type="string">
            <text:p text:style-name="P12">Бесплатно</text:p>
          </table:table-cell>
        </table:table-row>
        <table:table-row>
          <table:table-cell table:style-name="Table_5f_2.A2" office:value-type="string">
            <text:p text:style-name="P12">Установка</text:p>
          </table:table-cell>
          <table:table-cell table:style-name="Table_5f_2.A2" office:value-type="string">
            <text:p text:style-name="P12">Не требуется (веб)</text:p>
          </table:table-cell>
          <table:table-cell table:style-name="Table_5f_2.A2" office:value-type="string">
            <text:p text:style-name="P12">Десктоп + веб</text:p>
          </table:table-cell>
          <table:table-cell table:style-name="Table_5f_2.A2" office:value-type="string">
            <text:p text:style-name="P12">Веб</text:p>
          </table:table-cell>
          <table:table-cell table:style-name="Table_5f_2.E2" office:value-type="string">
            <text:p text:style-name="P12">Десктоп</text:p>
          </table:table-cell>
        </table:table-row>
        <table:table-row>
          <table:table-cell table:style-name="Table_5f_2.A2" office:value-type="string">
            <text:p text:style-name="P12">Библиотека BPMN</text:p>
          </table:table-cell>
          <table:table-cell table:style-name="Table_5f_2.A2" office:value-type="string">
            <text:p text:style-name="P12">Базовая</text:p>
          </table:table-cell>
          <table:table-cell table:style-name="Table_5f_2.A2" office:value-type="string">
            <text:p text:style-name="P12">Расширенная</text:p>
          </table:table-cell>
          <table:table-cell table:style-name="Table_5f_2.A2" office:value-type="string">
            <text:p text:style-name="P12">Расширенная</text:p>
          </table:table-cell>
          <table:table-cell table:style-name="Table_5f_2.E2" office:value-type="string">
            <text:p text:style-name="P12">Полная BPMN 2.0</text:p>
          </table:table-cell>
        </table:table-row>
        <table:table-row>
          <table:table-cell table:style-name="Table_5f_2.A2" office:value-type="string">
            <text:p text:style-name="P12">Валидация BPMN</text:p>
          </table:table-cell>
          <table:table-cell table:style-name="Table_5f_2.A2" office:value-type="string">
            <text:p text:style-name="P12">Нет</text:p>
          </table:table-cell>
          <table:table-cell table:style-name="Table_5f_2.A2" office:value-type="string">
            <text:p text:style-name="P12">Частичная</text:p>
          </table:table-cell>
          <table:table-cell table:style-name="Table_5f_2.A2" office:value-type="string">
            <text:p text:style-name="P12">Частичная</text:p>
          </table:table-cell>
          <table:table-cell table:style-name="Table_5f_2.E2" office:value-type="string">
            <text:p text:style-name="P12">Да</text:p>
          </table:table-cell>
        </table:table-row>
        <text:soft-page-break/>
        <table:table-row>
          <table:table-cell table:style-name="Table_5f_2.A2" office:value-type="string">
            <text:p text:style-name="P12">Симуляция</text:p>
          </table:table-cell>
          <table:table-cell table:style-name="Table_5f_2.A2" office:value-type="string">
            <text:p text:style-name="P12">Нет</text:p>
          </table:table-cell>
          <table:table-cell table:style-name="Table_5f_2.A2" office:value-type="string">
            <text:p text:style-name="P12">Нет</text:p>
          </table:table-cell>
          <table:table-cell table:style-name="Table_5f_2.A2" office:value-type="string">
            <text:p text:style-name="P12">Нет</text:p>
          </table:table-cell>
          <table:table-cell table:style-name="Table_5f_2.E2" office:value-type="string">
            <text:p text:style-name="P12">Да</text:p>
          </table:table-cell>
        </table:table-row>
        <table:table-row>
          <table:table-cell table:style-name="Table_5f_2.A2" office:value-type="string">
            <text:p text:style-name="P12">Совместная работа</text:p>
          </table:table-cell>
          <table:table-cell table:style-name="Table_5f_2.A2" office:value-type="string">
            <text:p text:style-name="P12">Через облако</text:p>
          </table:table-cell>
          <table:table-cell table:style-name="Table_5f_2.A2" office:value-type="string">
            <text:p text:style-name="P12">SharePoint</text:p>
          </table:table-cell>
          <table:table-cell table:style-name="Table_5f_2.A2" office:value-type="string">
            <text:p text:style-name="P12">Реальное время</text:p>
          </table:table-cell>
          <table:table-cell table:style-name="Table_5f_2.E2" office:value-type="string">
            <text:p text:style-name="P12">Нет</text:p>
          </table:table-cell>
        </table:table-row>
        <table:table-row>
          <table:table-cell table:style-name="Table_5f_2.A2" office:value-type="string">
            <text:p text:style-name="P12">Экспорт в BPMN XML</text:p>
          </table:table-cell>
          <table:table-cell table:style-name="Table_5f_2.A2" office:value-type="string">
            <text:p text:style-name="P12">Нет</text:p>
          </table:table-cell>
          <table:table-cell table:style-name="Table_5f_2.A2" office:value-type="string">
            <text:p text:style-name="P12">Нет</text:p>
          </table:table-cell>
          <table:table-cell table:style-name="Table_5f_2.A2" office:value-type="string">
            <text:p text:style-name="P12">Нет</text:p>
          </table:table-cell>
          <table:table-cell table:style-name="Table_5f_2.E2" office:value-type="string">
            <text:p text:style-name="P12">Да</text:p>
          </table:table-cell>
        </table:table-row>
        <table:table-row>
          <table:table-cell table:style-name="Table_5f_2.A2" office:value-type="string">
            <text:p text:style-name="P12">Формат файлов</text:p>
          </table:table-cell>
          <table:table-cell table:style-name="Table_5f_2.A2" office:value-type="string">
            <text:p text:style-name="P12">XML (.drawio)</text:p>
          </table:table-cell>
          <table:table-cell table:style-name="Table_5f_2.A2" office:value-type="string">
            <text:p text:style-name="P12">VSDX</text:p>
          </table:table-cell>
          <table:table-cell table:style-name="Table_5f_2.A2" office:value-type="string">
            <text:p text:style-name="P12">Проприетарный</text:p>
          </table:table-cell>
          <table:table-cell table:style-name="Table_5f_2.E2" office:value-type="string">
            <text:p text:style-name="P12">BPMN</text:p>
          </table:table-cell>
        </table:table-row>
      </table:table>
      <text:p text:style-name="P10"/>
      <text:p text:style-name="P10">Draw.io является оптимальным выбором для учебных целей и небольших проектов благодаря бесплатности, отсутствию необходимости установки и достаточной библиотеке элементов. Для промышленного моделирования и автоматизации процессов более подходят специализированные инструменты (Bizagi, Camunda Modeler).</text:p>
      <text:p text:style-name="P10"/>
      <text:p text:style-name="P4">5. Модель BPMN 2.0</text:p>
      <text:p text:style-name="P10">Диаграмма процесса построена в файле <text:span text:style-name="T1">BPMN_Quill.drawio</text:span> и экспортирована в форматы PNG и PDF.</text:p>
      <text:p text:style-name="P15"><draw:frame draw:style-name="fr1" draw:name="Изображение1" text:anchor-type="char" svg:width="17cm" svg:height="10.945cm" draw:z-index="0"><draw:image xlink:href="Pictures/1000000100000778000004CFFCA6C705.png" xlink:type="simple" xlink:show="embed" xlink:actuate="onLoad" draw:mime-type="image/png"/></draw:frame></text:p>
      <text:p text:style-name="P14"><text:soft-page-break/>Рисунок 1. Диаграмма BPMN 2.0 «Обработка заказа клиента» (Quill)</text:p>
      <text:p text:style-name="P15"><draw:frame draw:style-name="fr1" draw:name="Изображение2" text:anchor-type="char" svg:width="17cm" svg:height="23.213cm" draw:z-index="1"><draw:image xlink:href="Pictures/10000001000004B40000066CF62D5124.png" xlink:type="simple" xlink:show="embed" xlink:actuate="onLoad" draw:mime-type="image/png"/></draw:frame></text:p>
      <text:p text:style-name="P14">Рисунок 2. Легенда BPMN 2.0</text:p>
      <text:p text:style-name="P4"><text:soft-page-break/>5.1. Легенда</text:p>
      <text:p text:style-name="P10">На диаграмме размещена легенда «ЛЕГЕНДА BPMN 2.0», включающая образцы и пояснения для всех используемых символов:</text:p>
      <table:table table:name="Table_3" table:style-name="Table_5f_3">
        <table:table-column table:style-name="Table_5f_3.A" table:number-columns-repeated="3"/>
        <table:table-row>
          <table:table-cell table:style-name="Table_5f_3.A1" office:value-type="string">
            <text:p text:style-name="P3">Символ</text:p>
          </table:table-cell>
          <table:table-cell table:style-name="Table_5f_3.A1" office:value-type="string">
            <text:p text:style-name="P3">Обозначение</text:p>
          </table:table-cell>
          <table:table-cell table:style-name="Table_5f_3.A1" office:value-type="string">
            <text:p text:style-name="P3">Описание</text:p>
          </table:table-cell>
        </table:table-row>
        <table:table-row>
          <table:table-cell table:style-name="Table_5f_3.A1" office:value-type="string">
            <text:p text:style-name="P12">Зелёный круг (тонкая рамка)</text:p>
          </table:table-cell>
          <table:table-cell table:style-name="Table_5f_3.A1" office:value-type="string">
            <text:p text:style-name="P12">Начальное событие (Start Event)</text:p>
          </table:table-cell>
          <table:table-cell table:style-name="Table_5f_3.A1" office:value-type="string">
            <text:p text:style-name="P12">Точка начала процесса</text:p>
          </table:table-cell>
        </table:table-row>
        <table:table-row>
          <table:table-cell table:style-name="Table_5f_3.A1" office:value-type="string">
            <text:p text:style-name="P12">Красный круг (толстая рамка)</text:p>
          </table:table-cell>
          <table:table-cell table:style-name="Table_5f_3.A1" office:value-type="string">
            <text:p text:style-name="P12">Конечное событие (End Event)</text:p>
          </table:table-cell>
          <table:table-cell table:style-name="Table_5f_3.A1" office:value-type="string">
            <text:p text:style-name="P12">Точка завершения процесса</text:p>
          </table:table-cell>
        </table:table-row>
        <table:table-row>
          <table:table-cell table:style-name="Table_5f_3.A1" office:value-type="string">
            <text:p text:style-name="P12">Скруглённый прямоугольник</text:p>
          </table:table-cell>
          <table:table-cell table:style-name="Table_5f_3.A1" office:value-type="string">
            <text:p text:style-name="P12">Задача (Task)</text:p>
          </table:table-cell>
          <table:table-cell table:style-name="Table_5f_3.A1" office:value-type="string">
            <text:p text:style-name="P12">Атомарная операция процесса</text:p>
          </table:table-cell>
        </table:table-row>
        <table:table-row>
          <table:table-cell table:style-name="Table_5f_3.A1" office:value-type="string">
            <text:p text:style-name="P12">Ромб с «X»</text:p>
          </table:table-cell>
          <table:table-cell table:style-name="Table_5f_3.A1" office:value-type="string">
            <text:p text:style-name="P12">XOR-шлюз</text:p>
          </table:table-cell>
          <table:table-cell table:style-name="Table_5f_3.A1" office:value-type="string">
            <text:p text:style-name="P12">Исключающее ветвление — выбирается ровно один путь</text:p>
          </table:table-cell>
        </table:table-row>
        <table:table-row>
          <table:table-cell table:style-name="Table_5f_3.A1" office:value-type="string">
            <text:p text:style-name="P12">Ромб с «+»</text:p>
          </table:table-cell>
          <table:table-cell table:style-name="Table_5f_3.A1" office:value-type="string">
            <text:p text:style-name="P12">AND-шлюз</text:p>
          </table:table-cell>
          <table:table-cell table:style-name="Table_5f_3.A1" office:value-type="string">
            <text:p text:style-name="P12">Параллельное ветвление — все пути выполняются одновременно</text:p>
          </table:table-cell>
        </table:table-row>
        <table:table-row>
          <table:table-cell table:style-name="Table_5f_3.A1" office:value-type="string">
            <text:p text:style-name="P12">Фигура «записка»</text:p>
          </table:table-cell>
          <table:table-cell table:style-name="Table_5f_3.A1" office:value-type="string">
            <text:p text:style-name="P12">Объект данных (Data Object)</text:p>
          </table:table-cell>
          <table:table-cell table:style-name="Table_5f_3.A1" office:value-type="string">
            <text:p text:style-name="P12">Документ или информационный объект</text:p>
          </table:table-cell>
        </table:table-row>
        <table:table-row>
          <table:table-cell table:style-name="Table_5f_3.A1" office:value-type="string">
            <text:p text:style-name="P12">Сплошная линия →</text:p>
          </table:table-cell>
          <table:table-cell table:style-name="Table_5f_3.A1" office:value-type="string">
            <text:p text:style-name="P12">Поток управления (Sequence Flow)</text:p>
          </table:table-cell>
          <table:table-cell table:style-name="Table_5f_3.A1" office:value-type="string">
            <text:p text:style-name="P12">Последовательность выполнения внутри пула</text:p>
          </table:table-cell>
        </table:table-row>
        <table:table-row>
          <table:table-cell table:style-name="Table_5f_3.A1" office:value-type="string">
            <text:p text:style-name="P12">Пунктирная линия →</text:p>
          </table:table-cell>
          <table:table-cell table:style-name="Table_5f_3.A1" office:value-type="string">
            <text:p text:style-name="P12">Поток сообщений (Message Flow)</text:p>
          </table:table-cell>
          <table:table-cell table:style-name="Table_5f_3.A1" office:value-type="string">
            <text:p text:style-name="P12">Обмен информацией между пулами</text:p>
          </table:table-cell>
        </table:table-row>
      </table:table>
      <text:p text:style-name="P10"/>
      <text:p text:style-name="P4">5.2. Цветовое кодирование</text:p>
      <table:table table:name="Table_4" table:style-name="Table_5f_4">
        <table:table-column table:style-name="Table_5f_4.A" table:number-columns-repeated="3"/>
        <table:table-row>
          <table:table-cell table:style-name="Table_5f_4.A1" office:value-type="string">
            <text:p text:style-name="P3">Цвет</text:p>
          </table:table-cell>
          <table:table-cell table:style-name="Table_5f_4.A1" office:value-type="string">
            <text:p text:style-name="P3">Элемент</text:p>
          </table:table-cell>
          <table:table-cell table:style-name="Table_5f_4.A1" office:value-type="string">
            <text:p text:style-name="P3">Hex-код</text:p>
          </table:table-cell>
        </table:table-row>
        <table:table-row>
          <table:table-cell table:style-name="Table_5f_4.A1" office:value-type="string">
            <text:p text:style-name="P12">Голубой</text:p>
          </table:table-cell>
          <table:table-cell table:style-name="Table_5f_4.A1" office:value-type="string">
            <text:p text:style-name="P12">Задачи и дорожка «Отдел продаж»</text:p>
          </table:table-cell>
          <table:table-cell table:style-name="Table_5f_4.A1" office:value-type="string">
            <text:p text:style-name="P12">#dae8fc</text:p>
          </table:table-cell>
        </table:table-row>
        <table:table-row>
          <table:table-cell table:style-name="Table_5f_4.A1" office:value-type="string">
            <text:p text:style-name="P12">Фиолетовый</text:p>
          </table:table-cell>
          <table:table-cell table:style-name="Table_5f_4.A1" office:value-type="string">
            <text:p text:style-name="P12">Задачи и дорожка «Производственный отдел»</text:p>
          </table:table-cell>
          <table:table-cell table:style-name="Table_5f_4.A1" office:value-type="string">
            <text:p text:style-name="P12">#e1d5e7</text:p>
          </table:table-cell>
        </table:table-row>
        <table:table-row>
          <table:table-cell table:style-name="Table_5f_4.A1" office:value-type="string">
            <text:p text:style-name="P12">Зелёный</text:p>
          </table:table-cell>
          <table:table-cell table:style-name="Table_5f_4.A1" office:value-type="string">
            <text:p text:style-name="P12">Задачи и дорожка «Склад / Логистика»; стартовые события</text:p>
          </table:table-cell>
          <table:table-cell table:style-name="Table_5f_4.A1" office:value-type="string">
            <text:p text:style-name="P12">#d5e8d4</text:p>
          </table:table-cell>
        </table:table-row>
        <text:soft-page-break/>
        <table:table-row>
          <table:table-cell table:style-name="Table_5f_4.A1" office:value-type="string">
            <text:p text:style-name="P12">Оранжевый</text:p>
          </table:table-cell>
          <table:table-cell table:style-name="Table_5f_4.A1" office:value-type="string">
            <text:p text:style-name="P12">Пул и задачи «Клиент»; потоки сообщений</text:p>
          </table:table-cell>
          <table:table-cell table:style-name="Table_5f_4.A1" office:value-type="string">
            <text:p text:style-name="P12">#ffe6cc / #FF8000</text:p>
          </table:table-cell>
        </table:table-row>
        <table:table-row>
          <table:table-cell table:style-name="Table_5f_4.A1" office:value-type="string">
            <text:p text:style-name="P12">Жёлтый</text:p>
          </table:table-cell>
          <table:table-cell table:style-name="Table_5f_4.A1" office:value-type="string">
            <text:p text:style-name="P12">Шлюзы и объекты данных</text:p>
          </table:table-cell>
          <table:table-cell table:style-name="Table_5f_4.A1" office:value-type="string">
            <text:p text:style-name="P12">#fff2cc</text:p>
          </table:table-cell>
        </table:table-row>
        <table:table-row>
          <table:table-cell table:style-name="Table_5f_4.A1" office:value-type="string">
            <text:p text:style-name="P12">Красный</text:p>
          </table:table-cell>
          <table:table-cell table:style-name="Table_5f_4.A1" office:value-type="string">
            <text:p text:style-name="P12">Конечные события</text:p>
          </table:table-cell>
          <table:table-cell table:style-name="Table_5f_4.A1" office:value-type="string">
            <text:p text:style-name="P12">#f8cecc</text:p>
          </table:table-cell>
        </table:table-row>
      </table:table>
      <text:p text:style-name="P10"/>
      <text:p text:style-name="P10"/>
      <text:p text:style-name="P9">6. Анализ модели</text:p>
      <text:p text:style-name="P4">6.1. Пулы и дорожки</text:p>
      <text:p text:style-name="P10"><text:span text:style-name="T1">Пул «Компания Quill»</text:span> — основной участник процесса. Содержит 3 дорожки:</text:p>
      <table:table table:name="Table_5" table:style-name="Table_5f_5">
        <table:table-column table:style-name="Table_5f_5.A" table:number-columns-repeated="3"/>
        <table:table-column table:style-name="Table_5f_5.D"/>
        <table:table-row>
          <table:table-cell table:style-name="Table_5f_5.A1" office:value-type="string">
            <text:p text:style-name="P3">Дорожка</text:p>
          </table:table-cell>
          <table:table-cell table:style-name="Table_5f_5.A1" office:value-type="string">
            <text:p text:style-name="P3">Назначение</text:p>
          </table:table-cell>
          <table:table-cell table:style-name="Table_5f_5.A1" office:value-type="string">
            <text:p text:style-name="P3">Цвет</text:p>
          </table:table-cell>
          <table:table-cell table:style-name="Table_5f_5.A1" office:value-type="string">
            <text:p text:style-name="P3">Количество задач</text:p>
          </table:table-cell>
        </table:table-row>
        <table:table-row>
          <table:table-cell table:style-name="Table_5f_5.A1" office:value-type="string">
            <text:p text:style-name="P12">Отдел продаж</text:p>
          </table:table-cell>
          <table:table-cell table:style-name="Table_5f_5.A1" office:value-type="string">
            <text:p text:style-name="P12">Приём звонков, проверка наличия, оформление заказов, работа с альтернативами, отправка подтверждений</text:p>
          </table:table-cell>
          <table:table-cell table:style-name="Table_5f_5.A1" office:value-type="string">
            <text:p text:style-name="P12">Голубой</text:p>
          </table:table-cell>
          <table:table-cell table:style-name="Table_5f_5.A1" office:value-type="string">
            <text:p text:style-name="P12">5</text:p>
          </table:table-cell>
        </table:table-row>
        <table:table-row>
          <table:table-cell table:style-name="Table_5f_5.A1" office:value-type="string">
            <text:p text:style-name="P12">Производственный отдел</text:p>
          </table:table-cell>
          <table:table-cell table:style-name="Table_5f_5.A1" office:value-type="string">
            <text:p text:style-name="P12">Получение заказа, параллельная сборка и подготовка комплектующих, тестирование, передача на склад</text:p>
          </table:table-cell>
          <table:table-cell table:style-name="Table_5f_5.A1" office:value-type="string">
            <text:p text:style-name="P12">Фиолетовый</text:p>
          </table:table-cell>
          <table:table-cell table:style-name="Table_5f_5.A1" office:value-type="string">
            <text:p text:style-name="P12">6</text:p>
          </table:table-cell>
        </table:table-row>
        <table:table-row>
          <table:table-cell table:style-name="Table_5f_5.A1" office:value-type="string">
            <text:p text:style-name="P12">Склад / Логистика</text:p>
          </table:table-cell>
          <table:table-cell table:style-name="Table_5f_5.A1" office:value-type="string">
            <text:p text:style-name="P12">Приёмка продукции, упаковка, оформление доставки, отгрузка</text:p>
          </table:table-cell>
          <table:table-cell table:style-name="Table_5f_5.A1" office:value-type="string">
            <text:p text:style-name="P12">Зелёный</text:p>
          </table:table-cell>
          <table:table-cell table:style-name="Table_5f_5.A1" office:value-type="string">
            <text:p text:style-name="P12">4</text:p>
          </table:table-cell>
        </table:table-row>
      </table:table>
      <text:p text:style-name="P10"/>
      <text:p text:style-name="P10"><text:span text:style-name="T1">Пул «Клиент»</text:span> — внешний участник. Содержит 1 дорожку с 3 задачами. Взаимодействие с компанией осуществляется через потоки сообщений.</text:p>
      <text:p text:style-name="P8"/>
      <text:p text:style-name="P8"><text:soft-page-break/>6.2. Описание всех задач</text:p>
      <text:p text:style-name="P4">Отдел продаж (5 задач)</text:p>
      <table:table table:name="Table_6" table:style-name="Table_5f_6">
        <table:table-column table:style-name="Table_5f_6.A"/>
        <table:table-column table:style-name="Table_5f_6.B"/>
        <table:table-column table:style-name="Table_5f_6.C"/>
        <table:table-column table:style-name="Table_5f_6.D"/>
        <table:table-column table:style-name="Table_5f_6.E"/>
        <table:table-row>
          <table:table-cell table:style-name="Table_5f_6.A1" office:value-type="string">
            <text:p text:style-name="P3">№</text:p>
          </table:table-cell>
          <table:table-cell table:style-name="Table_5f_6.A1" office:value-type="string">
            <text:p text:style-name="P3">Задача</text:p>
          </table:table-cell>
          <table:table-cell table:style-name="Table_5f_6.A1" office:value-type="string">
            <text:p text:style-name="P3">Описание</text:p>
          </table:table-cell>
          <table:table-cell table:style-name="Table_5f_6.A1" office:value-type="string">
            <text:p text:style-name="P3">Входящий поток</text:p>
          </table:table-cell>
          <table:table-cell table:style-name="Table_5f_6.A1" office:value-type="string">
            <text:p text:style-name="P3">Исходящий поток</text:p>
          </table:table-cell>
        </table:table-row>
        <table:table-row>
          <table:table-cell table:style-name="Table_5f_6.A1" office:value-type="string">
            <text:p text:style-name="P13">1</text:p>
          </table:table-cell>
          <table:table-cell table:style-name="Table_5f_6.B2" office:value-type="string">
            <text:p text:style-name="P12">Принять звонок клиента</text:p>
          </table:table-cell>
          <table:table-cell table:style-name="Table_5f_6.C2" office:value-type="string">
            <text:p text:style-name="P12">Приём входящего звонка от клиента, фиксация запроса</text:p>
          </table:table-cell>
          <table:table-cell table:style-name="Table_5f_6.D2" office:value-type="string">
            <text:p text:style-name="P12">Стартовое событие; Message Flow «Звонок клиента»</text:p>
          </table:table-cell>
          <table:table-cell table:style-name="Table_5f_6.E2" office:value-type="string">
            <text:p text:style-name="P12">→ Проверить наличие товара</text:p>
          </table:table-cell>
        </table:table-row>
        <table:table-row>
          <table:table-cell table:style-name="Table_5f_6.A1" office:value-type="string">
            <text:p text:style-name="P13">2</text:p>
          </table:table-cell>
          <table:table-cell table:style-name="Table_5f_6.B2" office:value-type="string">
            <text:p text:style-name="P12">Проверить наличие товара</text:p>
          </table:table-cell>
          <table:table-cell table:style-name="Table_5f_6.C3" office:value-type="string">
            <text:p text:style-name="P12">Проверка наличия запрашиваемой конфигурации на складе</text:p>
          </table:table-cell>
          <table:table-cell table:style-name="Table_5f_6.D2" office:value-type="string">
            <text:p text:style-name="P12">← Принять звонок клиента</text:p>
          </table:table-cell>
          <table:table-cell table:style-name="Table_5f_6.E3" office:value-type="string">
            <text:p text:style-name="P12">→ XOR «Товар в наличии?»</text:p>
          </table:table-cell>
        </table:table-row>
        <table:table-row>
          <table:table-cell table:style-name="Table_5f_6.A1" office:value-type="string">
            <text:p text:style-name="P13">3</text:p>
          </table:table-cell>
          <table:table-cell table:style-name="Table_5f_6.B2" office:value-type="string">
            <text:p text:style-name="P12">Оформить заказ</text:p>
          </table:table-cell>
          <table:table-cell table:style-name="Table_5f_6.C4" office:value-type="string">
            <text:p text:style-name="P12">Создание заказа в системе с использованием бланка заказа</text:p>
          </table:table-cell>
          <table:table-cell table:style-name="Table_5f_6.D2" office:value-type="string">
            <text:p text:style-name="P12">← XOR (Да)</text:p>
          </table:table-cell>
          <table:table-cell table:style-name="Table_5f_6.E4" office:value-type="string">
            <text:p text:style-name="P12">→ Отправить подтверждение; → Получить заказ на сборку</text:p>
          </table:table-cell>
        </table:table-row>
        <table:table-row>
          <table:table-cell table:style-name="Table_5f_6.A1" office:value-type="string">
            <text:p text:style-name="P13">4</text:p>
          </table:table-cell>
          <table:table-cell table:style-name="Table_5f_6.B2" office:value-type="string">
            <text:p text:style-name="P12">Отправить подтверждение клиенту</text:p>
          </table:table-cell>
          <table:table-cell table:style-name="Table_5f_6.C5" office:value-type="string">
            <text:p text:style-name="P12">Уведомление клиента о принятии заказа</text:p>
          </table:table-cell>
          <table:table-cell table:style-name="Table_5f_6.D2" office:value-type="string">
            <text:p text:style-name="P12">← Оформить заказ</text:p>
          </table:table-cell>
          <table:table-cell table:style-name="Table_5f_6.E5" office:value-type="string">
            <text:p text:style-name="P12">→ XOR-слияние; Message Flow «Подтверждение»</text:p>
          </table:table-cell>
        </table:table-row>
        <table:table-row>
          <table:table-cell table:style-name="Table_5f_6.A1" office:value-type="string">
            <text:p text:style-name="P13">5</text:p>
          </table:table-cell>
          <table:table-cell table:style-name="Table_5f_6.B2" office:value-type="string">
            <text:p text:style-name="P12">Предложить альтернативу</text:p>
          </table:table-cell>
          <table:table-cell table:style-name="Table_5f_6.C6" office:value-type="string">
            <text:p text:style-name="P12">Подбор альтернативной конфигурации при отсутствии товара</text:p>
          </table:table-cell>
          <table:table-cell table:style-name="Table_5f_6.D2" office:value-type="string">
            <text:p text:style-name="P12">← XOR (Нет)</text:p>
          </table:table-cell>
          <table:table-cell table:style-name="Table_5f_6.E6" office:value-type="string">
            <text:p text:style-name="P12">→ XOR «Клиент согласен?»</text:p>
          </table:table-cell>
        </table:table-row>
      </table:table>
      <text:p text:style-name="P10"/>
      <text:p text:style-name="P4">Производственный отдел (6 задач)</text:p>
      <table:table table:name="Table_7" table:style-name="Table_5f_7">
        <table:table-column table:style-name="Table_5f_7.A"/>
        <table:table-column table:style-name="Table_5f_7.B"/>
        <table:table-column table:style-name="Table_5f_7.C"/>
        <table:table-column table:style-name="Table_5f_7.D"/>
        <table:table-column table:style-name="Table_5f_7.E"/>
        <table:table-row>
          <table:table-cell table:style-name="Table_5f_7.A1" office:value-type="string">
            <text:p text:style-name="P3">№</text:p>
          </table:table-cell>
          <table:table-cell table:style-name="Table_5f_7.A1" office:value-type="string">
            <text:p text:style-name="P3">Задача</text:p>
          </table:table-cell>
          <table:table-cell table:style-name="Table_5f_7.A1" office:value-type="string">
            <text:p text:style-name="P3">Описание</text:p>
          </table:table-cell>
          <table:table-cell table:style-name="Table_5f_7.A1" office:value-type="string">
            <text:p text:style-name="P3">Входящий поток</text:p>
          </table:table-cell>
          <table:table-cell table:style-name="Table_5f_7.A1" office:value-type="string">
            <text:p text:style-name="P3">Исходящий поток</text:p>
          </table:table-cell>
        </table:table-row>
        <table:table-row>
          <table:table-cell table:style-name="Table_5f_7.A1" office:value-type="string">
            <text:p text:style-name="P13">6</text:p>
          </table:table-cell>
          <table:table-cell table:style-name="Table_5f_7.B2" office:value-type="string">
            <text:p text:style-name="P12">Получить заказ на сборку</text:p>
          </table:table-cell>
          <table:table-cell table:style-name="Table_5f_7.C2" office:value-type="string">
            <text:p text:style-name="P12">Приём заказа из отдела продаж</text:p>
          </table:table-cell>
          <table:table-cell table:style-name="Table_5f_7.D2" office:value-type="string">
            <text:p text:style-name="P12">← Оформить заказ (межлейновый)</text:p>
          </table:table-cell>
          <table:table-cell table:style-name="Table_5f_7.E2" office:value-type="string">
            <text:p text:style-name="P12">→ AND-разветвление</text:p>
          </table:table-cell>
        </table:table-row>
        <text:soft-page-break/>
        <table:table-row>
          <table:table-cell table:style-name="Table_5f_7.A1" office:value-type="string">
            <text:p text:style-name="P13">7</text:p>
          </table:table-cell>
          <table:table-cell table:style-name="Table_5f_7.B2" office:value-type="string">
            <text:p text:style-name="P12">Собрать компьютер</text:p>
          </table:table-cell>
          <table:table-cell table:style-name="Table_5f_7.C3" office:value-type="string">
            <text:p text:style-name="P12">Сборка ПК по спецификации заказа</text:p>
          </table:table-cell>
          <table:table-cell table:style-name="Table_5f_7.D2" office:value-type="string">
            <text:p text:style-name="P12">← AND-разветвление (параллельно)</text:p>
          </table:table-cell>
          <table:table-cell table:style-name="Table_5f_7.E3" office:value-type="string">
            <text:p text:style-name="P12">→ AND-слияние</text:p>
          </table:table-cell>
        </table:table-row>
        <table:table-row>
          <table:table-cell table:style-name="Table_5f_7.A1" office:value-type="string">
            <text:p text:style-name="P13">8</text:p>
          </table:table-cell>
          <table:table-cell table:style-name="Table_5f_7.B2" office:value-type="string">
            <text:p text:style-name="P12">Подготовить комплектующие</text:p>
          </table:table-cell>
          <table:table-cell table:style-name="Table_5f_7.C4" office:value-type="string">
            <text:p text:style-name="P12">Комплектование набора деталей для сборки</text:p>
          </table:table-cell>
          <table:table-cell table:style-name="Table_5f_7.D2" office:value-type="string">
            <text:p text:style-name="P12">← AND-разветвление (параллельно)</text:p>
          </table:table-cell>
          <table:table-cell table:style-name="Table_5f_7.E4" office:value-type="string">
            <text:p text:style-name="P12">→ AND-слияние</text:p>
          </table:table-cell>
        </table:table-row>
        <table:table-row>
          <table:table-cell table:style-name="Table_5f_7.A1" office:value-type="string">
            <text:p text:style-name="P13">9</text:p>
          </table:table-cell>
          <table:table-cell table:style-name="Table_5f_7.B2" office:value-type="string">
            <text:p text:style-name="P12">Провести тестирование</text:p>
          </table:table-cell>
          <table:table-cell table:style-name="Table_5f_7.C5" office:value-type="string">
            <text:p text:style-name="P12">Проверка работоспособности собранного компьютера</text:p>
          </table:table-cell>
          <table:table-cell table:style-name="Table_5f_7.D2" office:value-type="string">
            <text:p text:style-name="P12">← AND-слияние</text:p>
          </table:table-cell>
          <table:table-cell table:style-name="Table_5f_7.E5" office:value-type="string">
            <text:p text:style-name="P12">→ XOR «Тест пройден?»</text:p>
          </table:table-cell>
        </table:table-row>
        <table:table-row>
          <table:table-cell table:style-name="Table_5f_7.A1" office:value-type="string">
            <text:p text:style-name="P13">10</text:p>
          </table:table-cell>
          <table:table-cell table:style-name="Table_5f_7.B2" office:value-type="string">
            <text:p text:style-name="P12">Передать на склад</text:p>
          </table:table-cell>
          <table:table-cell table:style-name="Table_5f_7.C6" office:value-type="string">
            <text:p text:style-name="P12">Передача прошедшего тестирование компьютера на склад</text:p>
          </table:table-cell>
          <table:table-cell table:style-name="Table_5f_7.D2" office:value-type="string">
            <text:p text:style-name="P12">← XOR (Да)</text:p>
          </table:table-cell>
          <table:table-cell table:style-name="Table_5f_7.E6" office:value-type="string">
            <text:p text:style-name="P12">→ Принять на склад (межлейновый)</text:p>
          </table:table-cell>
        </table:table-row>
        <table:table-row>
          <table:table-cell table:style-name="Table_5f_7.A1" office:value-type="string">
            <text:p text:style-name="P13">11</text:p>
          </table:table-cell>
          <table:table-cell table:style-name="Table_5f_7.B2" office:value-type="string">
            <text:p text:style-name="P12">Вернуть на доработку</text:p>
          </table:table-cell>
          <table:table-cell table:style-name="Table_5f_7.C7" office:value-type="string">
            <text:p text:style-name="P12">Возврат бракованного изделия на повторную сборку</text:p>
          </table:table-cell>
          <table:table-cell table:style-name="Table_5f_7.D2" office:value-type="string">
            <text:p text:style-name="P12">← XOR (Нет)</text:p>
          </table:table-cell>
          <table:table-cell table:style-name="Table_5f_7.E7" office:value-type="string">
            <text:p text:style-name="P12">→ Собрать компьютер (петля)</text:p>
          </table:table-cell>
        </table:table-row>
      </table:table>
      <text:p text:style-name="P10"/>
      <text:p text:style-name="P4">Склад / Логистика (4 задачи)</text:p>
      <table:table table:name="Table_8" table:style-name="Table_5f_8">
        <table:table-column table:style-name="Table_5f_8.A"/>
        <table:table-column table:style-name="Table_5f_8.B"/>
        <table:table-column table:style-name="Table_5f_8.C"/>
        <table:table-column table:style-name="Table_5f_8.D"/>
        <table:table-column table:style-name="Table_5f_8.E"/>
        <table:table-row>
          <table:table-cell table:style-name="Table_5f_8.A1" office:value-type="string">
            <text:p text:style-name="P3">№</text:p>
          </table:table-cell>
          <table:table-cell table:style-name="Table_5f_8.A1" office:value-type="string">
            <text:p text:style-name="P3">Задача</text:p>
          </table:table-cell>
          <table:table-cell table:style-name="Table_5f_8.A1" office:value-type="string">
            <text:p text:style-name="P3">Описание</text:p>
          </table:table-cell>
          <table:table-cell table:style-name="Table_5f_8.A1" office:value-type="string">
            <text:p text:style-name="P3">Входящий поток</text:p>
          </table:table-cell>
          <table:table-cell table:style-name="Table_5f_8.A1" office:value-type="string">
            <text:p text:style-name="P3">Исходящий поток</text:p>
          </table:table-cell>
        </table:table-row>
        <table:table-row>
          <table:table-cell table:style-name="Table_5f_8.A1" office:value-type="string">
            <text:p text:style-name="P13">12</text:p>
          </table:table-cell>
          <table:table-cell table:style-name="Table_5f_8.B2" office:value-type="string">
            <text:p text:style-name="P12">Принять на склад</text:p>
          </table:table-cell>
          <table:table-cell table:style-name="Table_5f_8.C2" office:value-type="string">
            <text:p text:style-name="P12">Приёмка готового компьютера с производства</text:p>
          </table:table-cell>
          <table:table-cell table:style-name="Table_5f_8.D2" office:value-type="string">
            <text:p text:style-name="P12">← Передать на склад (межлейновый)</text:p>
          </table:table-cell>
          <table:table-cell table:style-name="Table_5f_8.E2" office:value-type="string">
            <text:p text:style-name="P12">→ Упаковать заказ</text:p>
          </table:table-cell>
        </table:table-row>
        <table:table-row>
          <table:table-cell table:style-name="Table_5f_8.A1" office:value-type="string">
            <text:p text:style-name="P13">13</text:p>
          </table:table-cell>
          <table:table-cell table:style-name="Table_5f_8.B2" office:value-type="string">
            <text:p text:style-name="P12">Упаковать заказ</text:p>
          </table:table-cell>
          <table:table-cell table:style-name="Table_5f_8.C3" office:value-type="string">
            <text:p text:style-name="P12">Упаковка компьютера для транспортировки</text:p>
          </table:table-cell>
          <table:table-cell table:style-name="Table_5f_8.D2" office:value-type="string">
            <text:p text:style-name="P12">← Принять на склад</text:p>
          </table:table-cell>
          <table:table-cell table:style-name="Table_5f_8.E3" office:value-type="string">
            <text:p text:style-name="P12">→ Оформить доставку</text:p>
          </table:table-cell>
        </table:table-row>
        <table:table-row>
          <table:table-cell table:style-name="Table_5f_8.A1" office:value-type="string">
            <text:p text:style-name="P13">14</text:p>
          </table:table-cell>
          <table:table-cell table:style-name="Table_5f_8.B2" office:value-type="string">
            <text:p text:style-name="P12">Оформить доставку</text:p>
          </table:table-cell>
          <table:table-cell table:style-name="Table_5f_8.C4" office:value-type="string">
            <text:p text:style-name="P12">Формирование сопроводительных документов (накладная)</text:p>
          </table:table-cell>
          <table:table-cell table:style-name="Table_5f_8.D2" office:value-type="string">
            <text:p text:style-name="P12">← Упаковать заказ</text:p>
          </table:table-cell>
          <table:table-cell table:style-name="Table_5f_8.E4" office:value-type="string">
            <text:p text:style-name="P12">→ Отгрузить клиенту</text:p>
          </table:table-cell>
        </table:table-row>
        <table:table-row>
          <table:table-cell table:style-name="Table_5f_8.A1" office:value-type="string">
            <text:p text:style-name="P13">15</text:p>
          </table:table-cell>
          <table:table-cell table:style-name="Table_5f_8.B2" office:value-type="string">
            <text:p text:style-name="P12">Отгрузить клиенту</text:p>
          </table:table-cell>
          <table:table-cell table:style-name="Table_5f_8.C5" office:value-type="string">
            <text:p text:style-name="P12">Физическая отправка заказа клиенту</text:p>
          </table:table-cell>
          <table:table-cell table:style-name="Table_5f_8.D2" office:value-type="string">
            <text:p text:style-name="P12">← Оформить доставку</text:p>
          </table:table-cell>
          <table:table-cell table:style-name="Table_5f_8.E5" office:value-type="string">
            <text:p text:style-name="P12">→ Заказ выполнен; Message Flow «Отгрузка товара»</text:p>
          </table:table-cell>
        </table:table-row>
      </table:table>
      <text:p text:style-name="P10"><text:soft-page-break/></text:p>
      <text:p text:style-name="P4">Клиент (3 задачи)</text:p>
      <table:table table:name="Table_9" table:style-name="Table_5f_9">
        <table:table-column table:style-name="Table_5f_9.A"/>
        <table:table-column table:style-name="Table_5f_9.B"/>
        <table:table-column table:style-name="Table_5f_9.C"/>
        <table:table-row>
          <table:table-cell table:style-name="Table_5f_9.A1" office:value-type="string">
            <text:p text:style-name="P3">№</text:p>
          </table:table-cell>
          <table:table-cell table:style-name="Table_5f_9.A1" office:value-type="string">
            <text:p text:style-name="P3">Задача</text:p>
          </table:table-cell>
          <table:table-cell table:style-name="Table_5f_9.A1" office:value-type="string">
            <text:p text:style-name="P3">Описание</text:p>
          </table:table-cell>
        </table:table-row>
        <table:table-row>
          <table:table-cell table:style-name="Table_5f_9.A1" office:value-type="string">
            <text:p text:style-name="P13">16</text:p>
          </table:table-cell>
          <table:table-cell table:style-name="Table_5f_9.B2" office:value-type="string">
            <text:p text:style-name="P12">Позвонить в компанию</text:p>
          </table:table-cell>
          <table:table-cell table:style-name="Table_5f_9.C2" office:value-type="string">
            <text:p text:style-name="P12">Клиент инициирует обращение по телефону</text:p>
          </table:table-cell>
        </table:table-row>
        <table:table-row>
          <table:table-cell table:style-name="Table_5f_9.A1" office:value-type="string">
            <text:p text:style-name="P13">17</text:p>
          </table:table-cell>
          <table:table-cell table:style-name="Table_5f_9.B3" office:value-type="string">
            <text:p text:style-name="P12">Получить подтверждение</text:p>
          </table:table-cell>
          <table:table-cell table:style-name="Table_5f_9.C3" office:value-type="string">
            <text:p text:style-name="P12">Клиент получает подтверждение о принятии заказа</text:p>
          </table:table-cell>
        </table:table-row>
        <table:table-row>
          <table:table-cell table:style-name="Table_5f_9.A1" office:value-type="string">
            <text:p text:style-name="P13">18</text:p>
          </table:table-cell>
          <table:table-cell table:style-name="Table_5f_9.B4" office:value-type="string">
            <text:p text:style-name="P12">Получить товар</text:p>
          </table:table-cell>
          <table:table-cell table:style-name="Table_5f_9.C4" office:value-type="string">
            <text:p text:style-name="P12">Клиент получает готовый компьютер</text:p>
          </table:table-cell>
        </table:table-row>
      </table:table>
      <text:p text:style-name="P10"/>
      <text:p text:style-name="P4">6.3. Описание событий</text:p>
      <table:table table:name="Table_10" table:style-name="Table_5f_10">
        <table:table-column table:style-name="Table_5f_10.A"/>
        <table:table-column table:style-name="Table_5f_10.B"/>
        <table:table-column table:style-name="Table_5f_10.C"/>
        <table:table-column table:style-name="Table_5f_10.D"/>
        <table:table-column table:style-name="Table_5f_10.E"/>
        <table:table-row>
          <table:table-cell table:style-name="Table_5f_10.A1" office:value-type="string">
            <text:p text:style-name="P3">№</text:p>
          </table:table-cell>
          <table:table-cell table:style-name="Table_5f_10.A1" office:value-type="string">
            <text:p text:style-name="P3">Тип события</text:p>
          </table:table-cell>
          <table:table-cell table:style-name="Table_5f_10.A1" office:value-type="string">
            <text:p text:style-name="P3">Название</text:p>
          </table:table-cell>
          <table:table-cell table:style-name="Table_5f_10.A1" office:value-type="string">
            <text:p text:style-name="P3">Расположение</text:p>
          </table:table-cell>
          <table:table-cell table:style-name="Table_5f_10.A1" office:value-type="string">
            <text:p text:style-name="P3">Описание</text:p>
          </table:table-cell>
        </table:table-row>
        <table:table-row>
          <table:table-cell table:style-name="Table_5f_10.A1" office:value-type="string">
            <text:p text:style-name="P13">1</text:p>
          </table:table-cell>
          <table:table-cell table:style-name="Table_5f_10.B2" office:value-type="string">
            <text:p text:style-name="P12">Стартовое</text:p>
          </table:table-cell>
          <table:table-cell table:style-name="Table_5f_10.C2" office:value-type="string">
            <text:p text:style-name="P12">(без имени)</text:p>
          </table:table-cell>
          <table:table-cell table:style-name="Table_5f_10.D2" office:value-type="string">
            <text:p text:style-name="P12">Отдел продаж</text:p>
          </table:table-cell>
          <table:table-cell table:style-name="Table_5f_10.E2" office:value-type="string">
            <text:p text:style-name="P12">Начало процесса обработки заказа</text:p>
          </table:table-cell>
        </table:table-row>
        <table:table-row>
          <table:table-cell table:style-name="Table_5f_10.A1" office:value-type="string">
            <text:p text:style-name="P13">2</text:p>
          </table:table-cell>
          <table:table-cell table:style-name="Table_5f_10.B2" office:value-type="string">
            <text:p text:style-name="P12">Стартовое</text:p>
          </table:table-cell>
          <table:table-cell table:style-name="Table_5f_10.C3" office:value-type="string">
            <text:p text:style-name="P12">(без имени)</text:p>
          </table:table-cell>
          <table:table-cell table:style-name="Table_5f_10.D2" office:value-type="string">
            <text:p text:style-name="P12">Клиент</text:p>
          </table:table-cell>
          <table:table-cell table:style-name="Table_5f_10.E3" office:value-type="string">
            <text:p text:style-name="P12">Начало процесса со стороны клиента</text:p>
          </table:table-cell>
        </table:table-row>
        <table:table-row>
          <table:table-cell table:style-name="Table_5f_10.A1" office:value-type="string">
            <text:p text:style-name="P13">3</text:p>
          </table:table-cell>
          <table:table-cell table:style-name="Table_5f_10.B2" office:value-type="string">
            <text:p text:style-name="P12">Конечное</text:p>
          </table:table-cell>
          <table:table-cell table:style-name="Table_5f_10.C4" office:value-type="string">
            <text:p text:style-name="P12">(без имени)</text:p>
          </table:table-cell>
          <table:table-cell table:style-name="Table_5f_10.D2" office:value-type="string">
            <text:p text:style-name="P12">Отдел продаж</text:p>
          </table:table-cell>
          <table:table-cell table:style-name="Table_5f_10.E4" office:value-type="string">
            <text:p text:style-name="P12">Успешное завершение обработки в отделе продаж</text:p>
          </table:table-cell>
        </table:table-row>
        <table:table-row>
          <table:table-cell table:style-name="Table_5f_10.A1" office:value-type="string">
            <text:p text:style-name="P13">4</text:p>
          </table:table-cell>
          <table:table-cell table:style-name="Table_5f_10.B2" office:value-type="string">
            <text:p text:style-name="P12">Конечное</text:p>
          </table:table-cell>
          <table:table-cell table:style-name="Table_5f_10.C5" office:value-type="string">
            <text:p text:style-name="P12">Заказ отклонён</text:p>
          </table:table-cell>
          <table:table-cell table:style-name="Table_5f_10.D2" office:value-type="string">
            <text:p text:style-name="P12">Отдел продаж</text:p>
          </table:table-cell>
          <table:table-cell table:style-name="Table_5f_10.E5" office:value-type="string">
            <text:p text:style-name="P12">Клиент отказался от альтернативы</text:p>
          </table:table-cell>
        </table:table-row>
        <table:table-row>
          <table:table-cell table:style-name="Table_5f_10.A1" office:value-type="string">
            <text:p text:style-name="P13">5</text:p>
          </table:table-cell>
          <table:table-cell table:style-name="Table_5f_10.B2" office:value-type="string">
            <text:p text:style-name="P12">Конечное</text:p>
          </table:table-cell>
          <table:table-cell table:style-name="Table_5f_10.C6" office:value-type="string">
            <text:p text:style-name="P12">Заказ выполнен</text:p>
          </table:table-cell>
          <table:table-cell table:style-name="Table_5f_10.D2" office:value-type="string">
            <text:p text:style-name="P12">Склад / Логистика</text:p>
          </table:table-cell>
          <table:table-cell table:style-name="Table_5f_10.E6" office:value-type="string">
            <text:p text:style-name="P12">Успешная отгрузка заказа</text:p>
          </table:table-cell>
        </table:table-row>
        <table:table-row>
          <table:table-cell table:style-name="Table_5f_10.A1" office:value-type="string">
            <text:p text:style-name="P13">6</text:p>
          </table:table-cell>
          <table:table-cell table:style-name="Table_5f_10.B2" office:value-type="string">
            <text:p text:style-name="P12">Конечное</text:p>
          </table:table-cell>
          <table:table-cell table:style-name="Table_5f_10.C7" office:value-type="string">
            <text:p text:style-name="P12">(без имени)</text:p>
          </table:table-cell>
          <table:table-cell table:style-name="Table_5f_10.D2" office:value-type="string">
            <text:p text:style-name="P12">Клиент</text:p>
          </table:table-cell>
          <table:table-cell table:style-name="Table_5f_10.E7" office:value-type="string">
            <text:p text:style-name="P12">Завершение процесса со стороны клиента</text:p>
          </table:table-cell>
        </table:table-row>
      </table:table>
      <text:p text:style-name="P10"/>
      <text:p text:style-name="P4"/>
      <text:p text:style-name="P4"/>
      <text:p text:style-name="P4"><text:soft-page-break/>6.4. Описание шлюзов</text:p>
      <table:table table:name="Table_11" table:style-name="Table_5f_11">
        <table:table-column table:style-name="Table_5f_11.A"/>
        <table:table-column table:style-name="Table_5f_11.B"/>
        <table:table-column table:style-name="Table_5f_11.C"/>
        <table:table-column table:style-name="Table_5f_11.D"/>
        <table:table-column table:style-name="Table_5f_11.E"/>
        <table:table-row>
          <table:table-cell table:style-name="Table_5f_11.A1" office:value-type="string">
            <text:p text:style-name="P3">№</text:p>
          </table:table-cell>
          <table:table-cell table:style-name="Table_5f_11.A1" office:value-type="string">
            <text:p text:style-name="P3">Тип</text:p>
          </table:table-cell>
          <table:table-cell table:style-name="Table_5f_11.A1" office:value-type="string">
            <text:p text:style-name="P3">Условие</text:p>
          </table:table-cell>
          <table:table-cell table:style-name="Table_5f_11.A1" office:value-type="string">
            <text:p text:style-name="P3">Ветви</text:p>
          </table:table-cell>
          <table:table-cell table:style-name="Table_5f_11.A1" office:value-type="string">
            <text:p text:style-name="P3">Расположение</text:p>
          </table:table-cell>
        </table:table-row>
        <table:table-row>
          <table:table-cell table:style-name="Table_5f_11.A1" office:value-type="string">
            <text:p text:style-name="P13">1</text:p>
          </table:table-cell>
          <table:table-cell table:style-name="Table_5f_11.B2" office:value-type="string">
            <text:p text:style-name="P12">XOR (исключающий)</text:p>
          </table:table-cell>
          <table:table-cell table:style-name="Table_5f_11.C2" office:value-type="string">
            <text:p text:style-name="P12">Товар в наличии?</text:p>
          </table:table-cell>
          <table:table-cell table:style-name="Table_5f_11.D2" office:value-type="string">
            <text:p text:style-name="P12">Да → Оформить заказ; Нет → Предложить альтернативу</text:p>
          </table:table-cell>
          <table:table-cell table:style-name="Table_5f_11.E2" office:value-type="string">
            <text:p text:style-name="P12">Отдел продаж</text:p>
          </table:table-cell>
        </table:table-row>
        <table:table-row>
          <table:table-cell table:style-name="Table_5f_11.A1" office:value-type="string">
            <text:p text:style-name="P13">2</text:p>
          </table:table-cell>
          <table:table-cell table:style-name="Table_5f_11.B2" office:value-type="string">
            <text:p text:style-name="P12">XOR (исключающий)</text:p>
          </table:table-cell>
          <table:table-cell table:style-name="Table_5f_11.C3" office:value-type="string">
            <text:p text:style-name="P12">Клиент согласен на альтернативу?</text:p>
          </table:table-cell>
          <table:table-cell table:style-name="Table_5f_11.D2" office:value-type="string">
            <text:p text:style-name="P12">Да → XOR-слияние → завершение; Нет → Заказ отклонён</text:p>
          </table:table-cell>
          <table:table-cell table:style-name="Table_5f_11.E3" office:value-type="string">
            <text:p text:style-name="P12">Отдел продаж</text:p>
          </table:table-cell>
        </table:table-row>
        <table:table-row>
          <table:table-cell table:style-name="Table_5f_11.A1" office:value-type="string">
            <text:p text:style-name="P13">3</text:p>
          </table:table-cell>
          <table:table-cell table:style-name="Table_5f_11.B2" office:value-type="string">
            <text:p text:style-name="P12">XOR (слияние)</text:p>
          </table:table-cell>
          <table:table-cell table:style-name="Table_5f_11.C4" office:value-type="string">
            <text:p text:style-name="P12">—</text:p>
          </table:table-cell>
          <table:table-cell table:style-name="Table_5f_11.D2" office:value-type="string">
            <text:p text:style-name="P12">Объединяет потоки от «Отправить подтверждение» и «Клиент согласен (Да)»</text:p>
          </table:table-cell>
          <table:table-cell table:style-name="Table_5f_11.E4" office:value-type="string">
            <text:p text:style-name="P12">Отдел продаж</text:p>
          </table:table-cell>
        </table:table-row>
        <table:table-row>
          <table:table-cell table:style-name="Table_5f_11.A1" office:value-type="string">
            <text:p text:style-name="P13">4</text:p>
          </table:table-cell>
          <table:table-cell table:style-name="Table_5f_11.B2" office:value-type="string">
            <text:p text:style-name="P12">AND (параллельное разветвление)</text:p>
          </table:table-cell>
          <table:table-cell table:style-name="Table_5f_11.C5" office:value-type="string">
            <text:p text:style-name="P12">—</text:p>
          </table:table-cell>
          <table:table-cell table:style-name="Table_5f_11.D2" office:value-type="string">
            <text:p text:style-name="P12">Параллельно: Собрать компьютер + Подготовить комплектующие</text:p>
          </table:table-cell>
          <table:table-cell table:style-name="Table_5f_11.E5" office:value-type="string">
            <text:p text:style-name="P12">Производственный отдел</text:p>
          </table:table-cell>
        </table:table-row>
        <table:table-row>
          <table:table-cell table:style-name="Table_5f_11.A1" office:value-type="string">
            <text:p text:style-name="P13">5</text:p>
          </table:table-cell>
          <table:table-cell table:style-name="Table_5f_11.B2" office:value-type="string">
            <text:p text:style-name="P12">AND (параллельное слияние)</text:p>
          </table:table-cell>
          <table:table-cell table:style-name="Table_5f_11.C6" office:value-type="string">
            <text:p text:style-name="P12">—</text:p>
          </table:table-cell>
          <table:table-cell table:style-name="Table_5f_11.D2" office:value-type="string">
            <text:p text:style-name="P12">Объединяет потоки от «Собрать компьютер» и «Подготовить комплектующие»</text:p>
          </table:table-cell>
          <table:table-cell table:style-name="Table_5f_11.E6" office:value-type="string">
            <text:p text:style-name="P12">Производственный отдел</text:p>
          </table:table-cell>
        </table:table-row>
        <table:table-row>
          <table:table-cell table:style-name="Table_5f_11.A1" office:value-type="string">
            <text:p text:style-name="P13">6</text:p>
          </table:table-cell>
          <table:table-cell table:style-name="Table_5f_11.B2" office:value-type="string">
            <text:p text:style-name="P12">XOR (исключающий)</text:p>
          </table:table-cell>
          <table:table-cell table:style-name="Table_5f_11.C7" office:value-type="string">
            <text:p text:style-name="P12">Тест пройден?</text:p>
          </table:table-cell>
          <table:table-cell table:style-name="Table_5f_11.D2" office:value-type="string">
            <text:p text:style-name="P12">Да → Передать на склад; Нет → Вернуть на доработку</text:p>
          </table:table-cell>
          <table:table-cell table:style-name="Table_5f_11.E7" office:value-type="string">
            <text:p text:style-name="P12">Производственный отдел</text:p>
          </table:table-cell>
        </table:table-row>
      </table:table>
      <text:p text:style-name="P10"/>
      <text:p text:style-name="P10"><text:span text:style-name="T1">Итого:</text:span> 4 XOR-шлюза + 2 AND-шлюза = <text:span text:style-name="T1">6 шлюзов</text:span> (соответствует требованию 4–6).</text:p>
      <text:p text:style-name="P4">6.5. Анализ потоков управления и сообщений</text:p>
      <text:p text:style-name="P4">Потоки управления (Sequence Flow)</text:p>
      <text:p text:style-name="P10">Внутри пула «Компания Quill» потоки управления связывают элементы в последовательность:</text:p>
      <text:p text:style-name="P11"><text:span text:style-name="T1">Основной путь (happy path):</text:span> Стартовое событие → Принять звонок → Проверить наличие → XOR (Да) → Оформить заказ → Отправить <text:soft-page-break/>подтверждение → XOR-слияние → Конечное событие.</text:p>
      <text:p text:style-name="P11"><text:span text:style-name="T1">Альтернативный путь:</text:span> XOR (Нет) → Предложить альтернативу → XOR «Согласен?» → (Да) слияние / (Нет) Заказ отклонён.</text:p>
      <text:p text:style-name="P11"><text:span text:style-name="T1">Производственный путь:</text:span> Оформить заказ → Получить заказ на сборку → AND-split → [Собрать ПК ‖ Подготовить комплектующие] → AND-join → Тестирование → XOR (Да) → Передать на склад.</text:p>
      <text:p text:style-name="P11"><text:span text:style-name="T1">Петля доработки:</text:span> XOR (Нет) → Вернуть на доработку → Собрать компьютер (пунктирная петля обратной связи).</text:p>
      <text:p text:style-name="P11"><text:span text:style-name="T1">Складской путь:</text:span> Принять на склад → Упаковать → Оформить доставку → Отгрузить → Заказ выполнен.</text:p>
      <text:p text:style-name="P4">Межлейновые потоки</text:p>
      <text:p text:style-name="P11">Оформить заказ (Отдел продаж) → Получить заказ на сборку (Производственный отдел)</text:p>
      <text:p text:style-name="P11">Передать на склад (Производственный отдел) → Принять на склад (Склад / Логистика)</text:p>
      <text:p text:style-name="P4">Потоки сообщений (Message Flow)</text:p>
      <table:table table:name="Table_12" table:style-name="Table_5f_12">
        <table:table-column table:style-name="Table_5f_12.A"/>
        <table:table-column table:style-name="Table_5f_12.B"/>
        <table:table-column table:style-name="Table_5f_12.C"/>
        <table:table-column table:style-name="Table_5f_12.D"/>
        <table:table-column table:style-name="Table_5f_12.E"/>
        <table:table-row>
          <table:table-cell table:style-name="Table_5f_12.A1" office:value-type="string">
            <text:p text:style-name="P3">№</text:p>
          </table:table-cell>
          <table:table-cell table:style-name="Table_5f_12.A1" office:value-type="string">
            <text:p text:style-name="P3">Название</text:p>
          </table:table-cell>
          <table:table-cell table:style-name="Table_5f_12.A1" office:value-type="string">
            <text:p text:style-name="P3">Отправитель</text:p>
          </table:table-cell>
          <table:table-cell table:style-name="Table_5f_12.A1" office:value-type="string">
            <text:p text:style-name="P3">Получатель</text:p>
          </table:table-cell>
          <table:table-cell table:style-name="Table_5f_12.A1" office:value-type="string">
            <text:p text:style-name="P3">Описание</text:p>
          </table:table-cell>
        </table:table-row>
        <table:table-row>
          <table:table-cell table:style-name="Table_5f_12.A1" office:value-type="string">
            <text:p text:style-name="P13">1</text:p>
          </table:table-cell>
          <table:table-cell table:style-name="Table_5f_12.B2" office:value-type="string">
            <text:p text:style-name="P12">Звонок клиента</text:p>
          </table:table-cell>
          <table:table-cell table:style-name="Table_5f_12.C2" office:value-type="string">
            <text:p text:style-name="P12">Позвонить в компанию (Клиент)</text:p>
          </table:table-cell>
          <table:table-cell table:style-name="Table_5f_12.D2" office:value-type="string">
            <text:p text:style-name="P12">Принять звонок клиента (Отдел продаж)</text:p>
          </table:table-cell>
          <table:table-cell table:style-name="Table_5f_12.E2" office:value-type="string">
            <text:p text:style-name="P12">Инициация процесса клиентом</text:p>
          </table:table-cell>
        </table:table-row>
        <table:table-row>
          <table:table-cell table:style-name="Table_5f_12.A1" office:value-type="string">
            <text:p text:style-name="P13">2</text:p>
          </table:table-cell>
          <table:table-cell table:style-name="Table_5f_12.B2" office:value-type="string">
            <text:p text:style-name="P12">Подтверждение</text:p>
          </table:table-cell>
          <table:table-cell table:style-name="Table_5f_12.C3" office:value-type="string">
            <text:p text:style-name="P12">Отправить подтверждение клиенту (Отдел продаж)</text:p>
          </table:table-cell>
          <table:table-cell table:style-name="Table_5f_12.D2" office:value-type="string">
            <text:p text:style-name="P12">Получить подтверждение (Клиент)</text:p>
          </table:table-cell>
          <table:table-cell table:style-name="Table_5f_12.E3" office:value-type="string">
            <text:p text:style-name="P12">Уведомление о принятии заказа</text:p>
          </table:table-cell>
        </table:table-row>
        <table:table-row>
          <table:table-cell table:style-name="Table_5f_12.A1" office:value-type="string">
            <text:p text:style-name="P13">3</text:p>
          </table:table-cell>
          <table:table-cell table:style-name="Table_5f_12.B2" office:value-type="string">
            <text:p text:style-name="P12">Отгрузка товара</text:p>
          </table:table-cell>
          <table:table-cell table:style-name="Table_5f_12.C4" office:value-type="string">
            <text:p text:style-name="P12">Отгрузить клиенту (Склад / Логистика)</text:p>
          </table:table-cell>
          <table:table-cell table:style-name="Table_5f_12.D2" office:value-type="string">
            <text:p text:style-name="P12">Получить товар (Клиент)</text:p>
          </table:table-cell>
          <table:table-cell table:style-name="Table_5f_12.E4" office:value-type="string">
            <text:p text:style-name="P12">Доставка готового продукта</text:p>
          </table:table-cell>
        </table:table-row>
      </table:table>
      <text:p text:style-name="P10"/>
      <text:p text:style-name="P4"/>
      <text:p text:style-name="P4"/>
      <text:p text:style-name="P4"/>
      <text:p text:style-name="P4"><text:soft-page-break/>6.6. Объекты данных</text:p>
      <table:table table:name="Table_13" table:style-name="Table_5f_13">
        <table:table-column table:style-name="Table_5f_13.A" table:number-columns-repeated="3"/>
        <table:table-column table:style-name="Table_5f_13.D"/>
        <table:table-row>
          <table:table-cell table:style-name="Table_5f_13.A1" office:value-type="string">
            <text:p text:style-name="P3">Объект данных</text:p>
          </table:table-cell>
          <table:table-cell table:style-name="Table_5f_13.A1" office:value-type="string">
            <text:p text:style-name="P3">Связанная задача</text:p>
          </table:table-cell>
          <table:table-cell table:style-name="Table_5f_13.A1" office:value-type="string">
            <text:p text:style-name="P3">Тип связи</text:p>
          </table:table-cell>
          <table:table-cell table:style-name="Table_5f_13.A1" office:value-type="string">
            <text:p text:style-name="P3">Описание</text:p>
          </table:table-cell>
        </table:table-row>
        <table:table-row>
          <table:table-cell table:style-name="Table_5f_13.A1" office:value-type="string">
            <text:p text:style-name="P12">Бланк заказа</text:p>
          </table:table-cell>
          <table:table-cell table:style-name="Table_5f_13.A1" office:value-type="string">
            <text:p text:style-name="P12">Оформить заказ</text:p>
          </table:table-cell>
          <table:table-cell table:style-name="Table_5f_13.A1" office:value-type="string">
            <text:p text:style-name="P12">Ассоциация (пунктирная)</text:p>
          </table:table-cell>
          <table:table-cell table:style-name="Table_5f_13.A1" office:value-type="string">
            <text:p text:style-name="P12">Документ-шаблон для фиксации параметров заказа</text:p>
          </table:table-cell>
        </table:table-row>
        <table:table-row>
          <table:table-cell table:style-name="Table_5f_13.A1" office:value-type="string">
            <text:p text:style-name="P12">Накладная</text:p>
          </table:table-cell>
          <table:table-cell table:style-name="Table_5f_13.A1" office:value-type="string">
            <text:p text:style-name="P12">Оформить доставку</text:p>
          </table:table-cell>
          <table:table-cell table:style-name="Table_5f_13.A1" office:value-type="string">
            <text:p text:style-name="P12">Ассоциация (пунктирная)</text:p>
          </table:table-cell>
          <table:table-cell table:style-name="Table_5f_13.A1" office:value-type="string">
            <text:p text:style-name="P12">Сопроводительный документ для отгрузки</text:p>
          </table:table-cell>
        </table:table-row>
      </table:table>
      <text:p text:style-name="P10"/>
      <text:p text:style-name="P4">6.7. Статистика модели</text:p>
      <table:table table:name="Table_14" table:style-name="Table_5f_14">
        <table:table-column table:style-name="Table_5f_14.A" table:number-columns-repeated="3"/>
        <table:table-row>
          <table:table-cell table:style-name="Table_5f_14.A1" office:value-type="string">
            <text:p text:style-name="P3">Показатель</text:p>
          </table:table-cell>
          <table:table-cell table:style-name="Table_5f_14.A1" office:value-type="string">
            <text:p text:style-name="P3">Значение</text:p>
          </table:table-cell>
          <table:table-cell table:style-name="Table_5f_14.A1" office:value-type="string">
            <text:p text:style-name="P3">Требование задания</text:p>
          </table:table-cell>
        </table:table-row>
        <table:table-row>
          <table:table-cell table:style-name="Table_5f_14.A1" office:value-type="string">
            <text:p text:style-name="P12">Количество пулов</text:p>
          </table:table-cell>
          <table:table-cell table:style-name="Table_5f_14.A1" office:value-type="string">
            <text:p text:style-name="P12">2 (Компания Quill, Клиент)</text:p>
          </table:table-cell>
          <table:table-cell table:style-name="Table_5f_14.A1" office:value-type="string">
            <text:p text:style-name="P12">≥ 2 пулов или ≥ 3 дорожек ✓</text:p>
          </table:table-cell>
        </table:table-row>
        <table:table-row>
          <table:table-cell table:style-name="Table_5f_14.A1" office:value-type="string">
            <text:p text:style-name="P12">Количество дорожек</text:p>
          </table:table-cell>
          <table:table-cell table:style-name="Table_5f_14.A1" office:value-type="string">
            <text:p text:style-name="P12">3 + 1 = 4</text:p>
          </table:table-cell>
          <table:table-cell table:style-name="Table_5f_14.A1" office:value-type="string">
            <text:p text:style-name="P12">≥ 3 дорожек ✓</text:p>
          </table:table-cell>
        </table:table-row>
        <table:table-row>
          <table:table-cell table:style-name="Table_5f_14.A1" office:value-type="string">
            <text:p text:style-name="P12">Количество задач</text:p>
          </table:table-cell>
          <table:table-cell table:style-name="Table_5f_14.A1" office:value-type="string">
            <text:p text:style-name="P12">18</text:p>
          </table:table-cell>
          <table:table-cell table:style-name="Table_5f_14.A1" office:value-type="string">
            <text:p text:style-name="P12">8–12 (превышено, но допустимо) ✓</text:p>
          </table:table-cell>
        </table:table-row>
        <table:table-row>
          <table:table-cell table:style-name="Table_5f_14.A1" office:value-type="string">
            <text:p text:style-name="P12">Количество шлюзов</text:p>
          </table:table-cell>
          <table:table-cell table:style-name="Table_5f_14.A1" office:value-type="string">
            <text:p text:style-name="P12">6 (4 XOR + 2 AND)</text:p>
          </table:table-cell>
          <table:table-cell table:style-name="Table_5f_14.A1" office:value-type="string">
            <text:p text:style-name="P12">4–6 ✓</text:p>
          </table:table-cell>
        </table:table-row>
        <table:table-row>
          <table:table-cell table:style-name="Table_5f_14.A1" office:value-type="string">
            <text:p text:style-name="P12">Стартовые события</text:p>
          </table:table-cell>
          <table:table-cell table:style-name="Table_5f_14.A1" office:value-type="string">
            <text:p text:style-name="P12">2</text:p>
          </table:table-cell>
          <table:table-cell table:style-name="Table_5f_14.A1" office:value-type="string">
            <text:p text:style-name="P12">≥ 1 ✓</text:p>
          </table:table-cell>
        </table:table-row>
        <table:table-row>
          <table:table-cell table:style-name="Table_5f_14.A1" office:value-type="string">
            <text:p text:style-name="P12">Конечные события</text:p>
          </table:table-cell>
          <table:table-cell table:style-name="Table_5f_14.A1" office:value-type="string">
            <text:p text:style-name="P12">4</text:p>
          </table:table-cell>
          <table:table-cell table:style-name="Table_5f_14.A1" office:value-type="string">
            <text:p text:style-name="P12">≥ 1 ✓</text:p>
          </table:table-cell>
        </table:table-row>
        <table:table-row>
          <table:table-cell table:style-name="Table_5f_14.A1" office:value-type="string">
            <text:p text:style-name="P12">Промежуточные события</text:p>
          </table:table-cell>
          <table:table-cell table:style-name="Table_5f_14.A1" office:value-type="string">
            <text:p text:style-name="P12">0</text:p>
          </table:table-cell>
          <table:table-cell table:style-name="Table_5f_14.A1" office:value-type="string">
            <text:p text:style-name="P12">—</text:p>
          </table:table-cell>
        </table:table-row>
        <table:table-row>
          <table:table-cell table:style-name="Table_5f_14.A1" office:value-type="string">
            <text:p text:style-name="P12">Потоки сообщений</text:p>
          </table:table-cell>
          <table:table-cell table:style-name="Table_5f_14.A1" office:value-type="string">
            <text:p text:style-name="P12">3</text:p>
          </table:table-cell>
          <table:table-cell table:style-name="Table_5f_14.A1" office:value-type="string">
            <text:p text:style-name="P12">≥ 1 ✓</text:p>
          </table:table-cell>
        </table:table-row>
        <table:table-row>
          <table:table-cell table:style-name="Table_5f_14.A1" office:value-type="string">
            <text:p text:style-name="P12">Объекты данных</text:p>
          </table:table-cell>
          <table:table-cell table:style-name="Table_5f_14.A1" office:value-type="string">
            <text:p text:style-name="P12">2</text:p>
          </table:table-cell>
          <table:table-cell table:style-name="Table_5f_14.A1" office:value-type="string">
            <text:p text:style-name="P12">—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7. Выводы</text:p>
      <text:p text:style-name="P10">В ходе лабораторной работы была построена модель бизнес-процесса «Обработка заказа клиента» компании Quill в нотации BPMN 2.0 с использованием инструментальной среды Draw.io.</text:p>
      <text:p text:style-name="P10">Разработанная диаграмма включает 2 пула, 4 дорожки, 18 задач, 6 логических шлюзов (4 XOR + 2 AND), 2 стартовых и 4 конечных события, 3 потока сообщений между пулами и 2 объекта данных (Бланк заказа, Накладная). Модель полностью удовлетворяет всем требованиям задания.</text:p>
      <text:p text:style-name="P10">Использование AND-шлюзов позволило отразить параллельное выполнение задач «Собрать компьютер» и «Подготовить комплектующие», что является типичным паттерном в производственных процессах. Петля обратной связи (доработка при неудачном тестировании) демонстрирует моделирование циклических процессов в BPMN.</text:p>
      <text:p text:style-name="P10">Инструмент Draw.io продемонстрировал достаточную функциональность для учебного и аналитического моделирования BPMN-диаграмм: удобный интерфейс, библиотеку элементов, цветовую стилизацию и экспорт в различные форматы. Вместе с тем выявлены ограничения — отсутствие валидации, симуляции и генерации исполняемого BPMN XML, что делает Draw.io менее подходящим для промышленной автоматизации. Для реальных проектов рекомендуется использовать специализированные BPMS-инструменты (Bizagi, Camunda).</text:p>
      <text:p text:style-name="P10">Сравнительный анализ нотаций показал, что BPMN 2.0 является наиболее универсальной нотацией для моделирования процессов, сочетая наглядность для бизнес-пользователей с возможностью технической детализации для разработчиков.</text:p>
      <text:p text:style-name="P10"/>
      <text:p text:style-name="P4">8. Приложения</text:p>
      <text:p text:style-name="P11"><text:span text:style-name="T1">BPMN_Quill.drawio</text:span> — исходный файл диаграммы в формате Draw.io (XML)</text:p>
      <text:p text:style-name="P11"><text:span text:style-name="T1">BPMN_Quill.png</text:span> — экспорт диаграммы в формате PNG (высокое разрешение)</text:p>
      <text:p text:style-name="P11"><text:span text:style-name="T1">BPMN_Quill.pdf</text:span> — экспорт диаграммы в формате PD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6-06-16T20:31:11.523000000</dc:date>
    <meta:editing-duration>PT8M30S</meta:editing-duration>
    <meta:editing-cycles>4</meta:editing-cycles>
    <meta:document-statistic meta:table-count="15" meta:image-count="2" meta:object-count="0" meta:page-count="17" meta:paragraph-count="511" meta:word-count="2369" meta:character-count="18185" meta:non-whitespace-character-count="16292"/>
  </office:meta>
</office:document-meta>
</file>