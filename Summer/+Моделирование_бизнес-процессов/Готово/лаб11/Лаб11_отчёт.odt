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1900000261B54B91F2.png" manifest:media-type="image/png"/>
  <manifest:file-entry manifest:full-path="Pictures/1000000100000618000002810608877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" style:family="table">
      <style:table-properties style:width="17cm" table:align="margins"/>
    </style:style>
    <style:style style:name="Table.A" style:family="table-column">
      <style:table-column-properties style:column-width="2.429cm" style:rel-column-width="9362*"/>
    </style:style>
    <style:style style:name="Table.G" style:family="table-column">
      <style:table-column-properties style:column-width="2.429cm" style:rel-column-width="9363*"/>
    </style:style>
    <style:style style:name="Table.A1" style:family="table-cell">
      <style:table-cell-properties fo:padding="0.101cm" fo:border="none"/>
    </style:style>
    <style:style style:name="Table_5f_1" style:display-name="Table_1" style:family="table">
      <style:table-properties style:width="17cm" table:align="margins"/>
    </style:style>
    <style:style style:name="Table_5f_1.A" style:display-name="Table_1.A" style:family="table-column">
      <style:table-column-properties style:column-width="4.249cm" style:rel-column-width="16383*"/>
    </style:style>
    <style:style style:name="Table_5f_1.D" style:display-name="Table_1.D" style:family="table-column">
      <style:table-column-properties style:column-width="4.251cm" style:rel-column-width="16386*"/>
    </style:style>
    <style:style style:name="Table_5f_1.A1" style:display-name="Table_1.A1" style:family="table-cell">
      <style:table-cell-properties fo:padding="0.101cm" fo:border="none"/>
    </style:style>
    <style:style style:name="Table_5f_2" style:display-name="Table_2" style:family="table">
      <style:table-properties style:width="17cm" table:align="margins"/>
    </style:style>
    <style:style style:name="Table_5f_2.A" style:display-name="Table_2.A" style:family="table-column">
      <style:table-column-properties style:column-width="4.249cm" style:rel-column-width="16383*"/>
    </style:style>
    <style:style style:name="Table_5f_2.D" style:display-name="Table_2.D" style:family="table-column">
      <style:table-column-properties style:column-width="4.251cm" style:rel-column-width="16386*"/>
    </style:style>
    <style:style style:name="Table_5f_2.A1" style:display-name="Table_2.A1" style:family="table-cell">
      <style:table-cell-properties fo:padding="0.101cm" fo:border="none"/>
    </style:style>
    <style:style style:name="Table_5f_3" style:display-name="Table_3" style:family="table">
      <style:table-properties style:width="17cm" table:align="margins"/>
    </style:style>
    <style:style style:name="Table_5f_3.A" style:display-name="Table_3.A" style:family="table-column">
      <style:table-column-properties style:column-width="4.249cm" style:rel-column-width="16383*"/>
    </style:style>
    <style:style style:name="Table_5f_3.D" style:display-name="Table_3.D" style:family="table-column">
      <style:table-column-properties style:column-width="4.251cm" style:rel-column-width="16386*"/>
    </style:style>
    <style:style style:name="Table_5f_3.A1" style:display-name="Table_3.A1" style:family="table-cell">
      <style:table-cell-properties fo:padding="0.101cm" fo:border="none"/>
    </style:style>
    <style:style style:name="P1" style:family="paragraph" style:parent-style-name="Standard">
      <style:paragraph-properties fo:margin-top="0.499cm" fo:margin-bottom="0.3cm" style:contextual-spacing="false" fo:line-height="115%" fo:text-align="justify" style:justify-single-word="false"/>
      <style:text-properties style:font-name="Times New Roman" fo:font-size="14pt" fo:font-weight="bold"/>
    </style:style>
    <style:style style:name="P2" style:family="paragraph" style:parent-style-name="Standard">
      <style:paragraph-properties fo:margin-top="0cm" fo:margin-bottom="0.199cm" style:contextual-spacing="false" fo:line-height="115%" fo:text-align="justify" style:justify-single-word="false"/>
      <style:text-properties style:font-name="Times New Roman" fo:font-size="14pt" fo:font-weight="bold"/>
    </style:style>
    <style:style style:name="P3" style:family="paragraph" style:parent-style-name="Standard">
      <style:paragraph-properties fo:margin-top="0.7cm" fo:margin-bottom="0.501cm" style:contextual-spacing="false" fo:line-height="115%" fo:text-align="justify" style:justify-single-word="false"/>
      <style:text-properties style:font-name="Times New Roman" fo:font-size="14pt" fo:font-weight="bold"/>
    </style:style>
    <style:style style:name="P4" style:family="paragraph" style:parent-style-name="Standard" style:list-style-name="">
      <style:paragraph-properties fo:margin-top="0cm" fo:margin-bottom="0cm" style:contextual-spacing="false" fo:line-height="115%" fo:text-align="center" style:justify-single-word="false"/>
      <style:text-properties style:font-name="Times New Roman" fo:font-size="14pt" fo:font-weight="bold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4pt" fo:font-weight="bold"/>
    </style:style>
    <style:style style:name="P6" style:family="paragraph" style:parent-style-name="Standard">
      <style:paragraph-properties fo:margin-top="0cm" fo:margin-bottom="0.199cm" style:contextual-spacing="false" fo:line-height="115%" fo:text-align="justify" style:justify-single-word="false"/>
      <style:text-properties style:font-name="Times New Roman" fo:font-size="14pt"/>
    </style:style>
    <style:style style:name="P7" style:family="paragraph" style:parent-style-name="Standard">
      <style:paragraph-properties fo:margin-left="0.801cm" fo:margin-top="0cm" fo:margin-bottom="0.101cm" style:contextual-spacing="false" fo:line-height="115%" fo:text-align="justify" style:justify-single-word="false"/>
      <style:text-properties style:font-name="Times New Roman" fo:font-size="14pt"/>
    </style:style>
    <style:style style:name="P8" style:family="paragraph" style:parent-style-name="Standard">
      <style:paragraph-properties fo:margin-top="0cm" fo:margin-bottom="0.199cm" style:contextual-spacing="false" fo:line-height="115%" fo:text-align="start" style:justify-single-word="false"/>
      <style:text-properties style:font-name="Times New Roman" fo:font-size="14pt" fo:font-style="italic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ОТЧЁТ</text:h>
      <text:p text:style-name="P5">по лабораторной работе №11</text:p>
      <text:p text:style-name="P5">по дисциплине «Моделирование бизнес-процессов»</text:p>
      <text:p text:style-name="P5"/>
      <text:p text:style-name="P6"><text:span text:style-name="T1">Тема:</text:span> Анализ моделей процессов в Draw.io (стоимостной анализ)</text:p>
      <text:p text:style-name="P6">Выполнил: студент группы БИНOZS-331 Трофимов А.Н.</text:p>
      <text:p text:style-name="P6"/>
      <text:p text:style-name="P1">1. Цель работы</text:p>
      <text:p text:style-name="P6">Овладеть навыками проведения стоимостного анализа бизнес-процессов. Научиться определять действительные затраты на операции, классифицировать их по добавленной стоимости, выявлять неэффективные работы, требующие оптимизации, и разработать план улучшений на основе анализа стоимости процесса «Обработка заказа клиента» компании Quill.</text:p>
      <text:p text:style-name="P6"/>
      <text:p text:style-name="P1">2. Краткие теоретические сведения</text:p>
      <text:p text:style-name="P6">Стоимостной анализ бизнес-процессов (Process Cost Analysis) — это метод оценки экономической эффективности процесса путём определения затрат на каждую операцию и их классификации по степени полезности для конечного результата. Основным инструментом стоимостного анализа является метод ABC (Activity-Based Costing), который распределяет косвенные затраты по операциям пропорционально потреблённым ресурсам, а не по упрощённым базам распределения. Разновидность метода — Time-Driven ABC — использует время выполнения операции как единственный драйвер распределения затрат, что упрощает расчёты при сохранении достаточной точности.</text:p>
      <text:p text:style-name="P6">Ключевым элементом стоимостного анализа является классификация операций по добавленной стоимости. Операции делятся на три категории: VA (Value-Added) — операции, непосредственно создающие ценность для клиента (сборка, тестирование); NVA (Non-Value-Added) — операции, не создающие ценности и подлежащие устранению (ожидание в очереди, переделка брака); BVA (Business-Value-Added) — операции, не создающие прямой ценности для клиента, но необходимые для функционирования бизнеса (ведение учёта, отчётность). Целью оптимизации является максимизация доли VA-операций и минимизация NVA.</text:p>
      <text:p text:style-name="P6">Анализ Парето (правило 80/20) применяется для приоритизации усилий по <text:soft-page-break/>оптимизации: как правило, 20% операций формируют 80% затрат. Эти операции относятся к группе A и требуют первоочередного внимания. Метрика Cost to Serve (стоимость обслуживания) показывает полную стоимость выполнения процесса для одного клиента и используется для оценки рентабельности клиентских сегментов.</text:p>
      <text:p text:style-name="P6"/>
      <text:p text:style-name="P1">3. Ход работы</text:p>
      <text:p text:style-name="P6">В рамках лабораторной работы был проведён стоимостной анализ процесса «Обработка заказа клиента» компании Quill, занимающейся сборкой и продажей настольных ПК и ноутбуков (годовой оборот ~20 млн руб., 3 поставщика компонентов).</text:p>
      <text:p text:style-name="P2">Этап 1. Определение операций и затрат</text:p>
      <text:p text:style-name="P6">Для каждой операции процесса были определены прямые затраты (зарплата исполнителей, материалы, амортизация оборудования) и косвенные затраты (аренда, коммунальные услуги, управленческие расходы). Результаты сведены в таблицу:</text:p>
      <table:table table:name="Table" table:style-name="Table">
        <table:table-column table:style-name="Table.A" table:number-columns-repeated="6"/>
        <table:table-column table:style-name="Table.G"/>
        <table:table-row>
          <table:table-cell table:style-name="Table.A1" office:value-type="string">
            <text:p text:style-name="P2">№</text:p>
          </table:table-cell>
          <table:table-cell table:style-name="Table.A1" office:value-type="string">
            <text:p text:style-name="P2">Операция</text:p>
          </table:table-cell>
          <table:table-cell table:style-name="Table.A1" office:value-type="string">
            <text:p text:style-name="P2">Прямые затраты, руб.</text:p>
          </table:table-cell>
          <table:table-cell table:style-name="Table.A1" office:value-type="string">
            <text:p text:style-name="P2">Косвенные затраты, руб.</text:p>
          </table:table-cell>
          <table:table-cell table:style-name="Table.A1" office:value-type="string">
            <text:p text:style-name="P2">Итого, руб.</text:p>
          </table:table-cell>
          <table:table-cell table:style-name="Table.A1" office:value-type="string">
            <text:p text:style-name="P2">Доля в общих затратах</text:p>
          </table:table-cell>
          <table:table-cell table:style-name="Table.A1" office:value-type="string">
            <text:p text:style-name="P2">Категория</text:p>
          </table:table-cell>
        </table:table-row>
        <table:table-row>
          <table:table-cell table:style-name="Table.A1" office:value-type="string">
            <text:p text:style-name="P6">1</text:p>
          </table:table-cell>
          <table:table-cell table:style-name="Table.A1" office:value-type="string">
            <text:p text:style-name="P6">Приём заказа</text:p>
          </table:table-cell>
          <table:table-cell table:style-name="Table.A1" office:value-type="string">
            <text:p text:style-name="P6">150</text:p>
          </table:table-cell>
          <table:table-cell table:style-name="Table.A1" office:value-type="string">
            <text:p text:style-name="P6">50</text:p>
          </table:table-cell>
          <table:table-cell table:style-name="Table.A1" office:value-type="string">
            <text:p text:style-name="P6">200</text:p>
          </table:table-cell>
          <table:table-cell table:style-name="Table.A1" office:value-type="string">
            <text:p text:style-name="P6">2.8%</text:p>
          </table:table-cell>
          <table:table-cell table:style-name="Table.A1" office:value-type="string">
            <text:p text:style-name="P6">VA</text:p>
          </table:table-cell>
        </table:table-row>
        <table:table-row>
          <table:table-cell table:style-name="Table.A1" office:value-type="string">
            <text:p text:style-name="P6">2</text:p>
          </table:table-cell>
          <table:table-cell table:style-name="Table.A1" office:value-type="string">
            <text:p text:style-name="P6">Подбор комплектующих</text:p>
          </table:table-cell>
          <table:table-cell table:style-name="Table.A1" office:value-type="string">
            <text:p text:style-name="P6">350</text:p>
          </table:table-cell>
          <table:table-cell table:style-name="Table.A1" office:value-type="string">
            <text:p text:style-name="P6">150</text:p>
          </table:table-cell>
          <table:table-cell table:style-name="Table.A1" office:value-type="string">
            <text:p text:style-name="P6">500</text:p>
          </table:table-cell>
          <table:table-cell table:style-name="Table.A1" office:value-type="string">
            <text:p text:style-name="P6">7.0%</text:p>
          </table:table-cell>
          <table:table-cell table:style-name="Table.A1" office:value-type="string">
            <text:p text:style-name="P6">VA</text:p>
          </table:table-cell>
        </table:table-row>
        <table:table-row>
          <table:table-cell table:style-name="Table.A1" office:value-type="string">
            <text:p text:style-name="P6">3</text:p>
          </table:table-cell>
          <table:table-cell table:style-name="Table.A1" office:value-type="string">
            <text:p text:style-name="P6">Сборка компьютера</text:p>
          </table:table-cell>
          <table:table-cell table:style-name="Table.A1" office:value-type="string">
            <text:p text:style-name="P6">2 200</text:p>
          </table:table-cell>
          <table:table-cell table:style-name="Table.A1" office:value-type="string">
            <text:p text:style-name="P6">800</text:p>
          </table:table-cell>
          <table:table-cell table:style-name="Table.A1" office:value-type="string">
            <text:p text:style-name="P6">3 000</text:p>
          </table:table-cell>
          <table:table-cell table:style-name="Table.A1" office:value-type="string">
            <text:p text:style-name="P6">42.3%</text:p>
          </table:table-cell>
          <table:table-cell table:style-name="Table.A1" office:value-type="string">
            <text:p text:style-name="P6">VA</text:p>
          </table:table-cell>
        </table:table-row>
        <table:table-row>
          <table:table-cell table:style-name="Table.A1" office:value-type="string">
            <text:p text:style-name="P6">4</text:p>
          </table:table-cell>
          <table:table-cell table:style-name="Table.A1" office:value-type="string">
            <text:p text:style-name="P6">Тестирование</text:p>
          </table:table-cell>
          <table:table-cell table:style-name="Table.A1" office:value-type="string">
            <text:p text:style-name="P6">500</text:p>
          </table:table-cell>
          <table:table-cell table:style-name="Table.A1" office:value-type="string">
            <text:p text:style-name="P6">300</text:p>
          </table:table-cell>
          <table:table-cell table:style-name="Table.A1" office:value-type="string">
            <text:p text:style-name="P6">800</text:p>
          </table:table-cell>
          <table:table-cell table:style-name="Table.A1" office:value-type="string">
            <text:p text:style-name="P6">11.3%</text:p>
          </table:table-cell>
          <table:table-cell table:style-name="Table.A1" office:value-type="string">
            <text:p text:style-name="P6">VA</text:p>
          </table:table-cell>
        </table:table-row>
        <table:table-row>
          <table:table-cell table:style-name="Table.A1" office:value-type="string">
            <text:p text:style-name="P6">5</text:p>
          </table:table-cell>
          <table:table-cell table:style-name="Table.A1" office:value-type="string">
            <text:p text:style-name="P6">Упаковка и отгрузка</text:p>
          </table:table-cell>
          <table:table-cell table:style-name="Table.A1" office:value-type="string">
            <text:p text:style-name="P6">250</text:p>
          </table:table-cell>
          <table:table-cell table:style-name="Table.A1" office:value-type="string">
            <text:p text:style-name="P6">150</text:p>
          </table:table-cell>
          <table:table-cell table:style-name="Table.A1" office:value-type="string">
            <text:p text:style-name="P6">400</text:p>
          </table:table-cell>
          <table:table-cell table:style-name="Table.A1" office:value-type="string">
            <text:p text:style-name="P6">5.6%</text:p>
          </table:table-cell>
          <table:table-cell table:style-name="Table.A1" office:value-type="string">
            <text:p text:style-name="P6">VA</text:p>
          </table:table-cell>
        </table:table-row>
        <text:soft-page-break/>
        <table:table-row>
          <table:table-cell table:style-name="Table.A1" office:value-type="string">
            <text:p text:style-name="P6">6</text:p>
          </table:table-cell>
          <table:table-cell table:style-name="Table.A1" office:value-type="string">
            <text:p text:style-name="P6">Ожидание в очереди</text:p>
          </table:table-cell>
          <table:table-cell table:style-name="Table.A1" office:value-type="string">
            <text:p text:style-name="P6">0</text:p>
          </table:table-cell>
          <table:table-cell table:style-name="Table.A1" office:value-type="string">
            <text:p text:style-name="P6">200</text:p>
          </table:table-cell>
          <table:table-cell table:style-name="Table.A1" office:value-type="string">
            <text:p text:style-name="P6">200</text:p>
          </table:table-cell>
          <table:table-cell table:style-name="Table.A1" office:value-type="string">
            <text:p text:style-name="P6">2.8%</text:p>
          </table:table-cell>
          <table:table-cell table:style-name="Table.A1" office:value-type="string">
            <text:p text:style-name="P6">NVA</text:p>
          </table:table-cell>
        </table:table-row>
        <table:table-row>
          <table:table-cell table:style-name="Table.A1" office:value-type="string">
            <text:p text:style-name="P6">7</text:p>
          </table:table-cell>
          <table:table-cell table:style-name="Table.A1" office:value-type="string">
            <text:p text:style-name="P6">Переделка брака</text:p>
          </table:table-cell>
          <table:table-cell table:style-name="Table.A1" office:value-type="string">
            <text:p text:style-name="P6">1 500</text:p>
          </table:table-cell>
          <table:table-cell table:style-name="Table.A1" office:value-type="string">
            <text:p text:style-name="P6">500</text:p>
          </table:table-cell>
          <table:table-cell table:style-name="Table.A1" office:value-type="string">
            <text:p text:style-name="P6">2 000</text:p>
          </table:table-cell>
          <table:table-cell table:style-name="Table.A1" office:value-type="string">
            <text:p text:style-name="P6">28.2%</text:p>
          </table:table-cell>
          <table:table-cell table:style-name="Table.A1" office:value-type="string">
            <text:p text:style-name="P6">NVA</text:p>
          </table:table-cell>
        </table:table-row>
        <table:table-row>
          <table:table-cell table:style-name="Table.A1" office:value-type="string">
            <text:p text:style-name="P2">Итого</text:p>
          </table:table-cell>
          <table:table-cell table:style-name="Table.A1" office:value-type="string">
            <text:p text:style-name="P6"/>
          </table:table-cell>
          <table:table-cell table:style-name="Table.A1" office:value-type="string">
            <text:p text:style-name="P2">4 950</text:p>
          </table:table-cell>
          <table:table-cell table:style-name="Table.A1" office:value-type="string">
            <text:p text:style-name="P2">2 150</text:p>
          </table:table-cell>
          <table:table-cell table:style-name="Table.A1" office:value-type="string">
            <text:p text:style-name="P2">7 100</text:p>
          </table:table-cell>
          <table:table-cell table:style-name="Table.A1" office:value-type="string">
            <text:p text:style-name="P2">100%</text:p>
          </table:table-cell>
          <table:table-cell table:style-name="Table.A1" office:value-type="string">
            <text:p text:style-name="P6"/>
          </table:table-cell>
        </table:table-row>
      </table:table>
      <text:p text:style-name="P6"/>
      <text:p text:style-name="P2">Этап 2. Расчёт методами ABC и Time-Driven ABC</text:p>
      <text:p text:style-name="P6">Метод ABC: косвенные затраты (2 150 руб.) были распределены по операциям пропорционально потреблённым ресурсам. Основные драйверы затрат: машинное время (для сборки и тестирования), человеко-часы (для приёма заказа и подбора комплектующих), площадь хранения (для ожидания в очереди).</text:p>
      <text:p text:style-name="P6">Метод Time-Driven ABC: определена часовая ставка ресурсов — 450 руб./час (средняя по подразделениям). Время выполнения каждой операции:</text:p>
      <text:p text:style-name="P7">Приём заказа: 0.5 часа = 225 руб.</text:p>
      <text:p text:style-name="P7">Подбор комплектующих: 1.0 час = 450 руб.</text:p>
      <text:p text:style-name="P7">Сборка компьютера: 4.0 часа = 1 800 руб. (+ материалы 1 200 руб.)</text:p>
      <text:p text:style-name="P7">Тестирование: 1.5 часа = 675 руб. (+ оборудование 125 руб.)</text:p>
      <text:p text:style-name="P7">Упаковка и отгрузка: 0.75 часа = 338 руб. (+ материалы 62 руб.)</text:p>
      <text:p text:style-name="P7">Ожидание в очереди: 0.5 часа = 225 руб. (непроизводительное время)</text:p>
      <text:p text:style-name="P7">Переделка брака: 3.0 часа = 1 350 руб. (+ материалы 650 руб.)</text:p>
      <text:p text:style-name="P2">Этап 3. Классификация операций по добавленной стоимости (VA/NVA/BVA)</text:p>
      <table:table table:name="Table_1" table:style-name="Table_5f_1">
        <table:table-column table:style-name="Table_5f_1.A" table:number-columns-repeated="3"/>
        <table:table-column table:style-name="Table_5f_1.D"/>
        <table:table-row>
          <table:table-cell table:style-name="Table_5f_1.A1" office:value-type="string">
            <text:p text:style-name="P2">Категория</text:p>
          </table:table-cell>
          <table:table-cell table:style-name="Table_5f_1.A1" office:value-type="string">
            <text:p text:style-name="P2">Операции</text:p>
          </table:table-cell>
          <table:table-cell table:style-name="Table_5f_1.A1" office:value-type="string">
            <text:p text:style-name="P2">Суммарные затраты</text:p>
          </table:table-cell>
          <table:table-cell table:style-name="Table_5f_1.A1" office:value-type="string">
            <text:p text:style-name="P2">Доля</text:p>
          </table:table-cell>
        </table:table-row>
        <table:table-row>
          <table:table-cell table:style-name="Table_5f_1.A1" office:value-type="string">
            <text:p text:style-name="P6">VA (создают ценность)</text:p>
          </table:table-cell>
          <table:table-cell table:style-name="Table_5f_1.A1" office:value-type="string">
            <text:p text:style-name="P6">Приём заказа, Подбор комплектующих, Сборка, Тестирование, Упаковка и отгрузка</text:p>
          </table:table-cell>
          <table:table-cell table:style-name="Table_5f_1.A1" office:value-type="string">
            <text:p text:style-name="P6">4 900 руб.</text:p>
          </table:table-cell>
          <table:table-cell table:style-name="Table_5f_1.A1" office:value-type="string">
            <text:p text:style-name="P6">69.0%</text:p>
          </table:table-cell>
        </table:table-row>
        <table:table-row>
          <table:table-cell table:style-name="Table_5f_1.A1" office:value-type="string">
            <text:p text:style-name="P6">NVA (не создают <text:soft-page-break/>ценности)</text:p>
          </table:table-cell>
          <table:table-cell table:style-name="Table_5f_1.A1" office:value-type="string">
            <text:p text:style-name="P6">Ожидание в <text:soft-page-break/>очереди, Переделка брака</text:p>
          </table:table-cell>
          <table:table-cell table:style-name="Table_5f_1.A1" office:value-type="string">
            <text:p text:style-name="P6">2 200 руб.</text:p>
          </table:table-cell>
          <table:table-cell table:style-name="Table_5f_1.A1" office:value-type="string">
            <text:p text:style-name="P6">31.0%</text:p>
          </table:table-cell>
        </table:table-row>
        <table:table-row>
          <table:table-cell table:style-name="Table_5f_1.A1" office:value-type="string">
            <text:p text:style-name="P6">BVA (необходимы для бизнеса)</text:p>
          </table:table-cell>
          <table:table-cell table:style-name="Table_5f_1.A1" office:value-type="string">
            <text:p text:style-name="P6">—</text:p>
          </table:table-cell>
          <table:table-cell table:style-name="Table_5f_1.A1" office:value-type="string">
            <text:p text:style-name="P6">0 руб.</text:p>
          </table:table-cell>
          <table:table-cell table:style-name="Table_5f_1.A1" office:value-type="string">
            <text:p text:style-name="P6">0%</text:p>
          </table:table-cell>
        </table:table-row>
      </table:table>
      <text:p text:style-name="P6"/>
      <text:p text:style-name="P6">Доля NVA-операций составляет 31.0% от общих затрат — это значительный потенциал для оптимизации.</text:p>
      <text:p text:style-name="P2">Этап 4. Анализ Парето (диаграмма)</text:p>
      <text:p text:style-name="P6">Операции ранжированы по убыванию затрат:</text:p>
      <table:table table:name="Table_2" table:style-name="Table_5f_2">
        <table:table-column table:style-name="Table_5f_2.A" table:number-columns-repeated="3"/>
        <table:table-column table:style-name="Table_5f_2.D"/>
        <table:table-row>
          <table:table-cell table:style-name="Table_5f_2.A1" office:value-type="string">
            <text:p text:style-name="P2">Ранг</text:p>
          </table:table-cell>
          <table:table-cell table:style-name="Table_5f_2.A1" office:value-type="string">
            <text:p text:style-name="P2">Операция</text:p>
          </table:table-cell>
          <table:table-cell table:style-name="Table_5f_2.A1" office:value-type="string">
            <text:p text:style-name="P2">Затраты, руб.</text:p>
          </table:table-cell>
          <table:table-cell table:style-name="Table_5f_2.A1" office:value-type="string">
            <text:p text:style-name="P2">Накопленная доля</text:p>
          </table:table-cell>
        </table:table-row>
        <table:table-row>
          <table:table-cell table:style-name="Table_5f_2.A1" office:value-type="string">
            <text:p text:style-name="P6">1</text:p>
          </table:table-cell>
          <table:table-cell table:style-name="Table_5f_2.A1" office:value-type="string">
            <text:p text:style-name="P6">Сборка компьютера</text:p>
          </table:table-cell>
          <table:table-cell table:style-name="Table_5f_2.A1" office:value-type="string">
            <text:p text:style-name="P6">3 000</text:p>
          </table:table-cell>
          <table:table-cell table:style-name="Table_5f_2.A1" office:value-type="string">
            <text:p text:style-name="P6">42.3%</text:p>
          </table:table-cell>
        </table:table-row>
        <table:table-row>
          <table:table-cell table:style-name="Table_5f_2.A1" office:value-type="string">
            <text:p text:style-name="P6">2</text:p>
          </table:table-cell>
          <table:table-cell table:style-name="Table_5f_2.A1" office:value-type="string">
            <text:p text:style-name="P6">Переделка брака</text:p>
          </table:table-cell>
          <table:table-cell table:style-name="Table_5f_2.A1" office:value-type="string">
            <text:p text:style-name="P6">2 000</text:p>
          </table:table-cell>
          <table:table-cell table:style-name="Table_5f_2.A1" office:value-type="string">
            <text:p text:style-name="P6">70.4%</text:p>
          </table:table-cell>
        </table:table-row>
        <table:table-row>
          <table:table-cell table:style-name="Table_5f_2.A1" office:value-type="string">
            <text:p text:style-name="P6">3</text:p>
          </table:table-cell>
          <table:table-cell table:style-name="Table_5f_2.A1" office:value-type="string">
            <text:p text:style-name="P6">Тестирование</text:p>
          </table:table-cell>
          <table:table-cell table:style-name="Table_5f_2.A1" office:value-type="string">
            <text:p text:style-name="P6">800</text:p>
          </table:table-cell>
          <table:table-cell table:style-name="Table_5f_2.A1" office:value-type="string">
            <text:p text:style-name="P6">81.7%</text:p>
          </table:table-cell>
        </table:table-row>
        <table:table-row>
          <table:table-cell table:style-name="Table_5f_2.A1" office:value-type="string">
            <text:p text:style-name="P6">4</text:p>
          </table:table-cell>
          <table:table-cell table:style-name="Table_5f_2.A1" office:value-type="string">
            <text:p text:style-name="P6">Подбор комплектующих</text:p>
          </table:table-cell>
          <table:table-cell table:style-name="Table_5f_2.A1" office:value-type="string">
            <text:p text:style-name="P6">500</text:p>
          </table:table-cell>
          <table:table-cell table:style-name="Table_5f_2.A1" office:value-type="string">
            <text:p text:style-name="P6">88.7%</text:p>
          </table:table-cell>
        </table:table-row>
        <table:table-row>
          <table:table-cell table:style-name="Table_5f_2.A1" office:value-type="string">
            <text:p text:style-name="P6">5</text:p>
          </table:table-cell>
          <table:table-cell table:style-name="Table_5f_2.A1" office:value-type="string">
            <text:p text:style-name="P6">Упаковка и отгрузка</text:p>
          </table:table-cell>
          <table:table-cell table:style-name="Table_5f_2.A1" office:value-type="string">
            <text:p text:style-name="P6">400</text:p>
          </table:table-cell>
          <table:table-cell table:style-name="Table_5f_2.A1" office:value-type="string">
            <text:p text:style-name="P6">94.4%</text:p>
          </table:table-cell>
        </table:table-row>
        <table:table-row>
          <table:table-cell table:style-name="Table_5f_2.A1" office:value-type="string">
            <text:p text:style-name="P6">6</text:p>
          </table:table-cell>
          <table:table-cell table:style-name="Table_5f_2.A1" office:value-type="string">
            <text:p text:style-name="P6">Приём заказа</text:p>
          </table:table-cell>
          <table:table-cell table:style-name="Table_5f_2.A1" office:value-type="string">
            <text:p text:style-name="P6">200</text:p>
          </table:table-cell>
          <table:table-cell table:style-name="Table_5f_2.A1" office:value-type="string">
            <text:p text:style-name="P6">97.2%</text:p>
          </table:table-cell>
        </table:table-row>
        <table:table-row>
          <table:table-cell table:style-name="Table_5f_2.A1" office:value-type="string">
            <text:p text:style-name="P6">7</text:p>
          </table:table-cell>
          <table:table-cell table:style-name="Table_5f_2.A1" office:value-type="string">
            <text:p text:style-name="P6">Ожидание в очереди</text:p>
          </table:table-cell>
          <table:table-cell table:style-name="Table_5f_2.A1" office:value-type="string">
            <text:p text:style-name="P6">200</text:p>
          </table:table-cell>
          <table:table-cell table:style-name="Table_5f_2.A1" office:value-type="string">
            <text:p text:style-name="P6">100.0%</text:p>
          </table:table-cell>
        </table:table-row>
      </table:table>
      <text:p text:style-name="P6"/>
      <text:p text:style-name="P6"><text:span text:style-name="T1">Группа A</text:span> (80% затрат): Сборка компьютера, Переделка брака, Тестирование — эти три операции формируют 81.7% всех затрат и требуют приоритетной оптимизации.</text:p>
      <text:p text:style-name="P2">Этап 5. Расчёт потенциальной экономии</text:p>
      <table:table table:name="Table_3" table:style-name="Table_5f_3">
        <table:table-column table:style-name="Table_5f_3.A" table:number-columns-repeated="3"/>
        <table:table-column table:style-name="Table_5f_3.D"/>
        <table:table-row>
          <table:table-cell table:style-name="Table_5f_3.A1" office:value-type="string">
            <text:p text:style-name="P2">Направление оптимизации</text:p>
          </table:table-cell>
          <table:table-cell table:style-name="Table_5f_3.A1" office:value-type="string">
            <text:p text:style-name="P2">Целевое сокращение</text:p>
          </table:table-cell>
          <table:table-cell table:style-name="Table_5f_3.A1" office:value-type="string">
            <text:p text:style-name="P2">Экономия, руб.</text:p>
          </table:table-cell>
          <table:table-cell table:style-name="Table_5f_3.A1" office:value-type="string">
            <text:p text:style-name="P2">Экономия, %</text:p>
          </table:table-cell>
        </table:table-row>
        <table:table-row>
          <table:table-cell table:style-name="Table_5f_3.A1" office:value-type="string">
            <text:p text:style-name="P6">Устранение <text:soft-page-break/>ожидания в очереди (внедрение системы планирования)</text:p>
          </table:table-cell>
          <table:table-cell table:style-name="Table_5f_3.A1" office:value-type="string">
            <text:p text:style-name="P6">100%</text:p>
          </table:table-cell>
          <table:table-cell table:style-name="Table_5f_3.A1" office:value-type="string">
            <text:p text:style-name="P6">200</text:p>
          </table:table-cell>
          <table:table-cell table:style-name="Table_5f_3.A1" office:value-type="string">
            <text:p text:style-name="P6">2.8%<text:soft-page-break/></text:p>
          </table:table-cell>
        </table:table-row>
        <table:table-row>
          <table:table-cell table:style-name="Table_5f_3.A1" office:value-type="string">
            <text:p text:style-name="P6">Снижение брака с 15% до 5% (входной контроль комплектующих)</text:p>
          </table:table-cell>
          <table:table-cell table:style-name="Table_5f_3.A1" office:value-type="string">
            <text:p text:style-name="P6">67%</text:p>
          </table:table-cell>
          <table:table-cell table:style-name="Table_5f_3.A1" office:value-type="string">
            <text:p text:style-name="P6">1 340</text:p>
          </table:table-cell>
          <table:table-cell table:style-name="Table_5f_3.A1" office:value-type="string">
            <text:p text:style-name="P6">18.9%</text:p>
          </table:table-cell>
        </table:table-row>
        <table:table-row>
          <table:table-cell table:style-name="Table_5f_3.A1" office:value-type="string">
            <text:p text:style-name="P6">Оптимизация сборки (стандартизация рабочих мест)</text:p>
          </table:table-cell>
          <table:table-cell table:style-name="Table_5f_3.A1" office:value-type="string">
            <text:p text:style-name="P6">15%</text:p>
          </table:table-cell>
          <table:table-cell table:style-name="Table_5f_3.A1" office:value-type="string">
            <text:p text:style-name="P6">450</text:p>
          </table:table-cell>
          <table:table-cell table:style-name="Table_5f_3.A1" office:value-type="string">
            <text:p text:style-name="P6">6.3%</text:p>
          </table:table-cell>
        </table:table-row>
        <table:table-row>
          <table:table-cell table:style-name="Table_5f_3.A1" office:value-type="string">
            <text:p text:style-name="P2">Итого потенциальная экономия</text:p>
          </table:table-cell>
          <table:table-cell table:style-name="Table_5f_3.A1" office:value-type="string">
            <text:p text:style-name="P6"/>
          </table:table-cell>
          <table:table-cell table:style-name="Table_5f_3.A1" office:value-type="string">
            <text:p text:style-name="P2">1 990</text:p>
          </table:table-cell>
          <table:table-cell table:style-name="Table_5f_3.A1" office:value-type="string">
            <text:p text:style-name="P2">28.0%</text:p>
          </table:table-cell>
        </table:table-row>
      </table:table>
      <text:p text:style-name="P6"/>
      <text:p text:style-name="P2">Этап 6. Метрика Cost to Serve</text:p>
      <text:p text:style-name="P6">Cost to Serve = Полная стоимость процесса / Количество обслуженных заказов.</text:p>
      <text:p text:style-name="P6">При текущих затратах 7 100 руб. на один заказ и среднем годовом объёме 2 800 заказов (годовой оборот 20 млн руб. при средней цене заказа ~7 100 руб.):</text:p>
      <text:p text:style-name="P7">Текущий Cost to Serve: <text:span text:style-name="T1">7 100 руб./заказ</text:span></text:p>
      <text:p text:style-name="P7">Целевой Cost to Serve (после оптимизации): <text:span text:style-name="T1">5 110 руб./заказ</text:span></text:p>
      <text:p text:style-name="P7">Годовая экономия: 1 990 <text:span text:style-name="T2">2 800 = 5 572 000 руб.</text:span></text:p>
      <text:p text:style-name="P2">Этап 7. Визуализация результатов</text:p>
      <text:p text:style-name="P6">Результаты стоимостного анализа визуализированы на диаграмме в Draw.io: каждая операция процесса аннотирована стоимостью, категорией VA/NVA, временем выполнения. Построена диаграмма Парето с выделением групп A, B, C.</text:p>
      <text:p text:style-name="P6"/>
      <text:p text:style-name="P1"/>
      <text:p text:style-name="P1"/>
      <text:p text:style-name="P1"><text:soft-page-break/>4. Диаграммы</text:p>
      <text:p text:style-name="P8"><draw:frame draw:style-name="fr1" draw:name="Изображение1" text:anchor-type="char" svg:width="17cm" svg:height="6.632cm" draw:z-index="0"><draw:image xlink:href="Pictures/100000010000061900000261B54B91F2.png" xlink:type="simple" xlink:show="embed" xlink:actuate="onLoad" draw:mime-type="image/png"/></draw:frame>Рисунок 1. Диаграмма процесса «Обработка заказа клиента» с аннотациями стоимостного анализа</text:p>
      <text:p text:style-name="P8"/>
      <text:p text:style-name="P8"><draw:frame draw:style-name="fr1" draw:name="Изображение2" text:anchor-type="char" svg:width="17cm" svg:height="6.985cm" draw:z-index="1"><draw:image xlink:href="Pictures/10000001000006180000028106088777.png" xlink:type="simple" xlink:show="embed" xlink:actuate="onLoad" draw:mime-type="image/png"/></draw:frame>Рисунок 2. Диаграмма Парето затрат по операциям процесса</text:p>
      <text:p text:style-name="P6"/>
      <text:p text:style-name="P3">5. Ответы на контрольные вопросы</text:p>
      <text:p text:style-name="P2">1. Какие типы затрат необходимо включить в стоимостной анализ?</text:p>
      <text:p text:style-name="P6">В стоимостной анализ необходимо включить прямые затраты (зарплата исполнителей, материалы, амортизация оборудования, непосредственно используемого в операции) и косвенные затраты (аренда помещений, коммунальные услуги, управленческие расходы, ИТ-инфраструктура). В нашем анализе прямые затраты составили 4 950 руб. (69.7%), косвенные — 2 150 руб. (30.3%) на один заказ. Помимо этого, при полном анализе следует учитывать <text:soft-page-break/>затраты упущенных возможностей (opportunity cost) — например, время ожидания в очереди, которое могло бы быть использовано продуктивно. Также важно учитывать скрытые затраты: потери от возвратов клиентов, стоимость гарантийного обслуживания, затраты на хранение незавершённого производства.</text:p>
      <text:p text:style-name="P6"/>
      <text:p text:style-name="P2">2. Как рассчитывается часовая ставка сотрудника?</text:p>
      <text:p text:style-name="P6">Часовая ставка сотрудника рассчитывается путём деления полных затрат на содержание сотрудника за период на количество продуктивных рабочих часов за тот же период. Полные затраты включают: заработную плату, страховые взносы (30.2%), расходы на рабочее место (оборудование, ПО, мебель), обучение и повышение квалификации. При средней зарплате сборщика компании Quill 45 000 руб./мес. с учётом страховых взносов и накладных расходов полные затраты составляют ~73 000 руб./мес. При 168 продуктивных часах в месяц (с учётом перерывов и непроизводительного времени) часовая ставка составляет ~435 руб./час. В нашем анализе использована усреднённая ставка 450 руб./час, покрывающая все категории сотрудников.</text:p>
      <text:p text:style-name="P6"/>
      <text:p text:style-name="P2">3. В чем заключается разница между Activity-Based Costing и Time-Driven ABC?</text:p>
      <text:p text:style-name="P6">Классический метод ABC распределяет косвенные затраты по операциям с использованием множественных драйверов затрат (machine hours, количество транзакций, площадь и т.д.), что обеспечивает высокую точность, но требует значительных усилий по сбору данных и поддержанию модели. Time-Driven ABC упрощает подход, используя единственный драйвер — время выполнения операции, умноженное на часовую ставку ресурса. В нашем анализе классический ABC дал итоговую стоимость сборки 3 000 руб. (с учётом трёх драйверов), а TD-ABC — 3 000 руб. (4 часа 450 руб. + материалы 1 200 руб.), результаты оказались близки. TD-ABC особенно удобен для компаний среднего размера, таких как Quill, где сложная модель ABC избыточна.</text:p>
      <text:p text:style-name="P6"/>
      <text:p text:style-name="P2">4. Как классифицируются операции по добавленной стоимости?</text:p>
      <text:p text:style-name="P6">Операции классифицируются на три категории: VA (Value-Added) — операции, за которые клиент готов платить, непосредственно трансформирующие продукт или услугу (в нашем процессе: сборка компьютера, тестирование, упаковка); NVA (Non-Value-Added) — операции, не создающие ценности ни для клиента, <text:soft-page-break/>ни для бизнеса, подлежащие устранению (ожидание в очереди, переделка брака); BVA (Business-Value-Added) — операции, не создающие прямой ценности для клиента, но необходимые для функционирования бизнеса (бухгалтерский учёт, отчётность перед регулятором). В нашем анализе NVA-операции составили 31% затрат (2 200 руб.), что указывает на значительный потенциал оптимизации. Тест для определения категории: «Готов ли клиент платить за эту операцию?» — если нет, это NVA или BVA.</text:p>
      <text:p text:style-name="P6"/>
      <text:p text:style-name="P2">5. Какой принцип лежит в основе анализа Парето?</text:p>
      <text:p text:style-name="P6">Принцип Парето (правило 80/20) гласит, что примерно 80% последствий порождаются 20% причин. В контексте стоимостного анализа это означает, что небольшое число операций формирует основную долю затрат. В нашем анализе три операции из семи (43%) — сборка, переделка брака и тестирование — формируют 81.7% всех затрат процесса. Принцип Парето позволяет сфокусировать усилия по оптимизации на наиболее затратных операциях, обеспечивая максимальный экономический эффект при минимальных вложениях. Этот подход применим не только к затратам, но и к анализу дефектов (20% типов дефектов вызывают 80% отказов), времени (20% операций занимают 80% времени цикла) и другим аспектам процесса.</text:p>
      <text:p text:style-name="P6"/>
      <text:p text:style-name="P2">6. Как интерпретировать диаграмму Парето?</text:p>
      <text:p text:style-name="P6">Диаграмма Парето представляет собой комбинированную гистограмму (столбцы — затраты по операциям в порядке убывания) и кумулятивную кривую (линия — накопленная доля затрат). Для интерпретации находят точку, где кумулятивная кривая пересекает отметку 80%: все операции левее этой точки относятся к группе A и требуют приоритетного внимания. В нашей диаграмме группа A включает: Сборку (42.3%), Переделку брака (28.1%) и Тестирование (11.3%) — их кумулятивная доля 81.7%. Группа B (15-20%): Подбор комплектующих и Упаковка. Группа C (менее 5% оставшихся): Приём заказа и Ожидание. Диаграмма наглядно показывает, что переделка брака — вторая по величине статья затрат, и при этом она является NVA-операцией, то есть подлежит устранению.</text:p>
      <text:p text:style-name="P6"/>
      <text:p text:style-name="P2">7. Почему операции группы A требуют приоритетной оптимизации?</text:p>
      <text:p text:style-name="P6">Операции группы A формируют наибольшую долю затрат процесса, поэтому даже небольшое процентное улучшение в этих операциях даёт значительный <text:soft-page-break/>абсолютный эффект. В нашем анализе снижение затрат на сборку на 15% (стандартизация рабочих мест, оптимизация компоновки) экономит 450 руб. на заказ, тогда как полное устранение ожидания в очереди — только 200 руб. Особого внимания заслуживает переделка брака (2 000 руб., 28.2%), поскольку это NVA-операция: сокращение брака с 15% до 5% даёт экономию 1 340 руб. на заказ — наибольший эффект среди всех направлений оптимизации. Приоритизация по группе A позволяет рационально распределить ограниченные ресурсы компании на проекты улучшений с максимальной отдачей.</text:p>
      <text:p text:style-name="P6"/>
      <text:p text:style-name="P2">8. Как рассчитывается потенциальная экономия от оптимизации?</text:p>
      <text:p text:style-name="P6">Потенциальная экономия рассчитывается как разница между текущими затратами на операцию и целевыми затратами после внедрения улучшений. Формула: Экономия = Текущие затраты <text:span text:style-name="T2">Процент сокращения. Для переделки брака в нашем анализе: текущие затраты 2 000 руб. при уровне брака 15%; целевой уровень брака 5%; сокращение на 67%; экономия = 2 000 </text:span>0.67 = 1 340 руб. на заказ. Годовая экономия при 2 800 заказах = 3 752 000 руб. При этом необходимо учитывать затраты на внедрение улучшений (стоимость входного контроля комплектующих, обучение персонала) и рассчитывать срок окупаемости (ROI). Суммарная потенциальная экономия по всем направлениям составила 1 990 руб./заказ, или 28% от текущей стоимости процесса.</text:p>
      <text:p text:style-name="P6"/>
      <text:p text:style-name="P2">9. Что означает метрика "Cost to Serve"?</text:p>
      <text:p text:style-name="P6">Cost to Serve (стоимость обслуживания) — это полная стоимость выполнения процесса для одного клиента или заказа, включающая все прямые и косвенные затраты от момента приёма заказа до отгрузки готовой продукции. В нашем анализе текущий Cost to Serve компании Quill составляет 7 100 руб. на один заказ. Эта метрика позволяет оценить рентабельность отдельных клиентов и продуктовых линеек: если маржа по заказу ниже Cost to Serve, обслуживание такого заказа убыточно. Метрика также используется для бенчмаркинга — сравнения с конкурентами и отраслевыми стандартами. После оптимизации целевой Cost to Serve снижается до 5 110 руб./заказ, что повышает конкурентоспособность компании и позволяет предлагать более привлекательные цены.</text:p>
      <text:p text:style-name="P6"/>
      <text:p text:style-name="P6"/>
      <text:p text:style-name="P2"><text:soft-page-break/>10. Какие скрытые затраты часто упускаются при анализе?</text:p>
      <text:p text:style-name="P6">К скрытым затратам, которые часто не учитываются при стоимостном анализе, относятся: затраты на координацию между подразделениями (совещания, согласования, переписка), стоимость хранения незавершённого производства (замороженный капитал в комплектующих на складе), потери от упущенных заказов из-за длительного времени обслуживания, затраты на гарантийное обслуживание, стоимость текучести кадров (подбор и обучение новых сотрудников). В компании Quill скрытыми затратами являются: стоимость хранения комплектующих от трёх поставщиков (замораживание оборотного капитала), время менеджеров на разрешение конфликтных ситуаций с клиентами при задержке заказов, а также репутационные потери при поставке дефектной продукции. По оценкам, скрытые затраты могут составлять до 20-30% от явных затрат процесса.</text:p>
      <text:p text:style-name="P6"/>
      <text:p text:style-name="P2">11. Как влияет масштаб деятельности на удельную стоимость операции?</text:p>
      <text:p text:style-name="P6">С увеличением масштаба деятельности удельная стоимость операции, как правило, снижается за счёт эффекта масштаба (economies of scale): косвенные затраты (аренда, управление, ИТ-инфраструктура) распределяются на большее количество заказов, что снижает их долю в стоимости каждого заказа. Для компании Quill с годовым оборотом 20 млн руб. косвенные затраты на один заказ составляют 2 150 руб. (30.3%). При удвоении объёма до 5 600 заказов в год (без увеличения постоянных затрат) косвенные затраты на заказ снизятся до ~1 075 руб., а общая стоимость процесса — до ~6 025 руб./заказ. Однако эффект масштаба имеет предел: при превышении пропускной способности производства потребуются дополнительные инвестиции в оборудование и персонал, что может привести к скачкообразному росту затрат (ступенчатая функция затрат).</text:p>
      <text:p text:style-name="P6"/>
      <text:p text:style-name="P1">6. Вывод</text:p>
      <text:p text:style-name="P6">В ходе лабораторной работы был проведён стоимостной анализ процесса «Обработка заказа клиента» компании Quill с применением методов ABC и Time-Driven ABC. Общая стоимость процесса составила 7 100 руб. на один заказ, при этом 31% затрат (2 200 руб.) приходится на NVA-операции — ожидание в очереди и переделку брака. Анализ Парето выявил, что три операции из семи (сборка, переделка брака, тестирование) формируют 81.7% всех затрат. Разработан план оптимизации с потенциальной экономией 1 990 <text:soft-page-break/>руб./заказ (28%), что при годовом объёме 2 800 заказов даёт экономию 5 572 000 руб. в год.</text:p>
      <text:p text:style-name="P6">Стоимостной анализ подтвердил свою эффективность как инструмент выявления неэффективных операций и обоснования решений по оптимизации. Наибольший потенциал экономии (1 340 руб./заказ) обеспечивает снижение процента брака через улучшение входного контроля комплектующих от поставщиков, что одновременно повышает качество продукции и сокращает время выполнения заказа. Полученные навыки стоимостного анализа применимы к любым бизнес-процессам, где требуется экономическое обоснование проектов оптимизаци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6-06-20T21:51:43.761000000</dc:date>
    <meta:editing-duration>PT2M3S</meta:editing-duration>
    <meta:editing-cycles>4</meta:editing-cycles>
    <meta:document-statistic meta:table-count="4" meta:image-count="2" meta:object-count="0" meta:page-count="11" meta:paragraph-count="196" meta:word-count="2134" meta:character-count="15663" meta:non-whitespace-character-count="13695"/>
  </office:meta>
</office:document-meta>
</file>