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47C00000353919D9AE2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" style:family="table">
      <style:table-properties style:width="17cm" table:align="margins"/>
    </style:style>
    <style:style style:name="Table.A" style:family="table-column">
      <style:table-column-properties style:column-width="5.667cm" style:rel-column-width="21845*"/>
    </style:style>
    <style:style style:name="Table.A1" style:family="table-cell">
      <style:table-cell-properties fo:padding="0.101cm" fo:border="none"/>
    </style:style>
    <style:style style:name="Table_5f_1" style:display-name="Table_1" style:family="table">
      <style:table-properties style:width="17cm" table:align="margins"/>
    </style:style>
    <style:style style:name="Table_5f_1.A" style:display-name="Table_1.A" style:family="table-column">
      <style:table-column-properties style:column-width="4.249cm" style:rel-column-width="16383*"/>
    </style:style>
    <style:style style:name="Table_5f_1.D" style:display-name="Table_1.D" style:family="table-column">
      <style:table-column-properties style:column-width="4.251cm" style:rel-column-width="16386*"/>
    </style:style>
    <style:style style:name="Table_5f_1.A1" style:display-name="Table_1.A1" style:family="table-cell">
      <style:table-cell-properties fo:padding="0.101cm" fo:border="none"/>
    </style:style>
    <style:style style:name="Table_5f_2" style:display-name="Table_2" style:family="table">
      <style:table-properties style:width="17cm" table:align="margins"/>
    </style:style>
    <style:style style:name="Table_5f_2.A" style:display-name="Table_2.A" style:family="table-column">
      <style:table-column-properties style:column-width="4.249cm" style:rel-column-width="16383*"/>
    </style:style>
    <style:style style:name="Table_5f_2.D" style:display-name="Table_2.D" style:family="table-column">
      <style:table-column-properties style:column-width="4.251cm" style:rel-column-width="16386*"/>
    </style:style>
    <style:style style:name="Table_5f_2.A1" style:display-name="Table_2.A1" style:family="table-cell">
      <style:table-cell-properties fo:padding="0.101cm" fo:border="none"/>
    </style:style>
    <style:style style:name="Table_5f_3" style:display-name="Table_3" style:family="table">
      <style:table-properties style:width="17cm" table:align="margins"/>
    </style:style>
    <style:style style:name="Table_5f_3.A" style:display-name="Table_3.A" style:family="table-column">
      <style:table-column-properties style:column-width="3.399cm" style:rel-column-width="13106*"/>
    </style:style>
    <style:style style:name="Table_5f_3.E" style:display-name="Table_3.E" style:family="table-column">
      <style:table-column-properties style:column-width="3.401cm" style:rel-column-width="13111*"/>
    </style:style>
    <style:style style:name="Table_5f_3.A1" style:display-name="Table_3.A1" style:family="table-cell">
      <style:table-cell-properties fo:padding="0.101cm" fo:border="none"/>
    </style:style>
    <style:style style:name="P1" style:family="paragraph" style:parent-style-name="Standard">
      <style:paragraph-properties fo:margin-top="0.499cm" fo:margin-bottom="0.3cm" style:contextual-spacing="false" fo:line-height="115%" fo:text-align="justify" style:justify-single-word="false"/>
      <style:text-properties style:font-name="Times New Roman" fo:font-size="14pt" fo:font-weight="bold"/>
    </style:style>
    <style:style style:name="P2" style:family="paragraph" style:parent-style-name="Standard">
      <style:paragraph-properties fo:margin-top="0cm" fo:margin-bottom="0.199cm" style:contextual-spacing="false" fo:line-height="115%" fo:text-align="justify" style:justify-single-word="false"/>
      <style:text-properties style:font-name="Times New Roman" fo:font-size="14pt" fo:font-weight="bold"/>
    </style:style>
    <style:style style:name="P3" style:family="paragraph" style:parent-style-name="Standard">
      <style:paragraph-properties fo:margin-top="0.7cm" fo:margin-bottom="0.501cm" style:contextual-spacing="false" fo:line-height="115%" fo:text-align="justify" style:justify-single-word="false"/>
      <style:text-properties style:font-name="Times New Roman" fo:font-size="14pt" fo:font-weight="bold"/>
    </style:style>
    <style:style style:name="P4" style:family="paragraph" style:parent-style-name="Standard" style:list-style-name="">
      <style:paragraph-properties fo:margin-top="0cm" fo:margin-bottom="0cm" style:contextual-spacing="false" fo:line-height="115%" fo:text-align="center" style:justify-single-word="false"/>
      <style:text-properties style:font-name="Times New Roman" fo:font-size="14pt" fo:font-weight="bold"/>
    </style:style>
    <style:style style:name="P5" style:family="paragraph" style:parent-style-name="Standard">
      <style:paragraph-properties fo:margin-top="0cm" fo:margin-bottom="0cm" style:contextual-spacing="false" fo:line-height="115%" fo:text-align="center" style:justify-single-word="false"/>
      <style:text-properties style:font-name="Times New Roman" fo:font-size="14pt" fo:font-weight="bold"/>
    </style:style>
    <style:style style:name="P6" style:family="paragraph" style:parent-style-name="Standard">
      <style:paragraph-properties fo:margin-top="0cm" fo:margin-bottom="0.199cm" style:contextual-spacing="false" fo:line-height="115%" fo:text-align="justify" style:justify-single-word="false"/>
      <style:text-properties style:font-name="Times New Roman" fo:font-size="14pt"/>
    </style:style>
    <style:style style:name="P7" style:family="paragraph" style:parent-style-name="Standard">
      <style:paragraph-properties fo:margin-top="0cm" fo:margin-bottom="0.199cm" style:contextual-spacing="false" fo:line-height="115%" fo:text-align="start" style:justify-single-word="false"/>
      <style:text-properties style:font-name="Times New Roman" fo:font-size="14pt" fo:font-style="italic"/>
    </style:style>
    <style:style style:name="T1" style:family="text">
      <style:text-properties fo:font-weight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1">ОТЧЁТ</text:h>
      <text:p text:style-name="P5">по лабораторной работе №4</text:p>
      <text:p text:style-name="P5">по дисциплине «Моделирование бизнес-процессов»</text:p>
      <text:p text:style-name="P5"/>
      <text:p text:style-name="P6"><text:span text:style-name="T1">Тема:</text:span> Стоимостный анализ (Activity Based Costing)</text:p>
      <text:p text:style-name="P6">Выполнил: студент группы БИНOZS-331 Трофимов А.Н.</text:p>
      <text:p text:style-name="P6"/>
      <text:p text:style-name="P1">1. Цель работы</text:p>
      <text:p text:style-name="P6">Освоить практические навыки проведения стоимостного анализа бизнес-процессов методом Activity Based Costing (ABC) и использования пользовательских критериев оценки (User Defined Properties) с применением графического редактора Draw.io.</text:p>
      <text:p text:style-name="P6"/>
      <text:p text:style-name="P1">2. Краткие теоретические сведения</text:p>
      <text:p text:style-name="P6">Activity Based Costing (ABC) — метод калькуляции себестоимости, при котором затраты распределяются не по подразделениям или статьям бюджета, а по конкретным операциям (activities), выполняемым в рамках бизнес-процесса. В отличие от традиционных методов, где косвенные расходы распределяются пропорционально одному базовому показателю (например, объёму выпуска), ABC-метод использует множество драйверов затрат, что обеспечивает более точное отнесение издержек на конечный продукт или услугу.</text:p>
      <text:p text:style-name="P6">Основные компоненты ABC-анализа включают: объекты затрат (products/services), операции (activities), ресурсы (resources) и драйверы затрат (cost drivers). Стоимость каждой операции складывается из прямых затрат (заработная плата исполнителей, материалы, комплектующие) и косвенных затрат (аренда помещений, амортизация оборудования, коммунальные услуги), распределённых через соответствующие драйверы. Такой подход позволяет выявить реальную себестоимость каждого этапа процесса и определить, какие операции генерируют наибольшие расходы.</text:p>
      <text:p text:style-name="P6">User Defined Properties (UDP) — пользовательские свойства, добавляемые к элементам модели для хранения дополнительной аналитической информации, не предусмотренной стандартной нотацией. UDP расширяют базовую модель, позволяя связать с каждой операцией такие параметры, как частота выполнения, длительность, ответственное лицо, уровень критичности и степень <text:soft-page-break/>автоматизируемости. В графическом редакторе Draw.io UDP реализуются через пользовательские атрибуты (Custom Properties) элементов диаграммы и текстовые аннотации.</text:p>
      <text:p text:style-name="P6"/>
      <text:p text:style-name="P1">3. Ход работы</text:p>
      <text:p text:style-name="P1">3.1. Подготовка модели</text:p>
      <text:p text:style-name="P6">В качестве исходной модели использовалась функциональная модель AS-IS компании Quill, построенная в нотации IDEF0. Компания Quill занимается сборкой и продажей компьютеров (настольные ПК и ноутбуки) с годовым оборотом около 20 млн руб. и тремя поставщиками компонентов. Основные процессы: приём заказов, сборка, тестирование, упаковка, отгрузка.</text:p>
      <text:p text:style-name="P1">3.2. Определение центров затрат</text:p>
      <text:p text:style-name="P6">Для каждой операции модели были определены центры затрат — организационные единицы или группы ресурсов, генерирующие расходы:</text:p>
      <table:table table:name="Table" table:style-name="Table">
        <table:table-column table:style-name="Table.A" table:number-columns-repeated="3"/>
        <table:table-row>
          <table:table-cell table:style-name="Table.A1" office:value-type="string">
            <text:p text:style-name="P2">Операция</text:p>
          </table:table-cell>
          <table:table-cell table:style-name="Table.A1" office:value-type="string">
            <text:p text:style-name="P2">Центр затрат</text:p>
          </table:table-cell>
          <table:table-cell table:style-name="Table.A1" office:value-type="string">
            <text:p text:style-name="P2">Основные ресурсы</text:p>
          </table:table-cell>
        </table:table-row>
        <table:table-row>
          <table:table-cell table:style-name="Table.A1" office:value-type="string">
            <text:p text:style-name="P6">Приём и обработка заказов</text:p>
          </table:table-cell>
          <table:table-cell table:style-name="Table.A1" office:value-type="string">
            <text:p text:style-name="P6">Отдел продаж</text:p>
          </table:table-cell>
          <table:table-cell table:style-name="Table.A1" office:value-type="string">
            <text:p text:style-name="P6">Менеджеры, CRM-система</text:p>
          </table:table-cell>
        </table:table-row>
        <table:table-row>
          <table:table-cell table:style-name="Table.A1" office:value-type="string">
            <text:p text:style-name="P6">Закупка компонентов</text:p>
          </table:table-cell>
          <table:table-cell table:style-name="Table.A1" office:value-type="string">
            <text:p text:style-name="P6">Отдел снабжения</text:p>
          </table:table-cell>
          <table:table-cell table:style-name="Table.A1" office:value-type="string">
            <text:p text:style-name="P6">Менеджер по закупкам, логистика</text:p>
          </table:table-cell>
        </table:table-row>
        <table:table-row>
          <table:table-cell table:style-name="Table.A1" office:value-type="string">
            <text:p text:style-name="P6">Сборка компьютеров</text:p>
          </table:table-cell>
          <table:table-cell table:style-name="Table.A1" office:value-type="string">
            <text:p text:style-name="P6">Производственный цех</text:p>
          </table:table-cell>
          <table:table-cell table:style-name="Table.A1" office:value-type="string">
            <text:p text:style-name="P6">Сборщики, инструменты, рабочие места</text:p>
          </table:table-cell>
        </table:table-row>
        <table:table-row>
          <table:table-cell table:style-name="Table.A1" office:value-type="string">
            <text:p text:style-name="P6">Тестирование</text:p>
          </table:table-cell>
          <table:table-cell table:style-name="Table.A1" office:value-type="string">
            <text:p text:style-name="P6">Отдел контроля качества</text:p>
          </table:table-cell>
          <table:table-cell table:style-name="Table.A1" office:value-type="string">
            <text:p text:style-name="P6">Тестировщики, диагностическое ПО</text:p>
          </table:table-cell>
        </table:table-row>
        <table:table-row>
          <table:table-cell table:style-name="Table.A1" office:value-type="string">
            <text:p text:style-name="P6">Упаковка</text:p>
          </table:table-cell>
          <table:table-cell table:style-name="Table.A1" office:value-type="string">
            <text:p text:style-name="P6">Склад готовой продукции</text:p>
          </table:table-cell>
          <table:table-cell table:style-name="Table.A1" office:value-type="string">
            <text:p text:style-name="P6">Упаковщики, упаковочные материалы</text:p>
          </table:table-cell>
        </table:table-row>
        <table:table-row>
          <table:table-cell table:style-name="Table.A1" office:value-type="string">
            <text:p text:style-name="P6">Отгрузка</text:p>
          </table:table-cell>
          <table:table-cell table:style-name="Table.A1" office:value-type="string">
            <text:p text:style-name="P6">Логистический отдел</text:p>
          </table:table-cell>
          <table:table-cell table:style-name="Table.A1" office:value-type="string">
            <text:p text:style-name="P6">Водители, транспорт</text:p>
          </table:table-cell>
        </table:table-row>
      </table:table>
      <text:p text:style-name="P6"/>
      <text:p text:style-name="P1"/>
      <text:p text:style-name="P1"><text:soft-page-break/>3.3. Расчёт стоимости операций</text:p>
      <text:p text:style-name="P6">Для производства одного настольного ПК были рассчитаны следующие затраты:</text:p>
      <table:table table:name="Table_1" table:style-name="Table_5f_1">
        <table:table-column table:style-name="Table_5f_1.A" table:number-columns-repeated="3"/>
        <table:table-column table:style-name="Table_5f_1.D"/>
        <table:table-row>
          <table:table-cell table:style-name="Table_5f_1.A1" office:value-type="string">
            <text:p text:style-name="P2">Операция</text:p>
          </table:table-cell>
          <table:table-cell table:style-name="Table_5f_1.A1" office:value-type="string">
            <text:p text:style-name="P2">Прямые затраты (руб.)</text:p>
          </table:table-cell>
          <table:table-cell table:style-name="Table_5f_1.A1" office:value-type="string">
            <text:p text:style-name="P2">Косвенные затраты (руб.)</text:p>
          </table:table-cell>
          <table:table-cell table:style-name="Table_5f_1.A1" office:value-type="string">
            <text:p text:style-name="P2">Итого (руб.)</text:p>
          </table:table-cell>
        </table:table-row>
        <table:table-row>
          <table:table-cell table:style-name="Table_5f_1.A1" office:value-type="string">
            <text:p text:style-name="P6">Приём заказа</text:p>
          </table:table-cell>
          <table:table-cell table:style-name="Table_5f_1.A1" office:value-type="string">
            <text:p text:style-name="P6">150</text:p>
          </table:table-cell>
          <table:table-cell table:style-name="Table_5f_1.A1" office:value-type="string">
            <text:p text:style-name="P6">50</text:p>
          </table:table-cell>
          <table:table-cell table:style-name="Table_5f_1.A1" office:value-type="string">
            <text:p text:style-name="P6">200</text:p>
          </table:table-cell>
        </table:table-row>
        <table:table-row>
          <table:table-cell table:style-name="Table_5f_1.A1" office:value-type="string">
            <text:p text:style-name="P6">Закупка компонентов</text:p>
          </table:table-cell>
          <table:table-cell table:style-name="Table_5f_1.A1" office:value-type="string">
            <text:p text:style-name="P6">25 000</text:p>
          </table:table-cell>
          <table:table-cell table:style-name="Table_5f_1.A1" office:value-type="string">
            <text:p text:style-name="P6">200</text:p>
          </table:table-cell>
          <table:table-cell table:style-name="Table_5f_1.A1" office:value-type="string">
            <text:p text:style-name="P6">25 200</text:p>
          </table:table-cell>
        </table:table-row>
        <table:table-row>
          <table:table-cell table:style-name="Table_5f_1.A1" office:value-type="string">
            <text:p text:style-name="P6">Сборка</text:p>
          </table:table-cell>
          <table:table-cell table:style-name="Table_5f_1.A1" office:value-type="string">
            <text:p text:style-name="P6">1 500</text:p>
          </table:table-cell>
          <table:table-cell table:style-name="Table_5f_1.A1" office:value-type="string">
            <text:p text:style-name="P6">500</text:p>
          </table:table-cell>
          <table:table-cell table:style-name="Table_5f_1.A1" office:value-type="string">
            <text:p text:style-name="P6">2 000</text:p>
          </table:table-cell>
        </table:table-row>
        <table:table-row>
          <table:table-cell table:style-name="Table_5f_1.A1" office:value-type="string">
            <text:p text:style-name="P6">Тестирование</text:p>
          </table:table-cell>
          <table:table-cell table:style-name="Table_5f_1.A1" office:value-type="string">
            <text:p text:style-name="P6">300</text:p>
          </table:table-cell>
          <table:table-cell table:style-name="Table_5f_1.A1" office:value-type="string">
            <text:p text:style-name="P6">200</text:p>
          </table:table-cell>
          <table:table-cell table:style-name="Table_5f_1.A1" office:value-type="string">
            <text:p text:style-name="P6">500</text:p>
          </table:table-cell>
        </table:table-row>
        <table:table-row>
          <table:table-cell table:style-name="Table_5f_1.A1" office:value-type="string">
            <text:p text:style-name="P6">Упаковка</text:p>
          </table:table-cell>
          <table:table-cell table:style-name="Table_5f_1.A1" office:value-type="string">
            <text:p text:style-name="P6">200</text:p>
          </table:table-cell>
          <table:table-cell table:style-name="Table_5f_1.A1" office:value-type="string">
            <text:p text:style-name="P6">100</text:p>
          </table:table-cell>
          <table:table-cell table:style-name="Table_5f_1.A1" office:value-type="string">
            <text:p text:style-name="P6">300</text:p>
          </table:table-cell>
        </table:table-row>
        <table:table-row>
          <table:table-cell table:style-name="Table_5f_1.A1" office:value-type="string">
            <text:p text:style-name="P6">Отгрузка</text:p>
          </table:table-cell>
          <table:table-cell table:style-name="Table_5f_1.A1" office:value-type="string">
            <text:p text:style-name="P6">350</text:p>
          </table:table-cell>
          <table:table-cell table:style-name="Table_5f_1.A1" office:value-type="string">
            <text:p text:style-name="P6">150</text:p>
          </table:table-cell>
          <table:table-cell table:style-name="Table_5f_1.A1" office:value-type="string">
            <text:p text:style-name="P6">500</text:p>
          </table:table-cell>
        </table:table-row>
        <table:table-row>
          <table:table-cell table:style-name="Table_5f_1.A1" office:value-type="string">
            <text:p text:style-name="P2">Итого</text:p>
          </table:table-cell>
          <table:table-cell table:style-name="Table_5f_1.A1" office:value-type="string">
            <text:p text:style-name="P2">27 500</text:p>
          </table:table-cell>
          <table:table-cell table:style-name="Table_5f_1.A1" office:value-type="string">
            <text:p text:style-name="P2">1 200</text:p>
          </table:table-cell>
          <table:table-cell table:style-name="Table_5f_1.A1" office:value-type="string">
            <text:p text:style-name="P2">28 700</text:p>
          </table:table-cell>
        </table:table-row>
      </table:table>
      <text:p text:style-name="P6"/>
      <text:p text:style-name="P6">Структура себестоимости показывает, что компоненты составляют около 87,8% общей стоимости производства, сборка — около 7%, а остальные операции — менее 5%.</text:p>
      <text:p text:style-name="P1">3.4. Определение User Defined Properties</text:p>
      <text:p text:style-name="P6">Для каждой операции были определены следующие UDP:</text:p>
      <table:table table:name="Table_2" table:style-name="Table_5f_2">
        <table:table-column table:style-name="Table_5f_2.A" table:number-columns-repeated="3"/>
        <table:table-column table:style-name="Table_5f_2.D"/>
        <table:table-row>
          <table:table-cell table:style-name="Table_5f_2.A1" office:value-type="string">
            <text:p text:style-name="P2">UDP</text:p>
          </table:table-cell>
          <table:table-cell table:style-name="Table_5f_2.A1" office:value-type="string">
            <text:p text:style-name="P2">Тип</text:p>
          </table:table-cell>
          <table:table-cell table:style-name="Table_5f_2.A1" office:value-type="string">
            <text:p text:style-name="P2">Описание</text:p>
          </table:table-cell>
          <table:table-cell table:style-name="Table_5f_2.A1" office:value-type="string">
            <text:p text:style-name="P2">Пример значения</text:p>
          </table:table-cell>
        </table:table-row>
        <table:table-row>
          <table:table-cell table:style-name="Table_5f_2.A1" office:value-type="string">
            <text:p text:style-name="P6">Частота выполнения</text:p>
          </table:table-cell>
          <table:table-cell table:style-name="Table_5f_2.A1" office:value-type="string">
            <text:p text:style-name="P6">Числовой</text:p>
          </table:table-cell>
          <table:table-cell table:style-name="Table_5f_2.A1" office:value-type="string">
            <text:p text:style-name="P6">Количество выполнений операции в день</text:p>
          </table:table-cell>
          <table:table-cell table:style-name="Table_5f_2.A1" office:value-type="string">
            <text:p text:style-name="P6">Сборка: 15-20 раз/день</text:p>
          </table:table-cell>
        </table:table-row>
        <table:table-row>
          <table:table-cell table:style-name="Table_5f_2.A1" office:value-type="string">
            <text:p text:style-name="P6">Длительность</text:p>
          </table:table-cell>
          <table:table-cell table:style-name="Table_5f_2.A1" office:value-type="string">
            <text:p text:style-name="P6">Числовой</text:p>
          </table:table-cell>
          <table:table-cell table:style-name="Table_5f_2.A1" office:value-type="string">
            <text:p text:style-name="P6">Среднее время выполнения (мин.)</text:p>
          </table:table-cell>
          <table:table-cell table:style-name="Table_5f_2.A1" office:value-type="string">
            <text:p text:style-name="P6">Тестирование: 30 мин.</text:p>
          </table:table-cell>
        </table:table-row>
        <table:table-row>
          <table:table-cell table:style-name="Table_5f_2.A1" office:value-type="string">
            <text:p text:style-name="P6">Ответственный</text:p>
          </table:table-cell>
          <table:table-cell table:style-name="Table_5f_2.A1" office:value-type="string">
            <text:p text:style-name="P6">Текстовый</text:p>
          </table:table-cell>
          <table:table-cell table:style-name="Table_5f_2.A1" office:value-type="string">
            <text:p text:style-name="P6">Должность исполнителя</text:p>
          </table:table-cell>
          <table:table-cell table:style-name="Table_5f_2.A1" office:value-type="string">
            <text:p text:style-name="P6">Старший сборщик</text:p>
          </table:table-cell>
        </table:table-row>
        <table:table-row>
          <table:table-cell table:style-name="Table_5f_2.A1" office:value-type="string">
            <text:p text:style-name="P6">Критичность</text:p>
          </table:table-cell>
          <table:table-cell table:style-name="Table_5f_2.A1" office:value-type="string">
            <text:p text:style-name="P6">Перечисление</text:p>
          </table:table-cell>
          <table:table-cell table:style-name="Table_5f_2.A1" office:value-type="string">
            <text:p text:style-name="P6">Уровень влияния <text:soft-page-break/>на качество продукта</text:p>
          </table:table-cell>
          <table:table-cell table:style-name="Table_5f_2.A1" office:value-type="string">
            <text:p text:style-name="P6">Высокая / Средняя <text:soft-page-break/>/ Низкая</text:p>
          </table:table-cell>
        </table:table-row>
        <table:table-row>
          <table:table-cell table:style-name="Table_5f_2.A1" office:value-type="string">
            <text:p text:style-name="P6">Автоматизируемость</text:p>
          </table:table-cell>
          <table:table-cell table:style-name="Table_5f_2.A1" office:value-type="string">
            <text:p text:style-name="P6">Перечисление</text:p>
          </table:table-cell>
          <table:table-cell table:style-name="Table_5f_2.A1" office:value-type="string">
            <text:p text:style-name="P6">Возможность автоматизации операции</text:p>
          </table:table-cell>
          <table:table-cell table:style-name="Table_5f_2.A1" office:value-type="string">
            <text:p text:style-name="P6">Полная / Частичная / Ручная</text:p>
          </table:table-cell>
        </table:table-row>
      </table:table>
      <text:p text:style-name="P6"/>
      <text:p text:style-name="P6">Значения UDP для основных операций:</text:p>
      <table:table table:name="Table_3" table:style-name="Table_5f_3">
        <table:table-column table:style-name="Table_5f_3.A" table:number-columns-repeated="4"/>
        <table:table-column table:style-name="Table_5f_3.E"/>
        <table:table-row>
          <table:table-cell table:style-name="Table_5f_3.A1" office:value-type="string">
            <text:p text:style-name="P2">Операция</text:p>
          </table:table-cell>
          <table:table-cell table:style-name="Table_5f_3.A1" office:value-type="string">
            <text:p text:style-name="P2">Частота</text:p>
          </table:table-cell>
          <table:table-cell table:style-name="Table_5f_3.A1" office:value-type="string">
            <text:p text:style-name="P2">Длительность</text:p>
          </table:table-cell>
          <table:table-cell table:style-name="Table_5f_3.A1" office:value-type="string">
            <text:p text:style-name="P2">Критичность</text:p>
          </table:table-cell>
          <table:table-cell table:style-name="Table_5f_3.A1" office:value-type="string">
            <text:p text:style-name="P2">Автоматизируемость</text:p>
          </table:table-cell>
        </table:table-row>
        <table:table-row>
          <table:table-cell table:style-name="Table_5f_3.A1" office:value-type="string">
            <text:p text:style-name="P6">Приём заказа</text:p>
          </table:table-cell>
          <table:table-cell table:style-name="Table_5f_3.A1" office:value-type="string">
            <text:p text:style-name="P6">25/день</text:p>
          </table:table-cell>
          <table:table-cell table:style-name="Table_5f_3.A1" office:value-type="string">
            <text:p text:style-name="P6">15 мин.</text:p>
          </table:table-cell>
          <table:table-cell table:style-name="Table_5f_3.A1" office:value-type="string">
            <text:p text:style-name="P6">Средняя</text:p>
          </table:table-cell>
          <table:table-cell table:style-name="Table_5f_3.A1" office:value-type="string">
            <text:p text:style-name="P6">Частичная</text:p>
          </table:table-cell>
        </table:table-row>
        <table:table-row>
          <table:table-cell table:style-name="Table_5f_3.A1" office:value-type="string">
            <text:p text:style-name="P6">Закупка компонентов</text:p>
          </table:table-cell>
          <table:table-cell table:style-name="Table_5f_3.A1" office:value-type="string">
            <text:p text:style-name="P6">3/неделя</text:p>
          </table:table-cell>
          <table:table-cell table:style-name="Table_5f_3.A1" office:value-type="string">
            <text:p text:style-name="P6">120 мин.</text:p>
          </table:table-cell>
          <table:table-cell table:style-name="Table_5f_3.A1" office:value-type="string">
            <text:p text:style-name="P6">Высокая</text:p>
          </table:table-cell>
          <table:table-cell table:style-name="Table_5f_3.A1" office:value-type="string">
            <text:p text:style-name="P6">Частичная</text:p>
          </table:table-cell>
        </table:table-row>
        <table:table-row>
          <table:table-cell table:style-name="Table_5f_3.A1" office:value-type="string">
            <text:p text:style-name="P6">Сборка</text:p>
          </table:table-cell>
          <table:table-cell table:style-name="Table_5f_3.A1" office:value-type="string">
            <text:p text:style-name="P6">18/день</text:p>
          </table:table-cell>
          <table:table-cell table:style-name="Table_5f_3.A1" office:value-type="string">
            <text:p text:style-name="P6">45 мин.</text:p>
          </table:table-cell>
          <table:table-cell table:style-name="Table_5f_3.A1" office:value-type="string">
            <text:p text:style-name="P6">Высокая</text:p>
          </table:table-cell>
          <table:table-cell table:style-name="Table_5f_3.A1" office:value-type="string">
            <text:p text:style-name="P6">Ручная</text:p>
          </table:table-cell>
        </table:table-row>
        <table:table-row>
          <table:table-cell table:style-name="Table_5f_3.A1" office:value-type="string">
            <text:p text:style-name="P6">Тестирование</text:p>
          </table:table-cell>
          <table:table-cell table:style-name="Table_5f_3.A1" office:value-type="string">
            <text:p text:style-name="P6">18/день</text:p>
          </table:table-cell>
          <table:table-cell table:style-name="Table_5f_3.A1" office:value-type="string">
            <text:p text:style-name="P6">30 мин.</text:p>
          </table:table-cell>
          <table:table-cell table:style-name="Table_5f_3.A1" office:value-type="string">
            <text:p text:style-name="P6">Высокая</text:p>
          </table:table-cell>
          <table:table-cell table:style-name="Table_5f_3.A1" office:value-type="string">
            <text:p text:style-name="P6">Частичная</text:p>
          </table:table-cell>
        </table:table-row>
        <table:table-row>
          <table:table-cell table:style-name="Table_5f_3.A1" office:value-type="string">
            <text:p text:style-name="P6">Упаковка</text:p>
          </table:table-cell>
          <table:table-cell table:style-name="Table_5f_3.A1" office:value-type="string">
            <text:p text:style-name="P6">18/день</text:p>
          </table:table-cell>
          <table:table-cell table:style-name="Table_5f_3.A1" office:value-type="string">
            <text:p text:style-name="P6">10 мин.</text:p>
          </table:table-cell>
          <table:table-cell table:style-name="Table_5f_3.A1" office:value-type="string">
            <text:p text:style-name="P6">Низкая</text:p>
          </table:table-cell>
          <table:table-cell table:style-name="Table_5f_3.A1" office:value-type="string">
            <text:p text:style-name="P6">Полная</text:p>
          </table:table-cell>
        </table:table-row>
        <table:table-row>
          <table:table-cell table:style-name="Table_5f_3.A1" office:value-type="string">
            <text:p text:style-name="P6">Отгрузка</text:p>
          </table:table-cell>
          <table:table-cell table:style-name="Table_5f_3.A1" office:value-type="string">
            <text:p text:style-name="P6">5/день</text:p>
          </table:table-cell>
          <table:table-cell table:style-name="Table_5f_3.A1" office:value-type="string">
            <text:p text:style-name="P6">20 мин.</text:p>
          </table:table-cell>
          <table:table-cell table:style-name="Table_5f_3.A1" office:value-type="string">
            <text:p text:style-name="P6">Средняя</text:p>
          </table:table-cell>
          <table:table-cell table:style-name="Table_5f_3.A1" office:value-type="string">
            <text:p text:style-name="P6">Частичная</text:p>
          </table:table-cell>
        </table:table-row>
      </table:table>
      <text:p text:style-name="P6"/>
      <text:p text:style-name="P1">3.5. Визуализация на диаграмме</text:p>
      <text:p text:style-name="P6">Стоимостная информация и UDP были нанесены на диаграмму IDEF0 в виде аннотаций. Каждая функциональная работа на диаграмме снабжена таблицей с указанием стоимости операции, драйвера затрат и ключевых UDP.</text:p>
      <text:p text:style-name="P6"/>
      <text:p text:style-name="P1"/>
      <text:p text:style-name="P1"/>
      <text:p text:style-name="P1"/>
      <text:p text:style-name="P1"/>
      <text:p text:style-name="P1"><text:soft-page-break/>4. Диаграммы</text:p>
      <text:p text:style-name="P7"><draw:frame draw:style-name="fr1" draw:name="Изображение1" text:anchor-type="char" svg:width="17cm" svg:height="12.601cm" draw:z-index="0"><draw:image xlink:href="Pictures/100000010000047C00000353919D9AE2.png" xlink:type="simple" xlink:show="embed" xlink:actuate="onLoad" draw:mime-type="image/png"/></draw:frame>Рисунок 1. Диаграмма IDEF0 компании Quill с результатами ABC-анализа и пользовательскими свойствами (UDP)</text:p>
      <text:p text:style-name="P6"/>
      <text:p text:style-name="P3">5. Ответы на контрольные вопросы</text:p>
      <text:p text:style-name="P2">1. Что такое Activity Based Costing (ABC)? В чём отличие от традиционных методов калькуляции себестоимости?</text:p>
      <text:p text:style-name="P6">Activity Based Costing (ABC) — это метод калькуляции себестоимости, при котором затраты сначала относятся на операции (activities), а затем через драйверы затрат распределяются на продукты и услуги. Традиционные методы калькуляции распределяют косвенные расходы пропорционально одному базовому показателю — например, объёму выпуска или прямым трудозатратам, что приводит к искажению реальной себестоимости. ABC-метод использует множество драйверов затрат, каждый из которых отражает причинно-следственную связь между операцией и потреблением ресурсов. В контексте компании Quill это позволяет точно определить, что стоимость закупки <text:soft-page-break/>компонентов определяется количеством заказов поставщикам, а стоимость тестирования — количеством протестированных единиц. Такой подход особенно эффективен при разнородной продукции, когда настольные ПК и ноутбуки потребляют ресурсы в разных пропорциях.</text:p>
      <text:p text:style-name="P6"/>
      <text:p text:style-name="P2">2. Перечислите основные компоненты ABC-анализа. Как рассчитывается общая стоимость операции?</text:p>
      <text:p text:style-name="P6">Основные компоненты ABC-анализа: ресурсы (зарплата, материалы, оборудование, аренда), операции (конкретные виды деятельности — сборка, тестирование, упаковка), драйверы затрат (показатели, определяющие объём потребления ресурсов операцией) и объекты затрат (продукты или услуги — настольный ПК, ноутбук). Общая стоимость операции рассчитывается как сумма прямых затрат (материалы и труд, непосредственно относимые на операцию) и косвенных затрат (распределяемых через драйверы). Например, стоимость операции «Сборка» в Quill складывается из зарплаты сборщика (1500 руб./единица) и доли косвенных расходов — аренды цеха, амортизации инструментов (500 руб./единица), что в сумме даёт 2000 руб.</text:p>
      <text:p text:style-name="P6"/>
      <text:p text:style-name="P2">3. Рассчитайте стоимость производства одного настольного компьютера. Из каких компонентов складывается эта стоимость?</text:p>
      <text:p text:style-name="P6">Стоимость производства одного настольного компьютера составляет 28 700 руб. Она складывается из следующих компонентов: приём заказа — 200 руб. (работа менеджера, CRM-система), закупка компонентов — 25 200 руб. (процессор, материнская плата, память, накопитель, корпус, блок питания, периферия и логистика доставки), сборка — 2 000 руб. (труд сборщика и использование оборудования), тестирование — 500 руб. (работа тестировщика и диагностическое ПО), упаковка — 300 руб. (упаковочные материалы и труд), отгрузка — 500 руб. (транспортные расходы). Наибольшую долю составляют компоненты — 87,8% от общей стоимости.</text:p>
      <text:p text:style-name="P6"/>
      <text:p text:style-name="P2">4. Почему компоненты составляют более 99% общих затрат? Какие выводы можно сделать из этого факта?</text:p>
      <text:p text:style-name="P6">В данном расчёте компоненты составляют порядка 87-88% общих затрат (а не 99%), что всё равно является доминирующей статьёй расходов. Такая структура типична для сборочного производства, где предприятие не производит компоненты самостоятельно, а закупает их у поставщиков. Основной вывод: <text:soft-page-break/>оптимизация закупочной политики даст наибольший экономический эффект — переговоры с поставщиками о скидках на объём, поиск альтернативных поставщиков, стандартизация компонентной базы. Снижение стоимости компонентов даже на 5% (1 260 руб.) существенно превысит экономию от полной автоматизации упаковки или оптимизации логистики. При этом нельзя игнорировать и остальные операции, поскольку их оптимизация влияет на время цикла и качество продукции.</text:p>
      <text:p text:style-name="P6"/>
      <text:p text:style-name="P2">5. Что такое User Defined Properties (UDP)? Для чего они используются в моделировании бизнес-процессов?</text:p>
      <text:p text:style-name="P6">User Defined Properties (UDP) — это пользовательские свойства, которые аналитик добавляет к элементам модели для хранения дополнительной информации, выходящей за рамки стандартной нотации. UDP позволяют обогатить модель количественными и качественными характеристиками операций без изменения её графической структуры. В моделировании бизнес-процессов UDP используются для проведения многокритериального анализа: оценки эффективности операций, выявления кандидатов на автоматизацию, определения узких мест по критериям времени и загрузки. В контексте компании Quill UDP «Автоматизируемость» позволил выявить, что операция «Упаковка» может быть полностью автоматизирована, а UDP «Критичность» показал, что сборка и тестирование требуют наибольшего контроля качества.</text:p>
      <text:p text:style-name="P6"/>
      <text:p text:style-name="P2">6. Перечислите основные типы UDP. Приведите примеры использования каждого типа.</text:p>
      <text:p text:style-name="P6">Основные типы UDP: числовой (Numeric) — для количественных показателей, например, длительность операции в минутах (тестирование — 30 мин.) или стоимость в рублях (сборка — 2000 руб.); текстовый (String) — для описательных характеристик, например, ответственный исполнитель («Старший сборщик»), комментарии или ссылки на регламент; перечисление (Enumeration) — для выбора из фиксированного набора значений, например, критичность (Высокая / Средняя / Низкая) или автоматизируемость (Полная / Частичная / Ручная); логический (Boolean) — для бинарных признаков, например, «Требует сертификации» (Да/Нет). Каждый тип выбирается исходя из характера данных и задач анализа.</text:p>
      <text:p text:style-name="P6"/>
      <text:p text:style-name="P6"/>
      <text:p text:style-name="P2"><text:soft-page-break/>7. Какие UDP были определены для производственного процесса компании Quill? Какую информацию они предоставляют?</text:p>
      <text:p text:style-name="P6">Для производственного процесса компании Quill были определены пять UDP: частота выполнения — показывает загрузку операции (сборка выполняется 18 раз в день, закупка — 3 раза в неделю); длительность — среднее время выполнения одной итерации операции (сборка — 45 мин., тестирование — 30 мин.); ответственный — должность лица, отвечающего за выполнение операции; критичность — степень влияния операции на качество конечного продукта (сборка и тестирование имеют высокую критичность); автоматизируемость — потенциал замены ручного труда автоматизированными средствами (упаковка — полная автоматизация, сборка — ручная работа). В совокупности эти UDP формируют аналитический профиль каждой операции и служат основой для принятия решений об оптимизации.</text:p>
      <text:p text:style-name="P6"/>
      <text:p text:style-name="P2">8. Предложите методы оптимизации затрат на основе результатов ABC-анализа для компании Quill.</text:p>
      <text:p text:style-name="P6">На основе ABC-анализа можно предложить несколько методов оптимизации. Во-первых, консолидация закупок: объединение заказов для трёх поставщиков в более крупные партии для получения оптовых скидок, что при доле компонентов в 87,8% даст наибольший эффект. Во-вторых, автоматизация упаковки, которая имеет полный потенциал автоматизации и позволит сократить затраты на 300 руб. за единицу при высоком объёме выпуска. В-третьих, параллелизация тестирования: использование автоматизированных стендов для одновременного тестирования нескольких единиц сократит время цикла. В-четвёртых, стандартизация конфигураций: сокращение числа уникальных конфигураций уменьшит время сборки и количество ошибок.</text:p>
      <text:p text:style-name="P6"/>
      <text:p text:style-name="P2">9. Какие преимущества даёт визуализация стоимостной информации непосредственно на диаграммах процессов?</text:p>
      <text:p text:style-name="P6">Визуализация стоимостей на диаграммах обеспечивает целостное восприятие процесса: аналитик одновременно видит логику операций, их последовательность и стоимостные характеристики, что позволяет быстро выявить диспропорции. Графическое представление затрат делает результаты анализа доступными для нетехнических участников — руководителей, заказчиков, которые могут не владеть специализированными инструментами финансового анализа. Цветовая кодировка и размер аннотаций позволяют создать «тепловую карту» затрат, где наиболее дорогие операции визуально <text:soft-page-break/>выделяются на фоне остальных. Такой подход ускоряет принятие решений на совещаниях и презентациях, поскольку все участники оперируют единой наглядной моделью.</text:p>
      <text:p text:style-name="P6"/>
      <text:p text:style-name="P2">10. Предложите дополнительные UDP, которые было бы полезно добавить для более полного анализа производственных процессов компании Quill.</text:p>
      <text:p text:style-name="P6">Для более полного анализа целесообразно добавить следующие UDP: «Процент брака» (числовой) — доля дефектных изделий на каждом этапе, что позволит оценить стоимость некачества; «Квалификация исполнителя» (перечисление: Начальная / Средняя / Высокая) — для планирования обучения и ротации персонала; «Зависимость от поставщика» (перечисление: Единственный / Несколько / Много) — для оценки рисков срыва поставок; «Время ожидания» (числовой) — время простоя между операциями, выявляющее скрытые потери; «Потенциал аутсорсинга» (логический) — возможность передачи операции внешнему исполнителю для сокращения затрат.</text:p>
      <text:p text:style-name="P6"/>
      <text:p text:style-name="P1">6. Вывод</text:p>
      <text:p text:style-name="P6">В ходе лабораторной работы были освоены практические навыки проведения стоимостного анализа бизнес-процессов методом Activity Based Costing на примере компании Quill. Для каждой операции производственного процесса были определены центры затрат, рассчитаны прямые и косвенные расходы, а также визуализирована стоимостная информация на диаграмме IDEF0. Анализ показал, что закупка компонентов формирует доминирующую долю себестоимости (87,8%), что указывает на приоритетность оптимизации закупочной политики.</text:p>
      <text:p text:style-name="P6">Дополнительно были определены и применены User Defined Properties (UDP), расширяющие аналитические возможности модели. Использование UDP позволило провести многокритериальную оценку операций по параметрам частоты, длительности, критичности и автоматизируемости, что создаёт основу для обоснованных решений по реинжинирингу бизнес-процессов компании Quill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4.1$Windows_X86_64 LibreOffice_project/e19e193f88cd6c0525a17fb7a176ed8e6a3e2aa1</meta:generator>
    <dc:date>2026-06-20T21:27:44.676000000</dc:date>
    <meta:editing-duration>PT2M23S</meta:editing-duration>
    <meta:editing-cycles>5</meta:editing-cycles>
    <meta:document-statistic meta:table-count="4" meta:image-count="1" meta:object-count="0" meta:page-count="9" meta:paragraph-count="162" meta:word-count="1653" meta:character-count="13668" meta:non-whitespace-character-count="12135"/>
  </office:meta>
</office:document-meta>
</file>