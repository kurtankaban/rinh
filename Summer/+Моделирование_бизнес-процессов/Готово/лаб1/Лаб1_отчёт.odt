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C000003172153CE99.png" manifest:media-type="image/png"/>
  <manifest:file-entry manifest:full-path="Pictures/10000001000005140000033FC7EF23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7cm" table:align="margins"/>
    </style:style>
    <style:style style:name="Table.A" style:family="table-column">
      <style:table-column-properties style:column-width="8.5cm" style:rel-column-width="32767*"/>
    </style:style>
    <style:style style:name="Table.B" style:family="table-column">
      <style:table-column-properties style:column-width="8.5cm" style:rel-column-width="32768*"/>
    </style:style>
    <style:style style:name="Table.A1" style:family="table-cell">
      <style:table-cell-properties fo:padding="0.101cm" fo:border="none"/>
    </style:style>
    <style:style style:name="Table_5f_1" style:display-name="Table_1" style:family="table">
      <style:table-properties style:width="17cm" table:align="margins"/>
    </style:style>
    <style:style style:name="Table_5f_1.A" style:display-name="Table_1.A" style:family="table-column">
      <style:table-column-properties style:column-width="4.249cm" style:rel-column-width="16383*"/>
    </style:style>
    <style:style style:name="Table_5f_1.D" style:display-name="Table_1.D" style:family="table-column">
      <style:table-column-properties style:column-width="4.251cm" style:rel-column-width="16386*"/>
    </style:style>
    <style:style style:name="Table_5f_1.A1" style:display-name="Table_1.A1" style:family="table-cell">
      <style:table-cell-properties fo:padding="0.101cm" fo:border="none"/>
    </style:style>
    <style:style style:name="Table_5f_2" style:display-name="Table_2" style:family="table">
      <style:table-properties style:width="17cm" table:align="margins"/>
    </style:style>
    <style:style style:name="Table_5f_2.A" style:display-name="Table_2.A" style:family="table-column">
      <style:table-column-properties style:column-width="5.667cm" style:rel-column-width="21845*"/>
    </style:style>
    <style:style style:name="Table_5f_2.A1" style:display-name="Table_2.A1" style:family="table-cell">
      <style:table-cell-properties fo:padding="0.101cm" fo:border="none"/>
    </style:style>
    <style:style style:name="P1" style:family="paragraph" style:parent-style-name="Standard">
      <style:paragraph-properties fo:margin-top="0.499cm" fo:margin-bottom="0.3cm" style:contextual-spacing="false" fo:line-height="115%"/>
      <style:text-properties style:font-name="Times New Roman" fo:font-size="14pt" fo:font-weight="bold"/>
    </style:style>
    <style:style style:name="P2" style:family="paragraph" style:parent-style-name="Standard">
      <style:paragraph-properties fo:margin-top="0cm" fo:margin-bottom="0.199cm" style:contextual-spacing="false" fo:line-height="115%"/>
      <style:text-properties style:font-name="Times New Roman" fo:font-size="14pt" fo:font-weight="bold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4" style:family="paragraph" style:parent-style-name="Standard">
      <style:paragraph-properties fo:margin-top="0.6cm" fo:margin-bottom="0.4cm" style:contextual-spacing="false" fo:line-height="115%"/>
      <style:text-properties style:font-name="Times New Roman" fo:font-size="14pt" fo:font-weight="bold"/>
    </style:style>
    <style:style style:name="P5" style:family="paragraph" style:parent-style-name="Standard">
      <style:paragraph-properties fo:margin-top="0cm" fo:margin-bottom="0.199cm" style:contextual-spacing="false" fo:line-height="115%"/>
      <style:text-properties style:font-name="Times New Roman" fo:font-size="14pt"/>
    </style:style>
    <style:style style:name="P6" style:family="paragraph" style:parent-style-name="Standard">
      <style:paragraph-properties fo:margin-top="0cm" fo:margin-bottom="0.199cm" style:contextual-spacing="false" fo:line-height="115%" fo:text-align="start" style:justify-single-word="false"/>
      <style:text-properties style:font-name="Times New Roman" fo:font-size="14pt" fo:font-style="italic" officeooo:paragraph-rsid="00182b04"/>
    </style:style>
    <style:style style:name="P7" style:family="paragraph" style:parent-style-name="Standard">
      <style:paragraph-properties fo:margin-top="0cm" fo:margin-bottom="0.199cm" style:contextual-spacing="false" fo:line-height="115%" fo:text-align="start" style:justify-single-word="false"/>
      <style:text-properties style:font-name="Times New Roman" fo:font-size="14pt" fo:font-style="italic"/>
    </style:style>
    <style:style style:name="P8" style:family="paragraph" style:parent-style-name="Standard" style:list-style-name="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9" style:family="paragraph" style:parent-style-name="Standard">
      <style:paragraph-properties fo:margin-top="0cm" fo:margin-bottom="0.199cm" style:contextual-spacing="false" fo:line-height="115%"/>
      <style:text-properties style:font-name="Times New Roman" fo:font-size="14pt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ОТЧЁТ</text:h>
      <text:p text:style-name="P3">по лабораторной работе №1</text:p>
      <text:p text:style-name="P3">по дисциплине «Моделирование бизнес-процессов»</text:p>
      <text:p text:style-name="P3"/>
      <text:p text:style-name="P5"><text:span text:style-name="T1">Тема:</text:span> Моделирование бизнес-процессов с Draw.io (создание контекстной диаграммы IDEF0 AS-IS)</text:p>
      <text:p text:style-name="P5">Выполнил: студент группы БИНOZS-331 Трофимов А.Н.</text:p>
      <text:p text:style-name="P5"/>
      <text:p text:style-name="P1">1. Цель работы</text:p>
      <text:p text:style-name="P5">Изучение основ моделирования бизнес-процессов в методологии IDEF0 с использованием инструментальной среды Draw.io. Построение контекстной диаграммы A-0 и диаграммы декомпозиции A0 для компании Quill (AS-IS).</text:p>
      <text:p text:style-name="P5"/>
      <text:p text:style-name="P1">2. Краткие теоретические сведения</text:p>
      <text:p text:style-name="P5">Методология IDEF0 (Integration DEFinition for Function Modeling) является стандартом функционального моделирования, принятым в качестве федерального стандарта США (FIPS 183). Она предназначена для описания функций системы и взаимосвязей между ними. Каждая функция представляется в виде прямоугольника (функционального блока), к которому подходят и от которого отходят стрелки четырёх типов: входы (слева), выходы (справа), управление (сверху) и механизмы (снизу). Такая схема обозначается аббревиатурой ICOM (Input, Control, Output, Mechanism).</text:p>
      <text:p text:style-name="P5">Моделирование в IDEF0 начинается с построения контекстной диаграммы A-0, которая содержит единственный функциональный блок, описывающий всю систему целиком. Контекстная диаграмма задаёт границы модели: определяет, что входит в рассматриваемую систему, а что является внешней средой. Для каждой модели указываются точка зрения (чьими глазами рассматривается система) и цель моделирования.</text:p>
      <text:p text:style-name="P5">Модель AS-IS («как есть») отражает текущее состояние бизнес-процессов организации без каких-либо улучшений. Она служит отправной точкой для последующего анализа, выявления узких мест и построения модели TO-BE («как должно быть»). Декомпозиция контекстной диаграммы позволяет раскрыть внутреннюю структуру системы, разбив её на основные подпроцессы.</text:p>
      <text:p text:style-name="P5"/>
      <text:p text:style-name="P1"><text:soft-page-break/>3. Ход работы</text:p>
      <text:p text:style-name="P1">3.1. Регистрация и знакомство с Draw.io</text:p>
      <text:p text:style-name="P5">Зарегистрировались в веб-приложении app.diagrams.net. Ознакомились с интерфейсом: панель элементов, рабочая область, свойства фигур. Изучили доступные библиотеки фигур, в том числе элементы для нотации IDEF0.</text:p>
      <text:p text:style-name="P1">3.2. Определение параметров модели</text:p>
      <text:p text:style-name="P5">Перед построением диаграммы определили ключевые параметры модели:</text:p>
      <table:table table:name="Table" table:style-name="Table">
        <table:table-column table:style-name="Table.A"/>
        <table:table-column table:style-name="Table.B"/>
        <table:table-row>
          <table:table-cell table:style-name="Table.A1" office:value-type="string">
            <text:p text:style-name="P2">Параметр</text:p>
          </table:table-cell>
          <table:table-cell table:style-name="Table.A1" office:value-type="string">
            <text:p text:style-name="P2">Значение</text:p>
          </table:table-cell>
        </table:table-row>
        <table:table-row>
          <table:table-cell table:style-name="Table.A1" office:value-type="string">
            <text:p text:style-name="P5">Предметная область</text:p>
          </table:table-cell>
          <table:table-cell table:style-name="Table.A1" office:value-type="string">
            <text:p text:style-name="P5">Деятельность компании Quill (сборка и продажа компьютеров)</text:p>
          </table:table-cell>
        </table:table-row>
        <table:table-row>
          <table:table-cell table:style-name="Table.A1" office:value-type="string">
            <text:p text:style-name="P5">Точка зрения</text:p>
          </table:table-cell>
          <table:table-cell table:style-name="Table.A1" office:value-type="string">
            <text:p text:style-name="P5">Директор компании</text:p>
          </table:table-cell>
        </table:table-row>
        <table:table-row>
          <table:table-cell table:style-name="Table.A1" office:value-type="string">
            <text:p text:style-name="P5">Цель моделирования</text:p>
          </table:table-cell>
          <table:table-cell table:style-name="Table.A1" office:value-type="string">
            <text:p text:style-name="P5">Выявление неэффективностей в бизнес-процессах для последующей оптимизации</text:p>
          </table:table-cell>
        </table:table-row>
        <table:table-row>
          <table:table-cell table:style-name="Table.A1" office:value-type="string">
            <text:p text:style-name="P5">Тип модели</text:p>
          </table:table-cell>
          <table:table-cell table:style-name="Table.A1" office:value-type="string">
            <text:p text:style-name="P5">AS-IS (текущее состояние)</text:p>
          </table:table-cell>
        </table:table-row>
      </table:table>
      <text:p text:style-name="P5"/>
      <text:p text:style-name="P5">Компания Quill занимается сборкой и продажей компьютеров. Годовой оборот составляет около 20 млн рублей. Компания закупает компоненты у 3 поставщиков, осуществляет сборку и тестирование ПК, после чего продаёт готовую продукцию клиентам.</text:p>
      <text:p text:style-name="P1">3.3. Построение контекстной диаграммы A-0</text:p>
      <text:p text:style-name="P5">Создали контекстную диаграмму A-0, содержащую один функциональный блок «Деятельность компании Quill». Стрелки ICOM определены следующим образом:</text:p>
      <table:table table:name="Table_1" table:style-name="Table_5f_1">
        <table:table-column table:style-name="Table_5f_1.A" table:number-columns-repeated="3"/>
        <table:table-column table:style-name="Table_5f_1.D"/>
        <table:table-row>
          <table:table-cell table:style-name="Table_5f_1.A1" office:value-type="string">
            <text:p text:style-name="P2">Тип стрелки</text:p>
          </table:table-cell>
          <table:table-cell table:style-name="Table_5f_1.A1" office:value-type="string">
            <text:p text:style-name="P2">Сторона блока</text:p>
          </table:table-cell>
          <table:table-cell table:style-name="Table_5f_1.A1" office:value-type="string">
            <text:p text:style-name="P2">Название</text:p>
          </table:table-cell>
          <table:table-cell table:style-name="Table_5f_1.A1" office:value-type="string">
            <text:p text:style-name="P2">Описание</text:p>
          </table:table-cell>
        </table:table-row>
        <table:table-row>
          <table:table-cell table:style-name="Table_5f_1.A1" office:value-type="string">
            <text:p text:style-name="P5">Вход (Input)</text:p>
          </table:table-cell>
          <table:table-cell table:style-name="Table_5f_1.A1" office:value-type="string">
            <text:p text:style-name="P5">Левая</text:p>
          </table:table-cell>
          <table:table-cell table:style-name="Table_5f_1.A1" office:value-type="string">
            <text:p text:style-name="P5">Заказы клиентов</text:p>
          </table:table-cell>
          <table:table-cell table:style-name="Table_5f_1.A1" office:value-type="string">
            <text:p text:style-name="P5">Запросы клиентов на приобретение компьютеров</text:p>
          </table:table-cell>
        </table:table-row>
        <table:table-row>
          <table:table-cell table:style-name="Table_5f_1.A1" office:value-type="string">
            <text:p text:style-name="P5">Вход (Input)</text:p>
          </table:table-cell>
          <table:table-cell table:style-name="Table_5f_1.A1" office:value-type="string">
            <text:p text:style-name="P5">Левая</text:p>
          </table:table-cell>
          <table:table-cell table:style-name="Table_5f_1.A1" office:value-type="string">
            <text:p text:style-name="P5">Компоненты от <text:soft-page-break/>поставщиков</text:p>
          </table:table-cell>
          <table:table-cell table:style-name="Table_5f_1.A1" office:value-type="string">
            <text:p text:style-name="P5">Комплектующие, <text:soft-page-break/>закупаемые у 3 поставщиков</text:p>
          </table:table-cell>
        </table:table-row>
        <table:table-row>
          <table:table-cell table:style-name="Table_5f_1.A1" office:value-type="string">
            <text:p text:style-name="P5">Управление (Control)</text:p>
          </table:table-cell>
          <table:table-cell table:style-name="Table_5f_1.A1" office:value-type="string">
            <text:p text:style-name="P5">Верхняя</text:p>
          </table:table-cell>
          <table:table-cell table:style-name="Table_5f_1.A1" office:value-type="string">
            <text:p text:style-name="P5">Правила и регламенты компании</text:p>
          </table:table-cell>
          <table:table-cell table:style-name="Table_5f_1.A1" office:value-type="string">
            <text:p text:style-name="P5">Внутренние бизнес-правила</text:p>
          </table:table-cell>
        </table:table-row>
        <table:table-row>
          <table:table-cell table:style-name="Table_5f_1.A1" office:value-type="string">
            <text:p text:style-name="P5">Управление (Control)</text:p>
          </table:table-cell>
          <table:table-cell table:style-name="Table_5f_1.A1" office:value-type="string">
            <text:p text:style-name="P5">Верхняя</text:p>
          </table:table-cell>
          <table:table-cell table:style-name="Table_5f_1.A1" office:value-type="string">
            <text:p text:style-name="P5">Стандарты качества</text:p>
          </table:table-cell>
          <table:table-cell table:style-name="Table_5f_1.A1" office:value-type="string">
            <text:p text:style-name="P5">Требования к качеству сборки и тестирования</text:p>
          </table:table-cell>
        </table:table-row>
        <table:table-row>
          <table:table-cell table:style-name="Table_5f_1.A1" office:value-type="string">
            <text:p text:style-name="P5">Управление (Control)</text:p>
          </table:table-cell>
          <table:table-cell table:style-name="Table_5f_1.A1" office:value-type="string">
            <text:p text:style-name="P5">Верхняя</text:p>
          </table:table-cell>
          <table:table-cell table:style-name="Table_5f_1.A1" office:value-type="string">
            <text:p text:style-name="P5">Законодательство РФ</text:p>
          </table:table-cell>
          <table:table-cell table:style-name="Table_5f_1.A1" office:value-type="string">
            <text:p text:style-name="P5">Нормативно-правовые акты, регулирующие деятельность</text:p>
          </table:table-cell>
        </table:table-row>
        <table:table-row>
          <table:table-cell table:style-name="Table_5f_1.A1" office:value-type="string">
            <text:p text:style-name="P5">Выход (Output)</text:p>
          </table:table-cell>
          <table:table-cell table:style-name="Table_5f_1.A1" office:value-type="string">
            <text:p text:style-name="P5">Правая</text:p>
          </table:table-cell>
          <table:table-cell table:style-name="Table_5f_1.A1" office:value-type="string">
            <text:p text:style-name="P5">Готовые компьютеры</text:p>
          </table:table-cell>
          <table:table-cell table:style-name="Table_5f_1.A1" office:value-type="string">
            <text:p text:style-name="P5">Собранные и протестированные ПК</text:p>
          </table:table-cell>
        </table:table-row>
        <table:table-row>
          <table:table-cell table:style-name="Table_5f_1.A1" office:value-type="string">
            <text:p text:style-name="P5">Выход (Output)</text:p>
          </table:table-cell>
          <table:table-cell table:style-name="Table_5f_1.A1" office:value-type="string">
            <text:p text:style-name="P5">Правая</text:p>
          </table:table-cell>
          <table:table-cell table:style-name="Table_5f_1.A1" office:value-type="string">
            <text:p text:style-name="P5">Прибыль</text:p>
          </table:table-cell>
          <table:table-cell table:style-name="Table_5f_1.A1" office:value-type="string">
            <text:p text:style-name="P5">Финансовый результат деятельности</text:p>
          </table:table-cell>
        </table:table-row>
        <table:table-row>
          <table:table-cell table:style-name="Table_5f_1.A1" office:value-type="string">
            <text:p text:style-name="P5">Механизм (Mechanism)</text:p>
          </table:table-cell>
          <table:table-cell table:style-name="Table_5f_1.A1" office:value-type="string">
            <text:p text:style-name="P5">Нижняя</text:p>
          </table:table-cell>
          <table:table-cell table:style-name="Table_5f_1.A1" office:value-type="string">
            <text:p text:style-name="P5">Персонал</text:p>
          </table:table-cell>
          <table:table-cell table:style-name="Table_5f_1.A1" office:value-type="string">
            <text:p text:style-name="P5">Продавцы, операторы сборки, кладовщик</text:p>
          </table:table-cell>
        </table:table-row>
        <table:table-row>
          <table:table-cell table:style-name="Table_5f_1.A1" office:value-type="string">
            <text:p text:style-name="P5">Механизм (Mechanism)</text:p>
          </table:table-cell>
          <table:table-cell table:style-name="Table_5f_1.A1" office:value-type="string">
            <text:p text:style-name="P5">Нижняя</text:p>
          </table:table-cell>
          <table:table-cell table:style-name="Table_5f_1.A1" office:value-type="string">
            <text:p text:style-name="P5">Оборудование</text:p>
          </table:table-cell>
          <table:table-cell table:style-name="Table_5f_1.A1" office:value-type="string">
            <text:p text:style-name="P5">Инструменты сборки и тестирования</text:p>
          </table:table-cell>
        </table:table-row>
      </table:table>
      <text:p text:style-name="P5"/>
      <text:p text:style-name="P1">3.4. Построение диаграммы декомпозиции A0</text:p>
      <text:p text:style-name="P5">Декомпозировали контекстную диаграмму на основные процессы компании:</text:p>
      <table:table table:name="Table_2" table:style-name="Table_5f_2">
        <table:table-column table:style-name="Table_5f_2.A" table:number-columns-repeated="3"/>
        <table:table-row>
          <table:table-cell table:style-name="Table_5f_2.A1" office:value-type="string">
            <text:p text:style-name="P2">Номер работы</text:p>
          </table:table-cell>
          <table:table-cell table:style-name="Table_5f_2.A1" office:value-type="string">
            <text:p text:style-name="P2">Название</text:p>
          </table:table-cell>
          <table:table-cell table:style-name="Table_5f_2.A1" office:value-type="string">
            <text:p text:style-name="P2">Описание</text:p>
          </table:table-cell>
        </table:table-row>
        <table:table-row>
          <table:table-cell table:style-name="Table_5f_2.A1" office:value-type="string">
            <text:p text:style-name="P5">A1</text:p>
          </table:table-cell>
          <table:table-cell table:style-name="Table_5f_2.A1" office:value-type="string">
            <text:p text:style-name="P5">Продажи и приём заказов</text:p>
          </table:table-cell>
          <table:table-cell table:style-name="Table_5f_2.A1" office:value-type="string">
            <text:p text:style-name="P5">Приём заказов клиентов, проверка наличия, оформление</text:p>
          </table:table-cell>
        </table:table-row>
        <text:soft-page-break/>
        <table:table-row>
          <table:table-cell table:style-name="Table_5f_2.A1" office:value-type="string">
            <text:p text:style-name="P5">A2</text:p>
          </table:table-cell>
          <table:table-cell table:style-name="Table_5f_2.A1" office:value-type="string">
            <text:p text:style-name="P5">Сборка и тестирование компьютеров</text:p>
          </table:table-cell>
          <table:table-cell table:style-name="Table_5f_2.A1" office:value-type="string">
            <text:p text:style-name="P5">Подготовка компонентов, сборка ПК, тестирование</text:p>
          </table:table-cell>
        </table:table-row>
        <table:table-row>
          <table:table-cell table:style-name="Table_5f_2.A1" office:value-type="string">
            <text:p text:style-name="P5">A3</text:p>
          </table:table-cell>
          <table:table-cell table:style-name="Table_5f_2.A1" office:value-type="string">
            <text:p text:style-name="P5">Отгрузка и доставка</text:p>
          </table:table-cell>
          <table:table-cell table:style-name="Table_5f_2.A1" office:value-type="string">
            <text:p text:style-name="P5">Упаковка, оформление документов, доставка клиенту</text:p>
          </table:table-cell>
        </table:table-row>
      </table:table>
      <text:p text:style-name="P5"/>
      <text:p text:style-name="P5">На диаграмме A0 показаны внутренние связи между работами: выход работы A1 (оформленный заказ) является входом для A2; выход A2 (готовый компьютер) является входом для A3. Стрелки управления и механизмов распределены между работами в соответствии с их функциональным назначением.</text:p>
      <text:p text:style-name="P5"/>
      <text:p text:style-name="P1">4. Диаграммы</text:p>
      <text:p text:style-name="P6"><draw:frame draw:style-name="fr1" draw:name="Изображение1" text:anchor-type="char" svg:width="17cm" svg:height="11.878cm" draw:z-index="0"><draw:image xlink:href="Pictures/100000010000046C000003172153CE99.png" xlink:type="simple" xlink:show="embed" xlink:actuate="onLoad" draw:mime-type="image/png"/></draw:frame>Рисунок 1. Контекстная диаграмма A-0 «Деятельность компании Quill»</text:p>
      <text:p text:style-name="P7"><draw:frame draw:style-name="fr1" draw:name="Изображение2" text:anchor-type="char" svg:width="17cm" svg:height="10.866cm" draw:z-index="1"><draw:image xlink:href="Pictures/10000001000005140000033FC7EF23EE.png" xlink:type="simple" xlink:show="embed" xlink:actuate="onLoad" draw:mime-type="image/png"/></draw:frame><text:soft-page-break/>Рисунок 2. Диаграмма декомпозиции A0</text:p>
      <text:p text:style-name="P5"/>
      <text:p text:style-name="P4">5. Ответы на контрольные вопросы</text:p>
      <text:p text:style-name="P2">1. Что такое контекстная диаграмма в методологии IDEF0?</text:p>
      <text:p text:style-name="P5">Контекстная диаграмма A-0 -- это верхний уровень модели IDEF0, содержащий единственный функциональный блок, который описывает всю моделируемую систему целиком. Она определяет границы модели, показывая, что является частью системы, а что относится к внешней среде. Все стрелки на контекстной диаграмме представляют интерфейсы системы с окружением. В нашей работе контекстная диаграмма содержит блок «Деятельность компании Quill», а стрелки отражают заказы клиентов, компоненты поставщиков, управляющие документы и выходные продукты. Без контекстной диаграммы невозможно однозначно определить, что именно моделируется.</text:p>
      <text:p text:style-name="P5"/>
      <text:p text:style-name="P2">2. Какие типы стрелок используются в нотации IDEF0?</text:p>
      <text:p text:style-name="P5">В IDEF0 используются четыре типа стрелок, образующих аббревиатуру ICOM. Входы (Input) подходят к блоку слева и представляют данные или материалы, преобразуемые функцией. Управление (Control) входит сверху и задаёт правила, ограничения и регламенты выполнения функции. Выходы (Output) <text:soft-page-break/>исходят справа и показывают результаты работы функции. Механизмы (Mechanism) подходят снизу и обозначают ресурсы, необходимые для выполнения функции -- персонал, оборудование, информационные системы. Например, в нашей модели «Заказы клиентов» -- это вход, «Стандарты качества» -- управление, «Готовые компьютеры» -- выход, а «Персонал» -- механизм.</text:p>
      <text:p text:style-name="P5"/>
      <text:p text:style-name="P2">3. С какой стороны прямоугольника входят стрелки управления?</text:p>
      <text:p text:style-name="P5">Стрелки управления (Control) входят в функциональный блок сверху. Это жёсткое правило нотации IDEF0, которое нельзя нарушать: каждая сторона прямоугольника закреплена за определённым типом стрелки. Управляющие стрелки описывают условия, правила, стандарты и ограничения, при которых выполняется функция. В модели компании Quill управляющими стрелками являются «Правила и регламенты компании», «Стандарты качества» и «Законодательство РФ». Важно отметить, что управление не потребляется функцией (в отличие от входа), а лишь определяет условия её выполнения.</text:p>
      <text:p text:style-name="P5"/>
      <text:p text:style-name="P2">4. Что означает термин AS-IS в контексте моделирования бизнес-процессов?</text:p>
      <text:p text:style-name="P5">Модель AS-IS (в переводе «как есть») описывает текущее, фактическое состояние бизнес-процессов организации без каких-либо предполагаемых улучшений. Она фиксирует реальный порядок выполнения работ, существующие роли, потоки информации и материалов. Цель построения модели AS-IS -- создать базу для анализа, выявления узких мест, дублирования функций и неэффективностей. После анализа модели AS-IS строится модель TO-BE («как должно быть»), которая отражает желаемое, оптимизированное состояние процессов. В нашей работе модель AS-IS компании Quill выявляет текущую структуру деятельности для последующего реинжиниринга.</text:p>
      <text:p text:style-name="P5"/>
      <text:p text:style-name="P2">5. Зачем нужна точка зрения при создании модели?</text:p>
      <text:p text:style-name="P5">Точка зрения определяет, с позиции какого специалиста или роли строится модель, и существенно влияет на степень детализации и акценты модели. Один и тот же процесс, смоделированный с точки зрения директора и с точки зрения оператора сборки, будет содержать разные уровни детализации и разные акценты. В нашей работе выбрана точка зрения директора компании, поэтому модель охватывает деятельность компании в целом, а не детали отдельных <text:soft-page-break/>операций. Точка зрения фиксируется на контекстной диаграмме и остаётся неизменной на всех уровнях декомпозиции. Это гарантирует целостность и непротиворечивость модели.</text:p>
      <text:p text:style-name="P5"/>
      <text:p text:style-name="P1">6. Вывод</text:p>
      <text:p text:style-name="P5">В ходе лабораторной работы были изучены основы методологии IDEF0 и инструментальной среды Draw.io. Построена контекстная диаграмма A-0 и диаграмма декомпозиции A0 для компании Quill в модели AS-IS. Определены участники процесса, входы, выходы, управляющие воздействия и механизмы, а также основные подпроцессы: продажи, сборка и тестирование, отгрузка.</text:p>
      <text:p text:style-name="P5">Полученная модель позволяет наглядно представить функциональную структуру деятельности компании и служит основой для дальнейшей декомпозиции отдельных процессов в последующих лабораторных работах. Освоены навыки работы с нотацией ICOM и принципы построения иерархических функциональных моделе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20T21:18:42.366000000</dc:date>
    <meta:editing-duration>PT6M25S</meta:editing-duration>
    <meta:editing-cycles>5</meta:editing-cycles>
    <meta:document-statistic meta:table-count="3" meta:image-count="2" meta:object-count="0" meta:page-count="7" meta:paragraph-count="101" meta:word-count="1029" meta:character-count="8269" meta:non-whitespace-character-count="7341"/>
  </office:meta>
</office:document-meta>
</file>