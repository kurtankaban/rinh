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Col" style:family="table-column" style:display-name="Col">
      <style:table-column-properties style:column-width="3.2cm"/>
    </style:style>
    <style:style style:name="Cell" style:family="table-cell" style:display-name="Cell">
      <style:table-cell-properties fo:border="0.05pt solid #000000" fo:padding="0.08cm"/>
    </style:style>
    <style:style style:name="HeaderCell" style:family="table-cell" style:display-name="HeaderCell">
      <style:table-cell-properties fo:border="0.05pt solid #000000" fo:padding="0.08cm" fo:background-color="#E8E8E8"/>
    </style:style>
    <style:style style:name="Table" style:family="table" style:display-name="Table"/>
  </office:automatic-styles>
  <office:body>
    <office:text>
      <text:h text:outline-level="1" text:style-name="H1">Лабораторная работа 2. Табличные многокритериальные задачи оптимизации. Принятие решений в условиях неопределённости</text:h>
      <text:h text:outline-level="2" text:style-name="H2">Часть 1. Метод латентных переменных</text:h>
      <text:h text:outline-level="3" text:style-name="H3">Задание 1. Оценка качества товаров (один критерий)</text:h>
      <text:p text:style-name="Body"><text:span text:style-name="Bold">Условие:</text:span><text:span> 7 товаров (А1-А7) оцениваются по критерию «Качество». Дана матрица предпочтений p'ij.</text:span></text:p>
      <text:h text:outline-level="4" text:style-name="H4">Исходные данные</text:h>
      <table:table table:style-name="Table"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/>
          </table:table-cell>
          <table:table-cell table:style-name="HeaderCell">
            <text:p text:style-name="Body"><text:span>А1</text:span></text:p>
          </table:table-cell>
          <table:table-cell table:style-name="HeaderCell">
            <text:p text:style-name="Body"><text:span>А2</text:span></text:p>
          </table:table-cell>
          <table:table-cell table:style-name="HeaderCell">
            <text:p text:style-name="Body"><text:span>А3</text:span></text:p>
          </table:table-cell>
          <table:table-cell table:style-name="HeaderCell">
            <text:p text:style-name="Body"><text:span>А4</text:span></text:p>
          </table:table-cell>
          <table:table-cell table:style-name="HeaderCell">
            <text:p text:style-name="Body"><text:span>А5</text:span></text:p>
          </table:table-cell>
          <table:table-cell table:style-name="HeaderCell">
            <text:p text:style-name="Body"><text:span>А6</text:span></text:p>
          </table:table-cell>
          <table:table-cell table:style-name="HeaderCell">
            <text:p text:style-name="Body"><text:span>А7</text:span></text:p>
          </table:table-cell>
        </table:table-row>
        <table:table-row>
          <table:table-cell table:style-name="Cell">
            <text:p text:style-name="Body"><text:span>А1</text:span></text:p>
          </table:table-cell>
          <table:table-cell table:style-name="Cell">
            <text:p text:style-name="Body"><text:span>0,5</text:span></text:p>
          </table:table-cell>
          <table:table-cell table:style-name="Cell">
            <text:p text:style-name="Body"><text:span>0,7</text:span></text:p>
          </table:table-cell>
          <table:table-cell table:style-name="Cell">
            <text:p text:style-name="Body"><text:span>0,4</text:span></text:p>
          </table:table-cell>
          <table:table-cell table:style-name="Cell">
            <text:p text:style-name="Body"><text:span>0,5</text:span></text:p>
          </table:table-cell>
          <table:table-cell table:style-name="Cell">
            <text:p text:style-name="Body"><text:span>0,6</text:span></text:p>
          </table:table-cell>
          <table:table-cell table:style-name="Cell">
            <text:p text:style-name="Body"><text:span>0,3</text:span></text:p>
          </table:table-cell>
          <table:table-cell table:style-name="Cell">
            <text:p text:style-name="Body"><text:span>0,4</text:span></text:p>
          </table:table-cell>
        </table:table-row>
        <table:table-row>
          <table:table-cell table:style-name="Cell">
            <text:p text:style-name="Body"><text:span>А2</text:span></text:p>
          </table:table-cell>
          <table:table-cell table:style-name="Cell">
            <text:p text:style-name="Body"><text:span>0,3</text:span></text:p>
          </table:table-cell>
          <table:table-cell table:style-name="Cell">
            <text:p text:style-name="Body"><text:span>0,5</text:span></text:p>
          </table:table-cell>
          <table:table-cell table:style-name="Cell">
            <text:p text:style-name="Body"><text:span>0,8</text:span></text:p>
          </table:table-cell>
          <table:table-cell table:style-name="Cell">
            <text:p text:style-name="Body"><text:span>0,3</text:span></text:p>
          </table:table-cell>
          <table:table-cell table:style-name="Cell">
            <text:p text:style-name="Body"><text:span>0,5</text:span></text:p>
          </table:table-cell>
          <table:table-cell table:style-name="Cell">
            <text:p text:style-name="Body"><text:span>0,4</text:span></text:p>
          </table:table-cell>
          <table:table-cell table:style-name="Cell">
            <text:p text:style-name="Body"><text:span>0,8</text:span></text:p>
          </table:table-cell>
        </table:table-row>
        <table:table-row>
          <table:table-cell table:style-name="Cell">
            <text:p text:style-name="Body"><text:span>А3</text:span></text:p>
          </table:table-cell>
          <table:table-cell table:style-name="Cell">
            <text:p text:style-name="Body"><text:span>0,6</text:span></text:p>
          </table:table-cell>
          <table:table-cell table:style-name="Cell">
            <text:p text:style-name="Body"><text:span>0,2</text:span></text:p>
          </table:table-cell>
          <table:table-cell table:style-name="Cell">
            <text:p text:style-name="Body"><text:span>0,5</text:span></text:p>
          </table:table-cell>
          <table:table-cell table:style-name="Cell">
            <text:p text:style-name="Body"><text:span>0,2</text:span></text:p>
          </table:table-cell>
          <table:table-cell table:style-name="Cell">
            <text:p text:style-name="Body"><text:span>0,6</text:span></text:p>
          </table:table-cell>
          <table:table-cell table:style-name="Cell">
            <text:p text:style-name="Body"><text:span>0,4</text:span></text:p>
          </table:table-cell>
          <table:table-cell table:style-name="Cell">
            <text:p text:style-name="Body"><text:span>0,3</text:span></text:p>
          </table:table-cell>
        </table:table-row>
        <table:table-row>
          <table:table-cell table:style-name="Cell">
            <text:p text:style-name="Body"><text:span>А4</text:span></text:p>
          </table:table-cell>
          <table:table-cell table:style-name="Cell">
            <text:p text:style-name="Body"><text:span>0,5</text:span></text:p>
          </table:table-cell>
          <table:table-cell table:style-name="Cell">
            <text:p text:style-name="Body"><text:span>0,7</text:span></text:p>
          </table:table-cell>
          <table:table-cell table:style-name="Cell">
            <text:p text:style-name="Body"><text:span>0,8</text:span></text:p>
          </table:table-cell>
          <table:table-cell table:style-name="Cell">
            <text:p text:style-name="Body"><text:span>0,5</text:span></text:p>
          </table:table-cell>
          <table:table-cell table:style-name="Cell">
            <text:p text:style-name="Body"><text:span>0,3</text:span></text:p>
          </table:table-cell>
          <table:table-cell table:style-name="Cell">
            <text:p text:style-name="Body"><text:span>0,4</text:span></text:p>
          </table:table-cell>
          <table:table-cell table:style-name="Cell">
            <text:p text:style-name="Body"><text:span>0,8</text:span></text:p>
          </table:table-cell>
        </table:table-row>
        <table:table-row>
          <table:table-cell table:style-name="Cell">
            <text:p text:style-name="Body"><text:span>А5</text:span></text:p>
          </table:table-cell>
          <table:table-cell table:style-name="Cell">
            <text:p text:style-name="Body"><text:span>0,4</text:span></text:p>
          </table:table-cell>
          <table:table-cell table:style-name="Cell">
            <text:p text:style-name="Body"><text:span>0,5</text:span></text:p>
          </table:table-cell>
          <table:table-cell table:style-name="Cell">
            <text:p text:style-name="Body"><text:span>0,4</text:span></text:p>
          </table:table-cell>
          <table:table-cell table:style-name="Cell">
            <text:p text:style-name="Body"><text:span>0,7</text:span></text:p>
          </table:table-cell>
          <table:table-cell table:style-name="Cell">
            <text:p text:style-name="Body"><text:span>0,5</text:span></text:p>
          </table:table-cell>
          <table:table-cell table:style-name="Cell">
            <text:p text:style-name="Body"><text:span>0,7</text:span></text:p>
          </table:table-cell>
          <table:table-cell table:style-name="Cell">
            <text:p text:style-name="Body"><text:span>0,5</text:span></text:p>
          </table:table-cell>
        </table:table-row>
        <table:table-row>
          <table:table-cell table:style-name="Cell">
            <text:p text:style-name="Body"><text:span>А6</text:span></text:p>
          </table:table-cell>
          <table:table-cell table:style-name="Cell">
            <text:p text:style-name="Body"><text:span>0,7</text:span></text:p>
          </table:table-cell>
          <table:table-cell table:style-name="Cell">
            <text:p text:style-name="Body"><text:span>0,6</text:span></text:p>
          </table:table-cell>
          <table:table-cell table:style-name="Cell">
            <text:p text:style-name="Body"><text:span>0,6</text:span></text:p>
          </table:table-cell>
          <table:table-cell table:style-name="Cell">
            <text:p text:style-name="Body"><text:span>0,6</text:span></text:p>
          </table:table-cell>
          <table:table-cell table:style-name="Cell">
            <text:p text:style-name="Body"><text:span>0,3</text:span></text:p>
          </table:table-cell>
          <table:table-cell table:style-name="Cell">
            <text:p text:style-name="Body"><text:span>0,5</text:span></text:p>
          </table:table-cell>
          <table:table-cell table:style-name="Cell">
            <text:p text:style-name="Body"><text:span>0,7</text:span></text:p>
          </table:table-cell>
        </table:table-row>
        <table:table-row>
          <table:table-cell table:style-name="Cell">
            <text:p text:style-name="Body"><text:span>А7</text:span></text:p>
          </table:table-cell>
          <table:table-cell table:style-name="Cell">
            <text:p text:style-name="Body"><text:span>0,6</text:span></text:p>
          </table:table-cell>
          <table:table-cell table:style-name="Cell">
            <text:p text:style-name="Body"><text:span>0,2</text:span></text:p>
          </table:table-cell>
          <table:table-cell table:style-name="Cell">
            <text:p text:style-name="Body"><text:span>0,7</text:span></text:p>
          </table:table-cell>
          <table:table-cell table:style-name="Cell">
            <text:p text:style-name="Body"><text:span>0,2</text:span></text:p>
          </table:table-cell>
          <table:table-cell table:style-name="Cell">
            <text:p text:style-name="Body"><text:span>0,5</text:span></text:p>
          </table:table-cell>
          <table:table-cell table:style-name="Cell">
            <text:p text:style-name="Body"><text:span>0,3</text:span></text:p>
          </table:table-cell>
          <table:table-cell table:style-name="Cell">
            <text:p text:style-name="Body"><text:span>0,5</text:span></text:p>
          </table:table-cell>
        </table:table-row>
      </table:table>
      <text:h text:outline-level="4" text:style-name="H4">Решение</text:h>
      <text:p text:style-name="Body"><text:span>Ищем латентные переменные beta_i, минимизируя:</text:span></text:p>
      <text:p text:style-name="Body"><text:span>S(beta) = Sum_i Sum_j (p'ij - exp(beta_i - beta_j)/(1+exp(beta_i - beta_j)))^2 -&gt; min</text:span></text:p>
      <text:p text:style-name="Body"><text:span>Вводим матрицу в Excel. Под оценки выделяем ячейки, вводим единицы. Строим модельную матрицу вероятностей через формулу EXP, вычисляем сумму квадратов отклонений. Запускаем «Поиск решения» (минимум целевой, изменяя beta_i).</text:span></text:p>
      <text:p text:style-name="Body"><text:span text:style-name="Bold">Результат:</text:span></text:p>
      <table:table table:style-name="Table"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><text:span>Товар</text:span></text:p>
          </table:table-cell>
          <table:table-cell table:style-name="HeaderCell">
            <text:p text:style-name="Body"><text:span>beta_i</text:span></text:p>
          </table:table-cell>
          <table:table-cell table:style-name="HeaderCell">
            <text:p text:style-name="Body"><text:span>Нормализованная оценка</text:span></text:p>
          </table:table-cell>
        </table:table-row>
        <table:table-row>
          <table:table-cell table:style-name="Cell">
            <text:p text:style-name="Body"><text:span>А1</text:span></text:p>
          </table:table-cell>
          <table:table-cell table:style-name="Cell">
            <text:p text:style-name="Body"><text:span>0,9717</text:span></text:p>
          </table:table-cell>
          <table:table-cell table:style-name="Cell">
            <text:p text:style-name="Body"><text:span>0,510</text:span></text:p>
          </table:table-cell>
        </table:table-row>
        <table:table-row>
          <table:table-cell table:style-name="Cell">
            <text:p text:style-name="Body"><text:span>А2</text:span></text:p>
          </table:table-cell>
          <table:table-cell table:style-name="Cell">
            <text:p text:style-name="Body"><text:span>1,0761</text:span></text:p>
          </table:table-cell>
          <table:table-cell table:style-name="Cell">
            <text:p text:style-name="Body"><text:span>0,658</text:span></text:p>
          </table:table-cell>
        </table:table-row>
        <table:table-row>
          <table:table-cell table:style-name="Cell">
            <text:p text:style-name="Body"><text:span>А3</text:span></text:p>
          </table:table-cell>
          <table:table-cell table:style-name="Cell">
            <text:p text:style-name="Body"><text:span>0,6106</text:span></text:p>
          </table:table-cell>
          <table:table-cell table:style-name="Cell">
            <text:p text:style-name="Body"><text:span>0,000</text:span></text:p>
          </table:table-cell>
        </table:table-row>
        <table:table-row>
          <table:table-cell table:style-name="Cell">
            <text:p text:style-name="Body"><text:span>А4</text:span></text:p>
          </table:table-cell>
          <table:table-cell table:style-name="Cell">
            <text:p text:style-name="Body"><text:span>1,3025</text:span></text:p>
          </table:table-cell>
          <table:table-cell table:style-name="Cell">
            <text:p text:style-name="Body"><text:span>0,978</text:span></text:p>
          </table:table-cell>
        </table:table-row>
        <table:table-row>
          <table:table-cell table:style-name="Cell">
            <text:p text:style-name="Body"><text:span>А5</text:span></text:p>
          </table:table-cell>
          <table:table-cell table:style-name="Cell">
            <text:p text:style-name="Body"><text:span>1,1524</text:span></text:p>
          </table:table-cell>
          <table:table-cell table:style-name="Cell">
            <text:p text:style-name="Body"><text:span>0,766</text:span></text:p>
          </table:table-cell>
        </table:table-row>
        <table:table-row>
          <table:table-cell table:style-name="Cell">
            <text:p text:style-name="Body"><text:span text:style-name="Bold">А6</text:span></text:p>
          </table:table-cell>
          <table:table-cell table:style-name="Cell">
            <text:p text:style-name="Body"><text:span text:style-name="Bold">1,3181</text:span></text:p>
          </table:table-cell>
          <table:table-cell table:style-name="Cell">
            <text:p text:style-name="Body"><text:span text:style-name="Bold">1,000</text:span></text:p>
          </table:table-cell>
        </table:table-row>
        <table:table-row>
          <table:table-cell table:style-name="Cell">
            <text:p text:style-name="Body"><text:span>А7</text:span></text:p>
          </table:table-cell>
          <table:table-cell table:style-name="Cell">
            <text:p text:style-name="Body"><text:span>0,7427</text:span></text:p>
          </table:table-cell>
          <table:table-cell table:style-name="Cell">
            <text:p text:style-name="Body"><text:span>0,187</text:span></text:p>
          </table:table-cell>
        </table:table-row>
      </table:table>
      <text:h text:outline-level="4" text:style-name="H4">Ответ</text:h>
      <text:p text:style-name="Body"><text:span>Наилучшую оценку качества получил товар </text:span><text:span text:style-name="Bold">А6</text:span><text:span> (beta = 1,318, нормализованная оценка = 1,0). На втором месте А4 (0,978). Наихудший — А3 (0,0).</text:span></text:p>
      <text:p text:style-name="Body"/>
      <text:h text:outline-level="3" text:style-name="H3">Задание 2. Выбор проекта (многокритериальный метод латентных переменных)</text:h>
      <text:p text:style-name="Body"><text:span text:style-name="Bold">Условие:</text:span><text:span> Выбрать лучший проект из 4 (A, B, C, D) по 3 качественным критериям: К1 — эффективность, К2 — надёжность, К3 — сервисные возможности.</text:span></text:p>
      <text:h text:outline-level="4" text:style-name="H4">Исходные данные — матрицы парных сравнений</text:h>
      <text:p text:style-name="Body"><text:span text:style-name="Bold">По К1 (эффективность):</text:span></text:p>
      <table:table table:style-name="Table"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/>
          </table:table-cell>
          <table:table-cell table:style-name="HeaderCell">
            <text:p text:style-name="Body"><text:span>A</text:span></text:p>
          </table:table-cell>
          <table:table-cell table:style-name="HeaderCell">
            <text:p text:style-name="Body"><text:span>B</text:span></text:p>
          </table:table-cell>
          <table:table-cell table:style-name="HeaderCell">
            <text:p text:style-name="Body"><text:span>C</text:span></text:p>
          </table:table-cell>
          <table:table-cell table:style-name="HeaderCell">
            <text:p text:style-name="Body"><text:span>D</text:span></text:p>
          </table:table-cell>
        </table:table-row>
        <table:table-row>
          <table:table-cell table:style-name="Cell">
            <text:p text:style-name="Body"><text:span>A</text:span></text:p>
          </table:table-cell>
          <table:table-cell table:style-name="Cell">
            <text:p text:style-name="Body"><text:span>0,5</text:span></text:p>
          </table:table-cell>
          <table:table-cell table:style-name="Cell">
            <text:p text:style-name="Body"><text:span>0,2</text:span></text:p>
          </table:table-cell>
          <table:table-cell table:style-name="Cell">
            <text:p text:style-name="Body"><text:span>0,6</text:span></text:p>
          </table:table-cell>
          <table:table-cell table:style-name="Cell">
            <text:p text:style-name="Body"><text:span>0,4</text:span></text:p>
          </table:table-cell>
        </table:table-row>
        <table:table-row>
          <table:table-cell table:style-name="Cell">
            <text:p text:style-name="Body"><text:span>B</text:span></text:p>
          </table:table-cell>
          <table:table-cell table:style-name="Cell">
            <text:p text:style-name="Body"><text:span>0,8</text:span></text:p>
          </table:table-cell>
          <table:table-cell table:style-name="Cell">
            <text:p text:style-name="Body"><text:span>0,5</text:span></text:p>
          </table:table-cell>
          <table:table-cell table:style-name="Cell">
            <text:p text:style-name="Body"><text:span>0,4</text:span></text:p>
          </table:table-cell>
          <table:table-cell table:style-name="Cell">
            <text:p text:style-name="Body"><text:span>0,1</text:span></text:p>
          </table:table-cell>
        </table:table-row>
        <table:table-row>
          <table:table-cell table:style-name="Cell">
            <text:p text:style-name="Body"><text:span>C</text:span></text:p>
          </table:table-cell>
          <table:table-cell table:style-name="Cell">
            <text:p text:style-name="Body"><text:span>0,4</text:span></text:p>
          </table:table-cell>
          <table:table-cell table:style-name="Cell">
            <text:p text:style-name="Body"><text:span>0,6</text:span></text:p>
          </table:table-cell>
          <table:table-cell table:style-name="Cell">
            <text:p text:style-name="Body"><text:span>0,5</text:span></text:p>
          </table:table-cell>
          <table:table-cell table:style-name="Cell">
            <text:p text:style-name="Body"><text:span>0,7</text:span></text:p>
          </table:table-cell>
        </table:table-row>
        <table:table-row>
          <table:table-cell table:style-name="Cell">
            <text:p text:style-name="Body"><text:span>D</text:span></text:p>
          </table:table-cell>
          <table:table-cell table:style-name="Cell">
            <text:p text:style-name="Body"><text:span>0,6</text:span></text:p>
          </table:table-cell>
          <table:table-cell table:style-name="Cell">
            <text:p text:style-name="Body"><text:span>0,9</text:span></text:p>
          </table:table-cell>
          <table:table-cell table:style-name="Cell">
            <text:p text:style-name="Body"><text:span>0,3</text:span></text:p>
          </table:table-cell>
          <table:table-cell table:style-name="Cell">
            <text:p text:style-name="Body"><text:span>0,5</text:span></text:p>
          </table:table-cell>
        </table:table-row>
      </table:table>
      <text:p text:style-name="Body"><text:span text:style-name="Bold">По К2 (надёжность):</text:span></text:p>
      <table:table table:style-name="Table"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/>
          </table:table-cell>
          <table:table-cell table:style-name="HeaderCell">
            <text:p text:style-name="Body"><text:span>A</text:span></text:p>
          </table:table-cell>
          <table:table-cell table:style-name="HeaderCell">
            <text:p text:style-name="Body"><text:span>B</text:span></text:p>
          </table:table-cell>
          <table:table-cell table:style-name="HeaderCell">
            <text:p text:style-name="Body"><text:span>C</text:span></text:p>
          </table:table-cell>
          <table:table-cell table:style-name="HeaderCell">
            <text:p text:style-name="Body"><text:span>D</text:span></text:p>
          </table:table-cell>
        </table:table-row>
        <table:table-row>
          <table:table-cell table:style-name="Cell">
            <text:p text:style-name="Body"><text:span>A</text:span></text:p>
          </table:table-cell>
          <table:table-cell table:style-name="Cell">
            <text:p text:style-name="Body"><text:span>0,5</text:span></text:p>
          </table:table-cell>
          <table:table-cell table:style-name="Cell">
            <text:p text:style-name="Body"><text:span>0,6</text:span></text:p>
          </table:table-cell>
          <table:table-cell table:style-name="Cell">
            <text:p text:style-name="Body"><text:span>0,7</text:span></text:p>
          </table:table-cell>
          <table:table-cell table:style-name="Cell">
            <text:p text:style-name="Body"><text:span>0,3</text:span></text:p>
          </table:table-cell>
        </table:table-row>
        <table:table-row>
          <table:table-cell table:style-name="Cell">
            <text:p text:style-name="Body"><text:span>B</text:span></text:p>
          </table:table-cell>
          <table:table-cell table:style-name="Cell">
            <text:p text:style-name="Body"><text:span>0,4</text:span></text:p>
          </table:table-cell>
          <table:table-cell table:style-name="Cell">
            <text:p text:style-name="Body"><text:span>0,5</text:span></text:p>
          </table:table-cell>
          <table:table-cell table:style-name="Cell">
            <text:p text:style-name="Body"><text:span>0,6</text:span></text:p>
          </table:table-cell>
          <table:table-cell table:style-name="Cell">
            <text:p text:style-name="Body"><text:span>0,8</text:span></text:p>
          </table:table-cell>
        </table:table-row>
        <table:table-row>
          <table:table-cell table:style-name="Cell">
            <text:p text:style-name="Body"><text:span>C</text:span></text:p>
          </table:table-cell>
          <table:table-cell table:style-name="Cell">
            <text:p text:style-name="Body"><text:span>0,3</text:span></text:p>
          </table:table-cell>
          <table:table-cell table:style-name="Cell">
            <text:p text:style-name="Body"><text:span>0,4</text:span></text:p>
          </table:table-cell>
          <table:table-cell table:style-name="Cell">
            <text:p text:style-name="Body"><text:span>0,5</text:span></text:p>
          </table:table-cell>
          <table:table-cell table:style-name="Cell">
            <text:p text:style-name="Body"><text:span>0,7</text:span></text:p>
          </table:table-cell>
        </table:table-row>
        <table:table-row>
          <table:table-cell table:style-name="Cell">
            <text:p text:style-name="Body"><text:span>D</text:span></text:p>
          </table:table-cell>
          <table:table-cell table:style-name="Cell">
            <text:p text:style-name="Body"><text:span>0,7</text:span></text:p>
          </table:table-cell>
          <table:table-cell table:style-name="Cell">
            <text:p text:style-name="Body"><text:span>0,2</text:span></text:p>
          </table:table-cell>
          <table:table-cell table:style-name="Cell">
            <text:p text:style-name="Body"><text:span>0,3</text:span></text:p>
          </table:table-cell>
          <table:table-cell table:style-name="Cell">
            <text:p text:style-name="Body"><text:span>0,5</text:span></text:p>
          </table:table-cell>
        </table:table-row>
      </table:table>
      <text:p text:style-name="Body"><text:span text:style-name="Bold">По К3 (сервисные возможности):</text:span></text:p>
      <table:table table:style-name="Table"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/>
          </table:table-cell>
          <table:table-cell table:style-name="HeaderCell">
            <text:p text:style-name="Body"><text:span>A</text:span></text:p>
          </table:table-cell>
          <table:table-cell table:style-name="HeaderCell">
            <text:p text:style-name="Body"><text:span>B</text:span></text:p>
          </table:table-cell>
          <table:table-cell table:style-name="HeaderCell">
            <text:p text:style-name="Body"><text:span>C</text:span></text:p>
          </table:table-cell>
          <table:table-cell table:style-name="HeaderCell">
            <text:p text:style-name="Body"><text:span>D</text:span></text:p>
          </table:table-cell>
        </table:table-row>
        <table:table-row>
          <table:table-cell table:style-name="Cell">
            <text:p text:style-name="Body"><text:span>A</text:span></text:p>
          </table:table-cell>
          <table:table-cell table:style-name="Cell">
            <text:p text:style-name="Body"><text:span>0,5</text:span></text:p>
          </table:table-cell>
          <table:table-cell table:style-name="Cell">
            <text:p text:style-name="Body"><text:span>0,7</text:span></text:p>
          </table:table-cell>
          <table:table-cell table:style-name="Cell">
            <text:p text:style-name="Body"><text:span>0,2</text:span></text:p>
          </table:table-cell>
          <table:table-cell table:style-name="Cell">
            <text:p text:style-name="Body"><text:span>0,8</text:span></text:p>
          </table:table-cell>
        </table:table-row>
        <table:table-row>
          <table:table-cell table:style-name="Cell">
            <text:p text:style-name="Body"><text:span>B</text:span></text:p>
          </table:table-cell>
          <table:table-cell table:style-name="Cell">
            <text:p text:style-name="Body"><text:span>0,3</text:span></text:p>
          </table:table-cell>
          <table:table-cell table:style-name="Cell">
            <text:p text:style-name="Body"><text:span>0,5</text:span></text:p>
          </table:table-cell>
          <table:table-cell table:style-name="Cell">
            <text:p text:style-name="Body"><text:span>0,6</text:span></text:p>
          </table:table-cell>
          <table:table-cell table:style-name="Cell">
            <text:p text:style-name="Body"><text:span>0,7</text:span></text:p>
          </table:table-cell>
        </table:table-row>
        <table:table-row>
          <table:table-cell table:style-name="Cell">
            <text:p text:style-name="Body"><text:span>C</text:span></text:p>
          </table:table-cell>
          <table:table-cell table:style-name="Cell">
            <text:p text:style-name="Body"><text:span>0,8</text:span></text:p>
          </table:table-cell>
          <table:table-cell table:style-name="Cell">
            <text:p text:style-name="Body"><text:span>0,4</text:span></text:p>
          </table:table-cell>
          <table:table-cell table:style-name="Cell">
            <text:p text:style-name="Body"><text:span>0,5</text:span></text:p>
          </table:table-cell>
          <table:table-cell table:style-name="Cell">
            <text:p text:style-name="Body"><text:span>0,1</text:span></text:p>
          </table:table-cell>
        </table:table-row>
        <table:table-row>
          <table:table-cell table:style-name="Cell">
            <text:p text:style-name="Body"><text:span>D</text:span></text:p>
          </table:table-cell>
          <table:table-cell table:style-name="Cell">
            <text:p text:style-name="Body"><text:span>0,2</text:span></text:p>
          </table:table-cell>
          <table:table-cell table:style-name="Cell">
            <text:p text:style-name="Body"><text:span>0,3</text:span></text:p>
          </table:table-cell>
          <table:table-cell table:style-name="Cell">
            <text:p text:style-name="Body"><text:span>0,9</text:span></text:p>
          </table:table-cell>
          <table:table-cell table:style-name="Cell">
            <text:p text:style-name="Body"><text:span>0,5</text:span></text:p>
          </table:table-cell>
        </table:table-row>
      </table:table>
      <text:p text:style-name="Body"><text:span text:style-name="Bold">Критерии между собой:</text:span></text:p>
      <table:table table:style-name="Table">
        <table:table-column table:style-name="Col"/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/>
          </table:table-cell>
          <table:table-cell table:style-name="HeaderCell">
            <text:p text:style-name="Body"><text:span>К1</text:span></text:p>
          </table:table-cell>
          <table:table-cell table:style-name="HeaderCell">
            <text:p text:style-name="Body"><text:span>К2</text:span></text:p>
          </table:table-cell>
          <table:table-cell table:style-name="HeaderCell">
            <text:p text:style-name="Body"><text:span>К3</text:span></text:p>
          </table:table-cell>
        </table:table-row>
        <table:table-row>
          <table:table-cell table:style-name="Cell">
            <text:p text:style-name="Body"><text:span>К1</text:span></text:p>
          </table:table-cell>
          <table:table-cell table:style-name="Cell">
            <text:p text:style-name="Body"><text:span>0,5</text:span></text:p>
          </table:table-cell>
          <table:table-cell table:style-name="Cell">
            <text:p text:style-name="Body"><text:span>0,7</text:span></text:p>
          </table:table-cell>
          <table:table-cell table:style-name="Cell">
            <text:p text:style-name="Body"><text:span>0,4</text:span></text:p>
          </table:table-cell>
        </table:table-row>
        <table:table-row>
          <table:table-cell table:style-name="Cell">
            <text:p text:style-name="Body"><text:span>К2</text:span></text:p>
          </table:table-cell>
          <table:table-cell table:style-name="Cell">
            <text:p text:style-name="Body"><text:span>0,3</text:span></text:p>
          </table:table-cell>
          <table:table-cell table:style-name="Cell">
            <text:p text:style-name="Body"><text:span>0,5</text:span></text:p>
          </table:table-cell>
          <table:table-cell table:style-name="Cell">
            <text:p text:style-name="Body"><text:span>0,6</text:span></text:p>
          </table:table-cell>
        </table:table-row>
        <table:table-row>
          <table:table-cell table:style-name="Cell">
            <text:p text:style-name="Body"><text:span>К3</text:span></text:p>
          </table:table-cell>
          <table:table-cell table:style-name="Cell">
            <text:p text:style-name="Body"><text:span>0,6</text:span></text:p>
          </table:table-cell>
          <table:table-cell table:style-name="Cell">
            <text:p text:style-name="Body"><text:span>0,4</text:span></text:p>
          </table:table-cell>
          <table:table-cell table:style-name="Cell">
            <text:p text:style-name="Body"><text:span>0,5</text:span></text:p>
          </table:table-cell>
        </table:table-row>
      </table:table>
      <text:h text:outline-level="4" text:style-name="H4">Решение</text:h>
      <text:p text:style-name="Body"><text:span>Для каждой матрицы (3 матрицы альтернатив + 1 матрица критериев) решаем задачу оптимизации методом латентных переменных через «Поиск решения». Затем нормализуем полученные оценки beta_i делением на сумму (как в МАИ: w_i = beta_i / Sum(beta)).</text:span></text:p>
      <text:p text:style-name="Body"><text:span text:style-name="Bold">Оценки альтернатив (beta) и веса (beta/sum):</text:span></text:p>
      <text:p text:style-name="Body"><text:span>По К1 (эффективность): beta = (0,631; 0,770; 1,181; 1,256)</text:span></text:p>
      <table:table table:style-name="Table">
        <table:table-column table:style-name="Col"/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><text:span>Проект</text:span></text:p>
          </table:table-cell>
          <table:table-cell table:style-name="HeaderCell">
            <text:p text:style-name="Body"><text:span>К1</text:span></text:p>
          </table:table-cell>
          <table:table-cell table:style-name="HeaderCell">
            <text:p text:style-name="Body"><text:span>К2</text:span></text:p>
          </table:table-cell>
          <table:table-cell table:style-name="HeaderCell">
            <text:p text:style-name="Body"><text:span>К3</text:span></text:p>
          </table:table-cell>
        </table:table-row>
        <table:table-row>
          <table:table-cell table:style-name="Cell">
            <text:p text:style-name="Body"><text:span>A</text:span></text:p>
          </table:table-cell>
          <table:table-cell table:style-name="Cell">
            <text:p text:style-name="Body"><text:span>0,1644</text:span></text:p>
          </table:table-cell>
          <table:table-cell table:style-name="Cell">
            <text:p text:style-name="Body"><text:span>0,2770</text:span></text:p>
          </table:table-cell>
          <table:table-cell table:style-name="Cell">
            <text:p text:style-name="Body"><text:span>0,3034</text:span></text:p>
          </table:table-cell>
        </table:table-row>
        <table:table-row>
          <table:table-cell table:style-name="Cell">
            <text:p text:style-name="Body"><text:span>B</text:span></text:p>
          </table:table-cell>
          <table:table-cell table:style-name="Cell">
            <text:p text:style-name="Body"><text:span>0,2007</text:span></text:p>
          </table:table-cell>
          <table:table-cell table:style-name="Cell">
            <text:p text:style-name="Body"><text:span>0,3212</text:span></text:p>
          </table:table-cell>
          <table:table-cell table:style-name="Cell">
            <text:p text:style-name="Body"><text:span>0,2747</text:span></text:p>
          </table:table-cell>
        </table:table-row>
        <table:table-row>
          <table:table-cell table:style-name="Cell">
            <text:p text:style-name="Body"><text:span>C</text:span></text:p>
          </table:table-cell>
          <table:table-cell table:style-name="Cell">
            <text:p text:style-name="Body"><text:span>0,3077</text:span></text:p>
          </table:table-cell>
          <table:table-cell table:style-name="Cell">
            <text:p text:style-name="Body"><text:span>0,2255</text:span></text:p>
          </table:table-cell>
          <table:table-cell table:style-name="Cell">
            <text:p text:style-name="Body"><text:span>0,1956</text:span></text:p>
          </table:table-cell>
        </table:table-row>
        <table:table-row>
          <table:table-cell table:style-name="Cell">
            <text:p text:style-name="Body"><text:span>D</text:span></text:p>
          </table:table-cell>
          <table:table-cell table:style-name="Cell">
            <text:p text:style-name="Body"><text:span>0,3272</text:span></text:p>
          </table:table-cell>
          <table:table-cell table:style-name="Cell">
            <text:p text:style-name="Body"><text:span>0,1763</text:span></text:p>
          </table:table-cell>
          <table:table-cell table:style-name="Cell">
            <text:p text:style-name="Body"><text:span>0,2263</text:span></text:p>
          </table:table-cell>
        </table:table-row>
      </table:table>
      <text:p text:style-name="Body"><text:span text:style-name="Bold">Веса критериев:</text:span><text:span> beta = (1,126; 0,863; 0,995), нормализованные: К1 = 0,3774; К2 = 0,2892; К3 = 0,3333</text:span></text:p>
      <text:p text:style-name="Body"><text:span text:style-name="Bold">Функции полезности:</text:span></text:p>
      <text:p text:style-name="Body"><text:span>F(Ai) = Sum_k (w_ik * w_k)</text:span></text:p>
      <table:table table:style-name="Table"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><text:span>Проект</text:span></text:p>
          </table:table-cell>
          <table:table-cell table:style-name="HeaderCell">
            <text:p text:style-name="Body"><text:span>Расчёт</text:span></text:p>
          </table:table-cell>
          <table:table-cell table:style-name="HeaderCell">
            <text:p text:style-name="Body"><text:span>F</text:span></text:p>
          </table:table-cell>
        </table:table-row>
        <table:table-row>
          <table:table-cell table:style-name="Cell">
            <text:p text:style-name="Body"><text:span>A</text:span></text:p>
          </table:table-cell>
          <table:table-cell table:style-name="Cell">
            <text:p text:style-name="Body"><text:span>0,1644×0,3774 + 0,2770×0,2892 + 0,3034×0,3333</text:span></text:p>
          </table:table-cell>
          <table:table-cell table:style-name="Cell">
            <text:p text:style-name="Body"><text:span>0,2433</text:span></text:p>
          </table:table-cell>
        </table:table-row>
        <table:table-row>
          <table:table-cell table:style-name="Cell">
            <text:p text:style-name="Body"><text:span text:style-name="Bold">B</text:span></text:p>
          </table:table-cell>
          <table:table-cell table:style-name="Cell">
            <text:p text:style-name="Body"><text:span text:style-name="Bold">0,2007×0,3774 + 0,3212×0,2892 + 0,2747×0,3333</text:span></text:p>
          </table:table-cell>
          <table:table-cell table:style-name="Cell">
            <text:p text:style-name="Body"><text:span text:style-name="Bold">0,2602</text:span></text:p>
          </table:table-cell>
        </table:table-row>
        <table:table-row>
          <table:table-cell table:style-name="Cell">
            <text:p text:style-name="Body"><text:span>C</text:span></text:p>
          </table:table-cell>
          <table:table-cell table:style-name="Cell">
            <text:p text:style-name="Body"><text:span>0,3077×0,3774 + 0,2255×0,2892 + 0,1956×0,3333</text:span></text:p>
          </table:table-cell>
          <table:table-cell table:style-name="Cell">
            <text:p text:style-name="Body"><text:span>0,2465</text:span></text:p>
          </table:table-cell>
        </table:table-row>
        <table:table-row>
          <table:table-cell table:style-name="Cell">
            <text:p text:style-name="Body"><text:span>D</text:span></text:p>
          </table:table-cell>
          <table:table-cell table:style-name="Cell">
            <text:p text:style-name="Body"><text:span>0,3272×0,3774 + 0,1763×0,2892 + 0,2263×0,3333</text:span></text:p>
          </table:table-cell>
          <table:table-cell table:style-name="Cell">
            <text:p text:style-name="Body"><text:span>0,2499</text:span></text:p>
          </table:table-cell>
        </table:table-row>
      </table:table>
      <text:h text:outline-level="4" text:style-name="H4">Ответ</text:h>
      <text:p text:style-name="Body"><text:span>Максимальная функция полезности F = 0,2602 у проекта </text:span><text:span text:style-name="Bold">B</text:span><text:span>. Лучший проект — </text:span><text:span text:style-name="Bold">B</text:span><text:span>.</text:span></text:p>
      <text:p text:style-name="Body"/>
      <text:h text:outline-level="2" text:style-name="H2">Часть 2. Принятие решений в условиях неопределённости</text:h>
      <text:h text:outline-level="3" text:style-name="H3">Задание 1. Торговая фирма (максимизация прибыли)</text:h>
      <text:p text:style-name="Body"><text:span text:style-name="Bold">Условие:</text:span><text:span> Директор торговой фирмы выбирает из 5 альтернатив (А1-А5). Прибыль зависит от ситуации на рынке (S1-S4). Критерий максимизируется. Коэффициент доверия alpha = 0,6.</text:span></text:p>
      <text:h text:outline-level="4" text:style-name="H4">Матрица выигрышей (млн руб./год)</text:h>
      <table:table table:style-name="Table"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/>
          </table:table-cell>
          <table:table-cell table:style-name="HeaderCell">
            <text:p text:style-name="Body"><text:span>S1</text:span></text:p>
          </table:table-cell>
          <table:table-cell table:style-name="HeaderCell">
            <text:p text:style-name="Body"><text:span>S2</text:span></text:p>
          </table:table-cell>
          <table:table-cell table:style-name="HeaderCell">
            <text:p text:style-name="Body"><text:span>S3</text:span></text:p>
          </table:table-cell>
          <table:table-cell table:style-name="HeaderCell">
            <text:p text:style-name="Body"><text:span>S4</text:span></text:p>
          </table:table-cell>
        </table:table-row>
        <table:table-row>
          <table:table-cell table:style-name="Cell">
            <text:p text:style-name="Body"><text:span>А1</text:span></text:p>
          </table:table-cell>
          <table:table-cell table:style-name="Cell">
            <text:p text:style-name="Body"><text:span>21</text:span></text:p>
          </table:table-cell>
          <table:table-cell table:style-name="Cell">
            <text:p text:style-name="Body"><text:span>12</text:span></text:p>
          </table:table-cell>
          <table:table-cell table:style-name="Cell">
            <text:p text:style-name="Body"><text:span>22</text:span></text:p>
          </table:table-cell>
          <table:table-cell table:style-name="Cell">
            <text:p text:style-name="Body"><text:span>25</text:span></text:p>
          </table:table-cell>
        </table:table-row>
        <table:table-row>
          <table:table-cell table:style-name="Cell">
            <text:p text:style-name="Body"><text:span>А2</text:span></text:p>
          </table:table-cell>
          <table:table-cell table:style-name="Cell">
            <text:p text:style-name="Body"><text:span>20</text:span></text:p>
          </table:table-cell>
          <table:table-cell table:style-name="Cell">
            <text:p text:style-name="Body"><text:span>21</text:span></text:p>
          </table:table-cell>
          <table:table-cell table:style-name="Cell">
            <text:p text:style-name="Body"><text:span>18</text:span></text:p>
          </table:table-cell>
          <table:table-cell table:style-name="Cell">
            <text:p text:style-name="Body"><text:span>19</text:span></text:p>
          </table:table-cell>
        </table:table-row>
        <table:table-row>
          <table:table-cell table:style-name="Cell">
            <text:p text:style-name="Body"><text:span>А3</text:span></text:p>
          </table:table-cell>
          <table:table-cell table:style-name="Cell">
            <text:p text:style-name="Body"><text:span>16</text:span></text:p>
          </table:table-cell>
          <table:table-cell table:style-name="Cell">
            <text:p text:style-name="Body"><text:span>33</text:span></text:p>
          </table:table-cell>
          <table:table-cell table:style-name="Cell">
            <text:p text:style-name="Body"><text:span>14</text:span></text:p>
          </table:table-cell>
          <table:table-cell table:style-name="Cell">
            <text:p text:style-name="Body"><text:span>17</text:span></text:p>
          </table:table-cell>
        </table:table-row>
        <table:table-row>
          <table:table-cell table:style-name="Cell">
            <text:p text:style-name="Body"><text:span>А4</text:span></text:p>
          </table:table-cell>
          <table:table-cell table:style-name="Cell">
            <text:p text:style-name="Body"><text:span>23</text:span></text:p>
          </table:table-cell>
          <table:table-cell table:style-name="Cell">
            <text:p text:style-name="Body"><text:span>16</text:span></text:p>
          </table:table-cell>
          <table:table-cell table:style-name="Cell">
            <text:p text:style-name="Body"><text:span>19</text:span></text:p>
          </table:table-cell>
          <table:table-cell table:style-name="Cell">
            <text:p text:style-name="Body"><text:span>24</text:span></text:p>
          </table:table-cell>
        </table:table-row>
        <table:table-row>
          <table:table-cell table:style-name="Cell">
            <text:p text:style-name="Body"><text:span>А5</text:span></text:p>
          </table:table-cell>
          <table:table-cell table:style-name="Cell">
            <text:p text:style-name="Body"><text:span>15</text:span></text:p>
          </table:table-cell>
          <table:table-cell table:style-name="Cell">
            <text:p text:style-name="Body"><text:span>16</text:span></text:p>
          </table:table-cell>
          <table:table-cell table:style-name="Cell">
            <text:p text:style-name="Body"><text:span>24</text:span></text:p>
          </table:table-cell>
          <table:table-cell table:style-name="Cell">
            <text:p text:style-name="Body"><text:span>26</text:span></text:p>
          </table:table-cell>
        </table:table-row>
      </table:table>
      <text:h text:outline-level="4" text:style-name="H4">Решение</text:h>
      <text:p text:style-name="Body"><text:span text:style-name="Bold">1. Критерий Лапласа</text:span><text:span> (среднее арифметическое по строкам, выбираем max):</text:span></text:p>
      <table:table table:style-name="Table">
        <table:table-column table:style-name="Col"/>
        <table:table-column table:style-name="Col"/>
        <table:table-row>
          <table:table-cell table:style-name="HeaderCell">
            <text:p text:style-name="Body"><text:span>Альтернатива</text:span></text:p>
          </table:table-cell>
          <table:table-cell table:style-name="HeaderCell">
            <text:p text:style-name="Body"><text:span>L</text:span></text:p>
          </table:table-cell>
        </table:table-row>
        <table:table-row>
          <table:table-cell table:style-name="Cell">
            <text:p text:style-name="Body"><text:span>А1</text:span></text:p>
          </table:table-cell>
          <table:table-cell table:style-name="Cell">
            <text:p text:style-name="Body"><text:span>20,00</text:span></text:p>
          </table:table-cell>
        </table:table-row>
        <table:table-row>
          <table:table-cell table:style-name="Cell">
            <text:p text:style-name="Body"><text:span>А2</text:span></text:p>
          </table:table-cell>
          <table:table-cell table:style-name="Cell">
            <text:p text:style-name="Body"><text:span>19,50</text:span></text:p>
          </table:table-cell>
        </table:table-row>
        <table:table-row>
          <table:table-cell table:style-name="Cell">
            <text:p text:style-name="Body"><text:span>А3</text:span></text:p>
          </table:table-cell>
          <table:table-cell table:style-name="Cell">
            <text:p text:style-name="Body"><text:span>20,00</text:span></text:p>
          </table:table-cell>
        </table:table-row>
        <table:table-row>
          <table:table-cell table:style-name="Cell">
            <text:p text:style-name="Body"><text:span text:style-name="Bold">А4</text:span></text:p>
          </table:table-cell>
          <table:table-cell table:style-name="Cell">
            <text:p text:style-name="Body"><text:span text:style-name="Bold">20,50</text:span></text:p>
          </table:table-cell>
        </table:table-row>
        <table:table-row>
          <table:table-cell table:style-name="Cell">
            <text:p text:style-name="Body"><text:span>А5</text:span></text:p>
          </table:table-cell>
          <table:table-cell table:style-name="Cell">
            <text:p text:style-name="Body"><text:span>20,25</text:span></text:p>
          </table:table-cell>
        </table:table-row>
      </table:table>
      <text:p text:style-name="Body"><text:span>Лучшая: </text:span><text:span text:style-name="Bold">А4</text:span><text:span> (20,50)</text:span></text:p>
      <text:p text:style-name="Body"><text:span text:style-name="Bold">2. Критерий Вальда</text:span><text:span> (maximin — для каждой альтернативы берём минимум, выбираем max):</text:span></text:p>
      <table:table table:style-name="Table">
        <table:table-column table:style-name="Col"/>
        <table:table-column table:style-name="Col"/>
        <table:table-row>
          <table:table-cell table:style-name="HeaderCell">
            <text:p text:style-name="Body"><text:span>Альтернатива</text:span></text:p>
          </table:table-cell>
          <table:table-cell table:style-name="HeaderCell">
            <text:p text:style-name="Body"><text:span>min(ai)</text:span></text:p>
          </table:table-cell>
        </table:table-row>
        <table:table-row>
          <table:table-cell table:style-name="Cell">
            <text:p text:style-name="Body"><text:span>А1</text:span></text:p>
          </table:table-cell>
          <table:table-cell table:style-name="Cell">
            <text:p text:style-name="Body"><text:span>12</text:span></text:p>
          </table:table-cell>
        </table:table-row>
        <table:table-row>
          <table:table-cell table:style-name="Cell">
            <text:p text:style-name="Body"><text:span text:style-name="Bold">А2</text:span></text:p>
          </table:table-cell>
          <table:table-cell table:style-name="Cell">
            <text:p text:style-name="Body"><text:span text:style-name="Bold">18</text:span></text:p>
          </table:table-cell>
        </table:table-row>
        <table:table-row>
          <table:table-cell table:style-name="Cell">
            <text:p text:style-name="Body"><text:span>А3</text:span></text:p>
          </table:table-cell>
          <table:table-cell table:style-name="Cell">
            <text:p text:style-name="Body"><text:span>14</text:span></text:p>
          </table:table-cell>
        </table:table-row>
        <table:table-row>
          <table:table-cell table:style-name="Cell">
            <text:p text:style-name="Body"><text:span>А4</text:span></text:p>
          </table:table-cell>
          <table:table-cell table:style-name="Cell">
            <text:p text:style-name="Body"><text:span>16</text:span></text:p>
          </table:table-cell>
        </table:table-row>
        <table:table-row>
          <table:table-cell table:style-name="Cell">
            <text:p text:style-name="Body"><text:span>А5</text:span></text:p>
          </table:table-cell>
          <table:table-cell table:style-name="Cell">
            <text:p text:style-name="Body"><text:span>15</text:span></text:p>
          </table:table-cell>
        </table:table-row>
      </table:table>
      <text:p text:style-name="Body"><text:span>Лучшая: </text:span><text:span text:style-name="Bold">А2</text:span><text:span> (18)</text:span></text:p>
      <text:p text:style-name="Body"><text:span text:style-name="Bold">3. Критерий максимального оптимизма</text:span><text:span> (maximax):</text:span></text:p>
      <table:table table:style-name="Table">
        <table:table-column table:style-name="Col"/>
        <table:table-column table:style-name="Col"/>
        <table:table-row>
          <table:table-cell table:style-name="HeaderCell">
            <text:p text:style-name="Body"><text:span>Альтернатива</text:span></text:p>
          </table:table-cell>
          <table:table-cell table:style-name="HeaderCell">
            <text:p text:style-name="Body"><text:span>max(ai)</text:span></text:p>
          </table:table-cell>
        </table:table-row>
        <table:table-row>
          <table:table-cell table:style-name="Cell">
            <text:p text:style-name="Body"><text:span>А1</text:span></text:p>
          </table:table-cell>
          <table:table-cell table:style-name="Cell">
            <text:p text:style-name="Body"><text:span>25</text:span></text:p>
          </table:table-cell>
        </table:table-row>
        <table:table-row>
          <table:table-cell table:style-name="Cell">
            <text:p text:style-name="Body"><text:span>А2</text:span></text:p>
          </table:table-cell>
          <table:table-cell table:style-name="Cell">
            <text:p text:style-name="Body"><text:span>21</text:span></text:p>
          </table:table-cell>
        </table:table-row>
        <table:table-row>
          <table:table-cell table:style-name="Cell">
            <text:p text:style-name="Body"><text:span text:style-name="Bold">А3</text:span></text:p>
          </table:table-cell>
          <table:table-cell table:style-name="Cell">
            <text:p text:style-name="Body"><text:span text:style-name="Bold">33</text:span></text:p>
          </table:table-cell>
        </table:table-row>
        <table:table-row>
          <table:table-cell table:style-name="Cell">
            <text:p text:style-name="Body"><text:span>А4</text:span></text:p>
          </table:table-cell>
          <table:table-cell table:style-name="Cell">
            <text:p text:style-name="Body"><text:span>24</text:span></text:p>
          </table:table-cell>
        </table:table-row>
        <table:table-row>
          <table:table-cell table:style-name="Cell">
            <text:p text:style-name="Body"><text:span>А5</text:span></text:p>
          </table:table-cell>
          <table:table-cell table:style-name="Cell">
            <text:p text:style-name="Body"><text:span>26</text:span></text:p>
          </table:table-cell>
        </table:table-row>
      </table:table>
      <text:p text:style-name="Body"><text:span>Лучшая: </text:span><text:span text:style-name="Bold">А3</text:span><text:span> (33)</text:span></text:p>
      <text:p text:style-name="Body"><text:span text:style-name="Bold">4. Критерий Сэвиджа</text:span><text:span> (строим матрицу рисков, выбираем minimax):</text:span></text:p>
      <text:p text:style-name="Body"><text:span>Матрица рисков (max столбца - элемент):</text:span></text:p>
      <table:table table:style-name="Table"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/>
          </table:table-cell>
          <table:table-cell table:style-name="HeaderCell">
            <text:p text:style-name="Body"><text:span>S1</text:span></text:p>
          </table:table-cell>
          <table:table-cell table:style-name="HeaderCell">
            <text:p text:style-name="Body"><text:span>S2</text:span></text:p>
          </table:table-cell>
          <table:table-cell table:style-name="HeaderCell">
            <text:p text:style-name="Body"><text:span>S3</text:span></text:p>
          </table:table-cell>
          <table:table-cell table:style-name="HeaderCell">
            <text:p text:style-name="Body"><text:span>S4</text:span></text:p>
          </table:table-cell>
          <table:table-cell table:style-name="HeaderCell">
            <text:p text:style-name="Body"><text:span>max(risk)</text:span></text:p>
          </table:table-cell>
        </table:table-row>
        <table:table-row>
          <table:table-cell table:style-name="Cell">
            <text:p text:style-name="Body"><text:span>А1</text:span></text:p>
          </table:table-cell>
          <table:table-cell table:style-name="Cell">
            <text:p text:style-name="Body"><text:span>2</text:span></text:p>
          </table:table-cell>
          <table:table-cell table:style-name="Cell">
            <text:p text:style-name="Body"><text:span>21</text:span></text:p>
          </table:table-cell>
          <table:table-cell table:style-name="Cell">
            <text:p text:style-name="Body"><text:span>2</text:span></text:p>
          </table:table-cell>
          <table:table-cell table:style-name="Cell">
            <text:p text:style-name="Body"><text:span>1</text:span></text:p>
          </table:table-cell>
          <table:table-cell table:style-name="Cell">
            <text:p text:style-name="Body"><text:span>21</text:span></text:p>
          </table:table-cell>
        </table:table-row>
        <table:table-row>
          <table:table-cell table:style-name="Cell">
            <text:p text:style-name="Body"><text:span>А2</text:span></text:p>
          </table:table-cell>
          <table:table-cell table:style-name="Cell">
            <text:p text:style-name="Body"><text:span>3</text:span></text:p>
          </table:table-cell>
          <table:table-cell table:style-name="Cell">
            <text:p text:style-name="Body"><text:span>12</text:span></text:p>
          </table:table-cell>
          <table:table-cell table:style-name="Cell">
            <text:p text:style-name="Body"><text:span>6</text:span></text:p>
          </table:table-cell>
          <table:table-cell table:style-name="Cell">
            <text:p text:style-name="Body"><text:span>7</text:span></text:p>
          </table:table-cell>
          <table:table-cell table:style-name="Cell">
            <text:p text:style-name="Body"><text:span>12</text:span></text:p>
          </table:table-cell>
        </table:table-row>
        <table:table-row>
          <table:table-cell table:style-name="Cell">
            <text:p text:style-name="Body"><text:span text:style-name="Bold">А3</text:span></text:p>
          </table:table-cell>
          <table:table-cell table:style-name="Cell">
            <text:p text:style-name="Body"><text:span text:style-name="Bold">7</text:span></text:p>
          </table:table-cell>
          <table:table-cell table:style-name="Cell">
            <text:p text:style-name="Body"><text:span text:style-name="Bold">0</text:span></text:p>
          </table:table-cell>
          <table:table-cell table:style-name="Cell">
            <text:p text:style-name="Body"><text:span text:style-name="Bold">10</text:span></text:p>
          </table:table-cell>
          <table:table-cell table:style-name="Cell">
            <text:p text:style-name="Body"><text:span text:style-name="Bold">9</text:span></text:p>
          </table:table-cell>
          <table:table-cell table:style-name="Cell">
            <text:p text:style-name="Body"><text:span text:style-name="Bold">10</text:span></text:p>
          </table:table-cell>
        </table:table-row>
        <table:table-row>
          <table:table-cell table:style-name="Cell">
            <text:p text:style-name="Body"><text:span>А4</text:span></text:p>
          </table:table-cell>
          <table:table-cell table:style-name="Cell">
            <text:p text:style-name="Body"><text:span>0</text:span></text:p>
          </table:table-cell>
          <table:table-cell table:style-name="Cell">
            <text:p text:style-name="Body"><text:span>17</text:span></text:p>
          </table:table-cell>
          <table:table-cell table:style-name="Cell">
            <text:p text:style-name="Body"><text:span>5</text:span></text:p>
          </table:table-cell>
          <table:table-cell table:style-name="Cell">
            <text:p text:style-name="Body"><text:span>2</text:span></text:p>
          </table:table-cell>
          <table:table-cell table:style-name="Cell">
            <text:p text:style-name="Body"><text:span>17</text:span></text:p>
          </table:table-cell>
        </table:table-row>
        <table:table-row>
          <table:table-cell table:style-name="Cell">
            <text:p text:style-name="Body"><text:span>А5</text:span></text:p>
          </table:table-cell>
          <table:table-cell table:style-name="Cell">
            <text:p text:style-name="Body"><text:span>8</text:span></text:p>
          </table:table-cell>
          <table:table-cell table:style-name="Cell">
            <text:p text:style-name="Body"><text:span>17</text:span></text:p>
          </table:table-cell>
          <table:table-cell table:style-name="Cell">
            <text:p text:style-name="Body"><text:span>0</text:span></text:p>
          </table:table-cell>
          <table:table-cell table:style-name="Cell">
            <text:p text:style-name="Body"><text:span>0</text:span></text:p>
          </table:table-cell>
          <table:table-cell table:style-name="Cell">
            <text:p text:style-name="Body"><text:span>17</text:span></text:p>
          </table:table-cell>
        </table:table-row>
      </table:table>
      <text:p text:style-name="Body"><text:span>Лучшая: </text:span><text:span text:style-name="Bold">А3</text:span><text:span> (минимальный max риск = 10)</text:span></text:p>
      <text:p text:style-name="Body"><text:span text:style-name="Bold">5. Критерий Гурвица</text:span><text:span> (alpha = 0,6):</text:span></text:p>
      <text:p text:style-name="Body"><text:span>H = alpha × max(ai) + (1-alpha) × min(ai)</text:span></text:p>
      <table:table table:style-name="Table"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><text:span>Альтернатива</text:span></text:p>
          </table:table-cell>
          <table:table-cell table:style-name="HeaderCell">
            <text:p text:style-name="Body"><text:span>Расчёт</text:span></text:p>
          </table:table-cell>
          <table:table-cell table:style-name="HeaderCell">
            <text:p text:style-name="Body"><text:span>H</text:span></text:p>
          </table:table-cell>
        </table:table-row>
        <table:table-row>
          <table:table-cell table:style-name="Cell">
            <text:p text:style-name="Body"><text:span>А1</text:span></text:p>
          </table:table-cell>
          <table:table-cell table:style-name="Cell">
            <text:p text:style-name="Body"><text:span>0,6×25 + 0,4×12</text:span></text:p>
          </table:table-cell>
          <table:table-cell table:style-name="Cell">
            <text:p text:style-name="Body"><text:span>19,8</text:span></text:p>
          </table:table-cell>
        </table:table-row>
        <table:table-row>
          <table:table-cell table:style-name="Cell">
            <text:p text:style-name="Body"><text:span>А2</text:span></text:p>
          </table:table-cell>
          <table:table-cell table:style-name="Cell">
            <text:p text:style-name="Body"><text:span>0,6×21 + 0,4×18</text:span></text:p>
          </table:table-cell>
          <table:table-cell table:style-name="Cell">
            <text:p text:style-name="Body"><text:span>19,8</text:span></text:p>
          </table:table-cell>
        </table:table-row>
        <table:table-row>
          <table:table-cell table:style-name="Cell">
            <text:p text:style-name="Body"><text:span text:style-name="Bold">А3</text:span></text:p>
          </table:table-cell>
          <table:table-cell table:style-name="Cell">
            <text:p text:style-name="Body"><text:span text:style-name="Bold">0,6×33 + 0,4×14</text:span></text:p>
          </table:table-cell>
          <table:table-cell table:style-name="Cell">
            <text:p text:style-name="Body"><text:span text:style-name="Bold">25,4</text:span></text:p>
          </table:table-cell>
        </table:table-row>
        <table:table-row>
          <table:table-cell table:style-name="Cell">
            <text:p text:style-name="Body"><text:span>А4</text:span></text:p>
          </table:table-cell>
          <table:table-cell table:style-name="Cell">
            <text:p text:style-name="Body"><text:span>0,6×24 + 0,4×16</text:span></text:p>
          </table:table-cell>
          <table:table-cell table:style-name="Cell">
            <text:p text:style-name="Body"><text:span>20,8</text:span></text:p>
          </table:table-cell>
        </table:table-row>
        <table:table-row>
          <table:table-cell table:style-name="Cell">
            <text:p text:style-name="Body"><text:span>А5</text:span></text:p>
          </table:table-cell>
          <table:table-cell table:style-name="Cell">
            <text:p text:style-name="Body"><text:span>0,6×26 + 0,4×15</text:span></text:p>
          </table:table-cell>
          <table:table-cell table:style-name="Cell">
            <text:p text:style-name="Body"><text:span>21,6</text:span></text:p>
          </table:table-cell>
        </table:table-row>
      </table:table>
      <text:p text:style-name="Body"><text:span>Лучшая: </text:span><text:span text:style-name="Bold">А3</text:span><text:span> (25,4)</text:span></text:p>
      <text:h text:outline-level="4" text:style-name="H4">Ответ</text:h>
      <table:table table:style-name="Table">
        <table:table-column table:style-name="Col"/>
        <table:table-column table:style-name="Col"/>
        <table:table-row>
          <table:table-cell table:style-name="HeaderCell">
            <text:p text:style-name="Body"><text:span>Критерий</text:span></text:p>
          </table:table-cell>
          <table:table-cell table:style-name="HeaderCell">
            <text:p text:style-name="Body"><text:span>Лучшая альтернатива</text:span></text:p>
          </table:table-cell>
        </table:table-row>
        <table:table-row>
          <table:table-cell table:style-name="Cell">
            <text:p text:style-name="Body"><text:span>Лаплас</text:span></text:p>
          </table:table-cell>
          <table:table-cell table:style-name="Cell">
            <text:p text:style-name="Body"><text:span>А4</text:span></text:p>
          </table:table-cell>
        </table:table-row>
        <table:table-row>
          <table:table-cell table:style-name="Cell">
            <text:p text:style-name="Body"><text:span>Вальд</text:span></text:p>
          </table:table-cell>
          <table:table-cell table:style-name="Cell">
            <text:p text:style-name="Body"><text:span>А2</text:span></text:p>
          </table:table-cell>
        </table:table-row>
        <table:table-row>
          <table:table-cell table:style-name="Cell">
            <text:p text:style-name="Body"><text:span>Макс. оптимизм</text:span></text:p>
          </table:table-cell>
          <table:table-cell table:style-name="Cell">
            <text:p text:style-name="Body"><text:span>А3</text:span></text:p>
          </table:table-cell>
        </table:table-row>
        <table:table-row>
          <table:table-cell table:style-name="Cell">
            <text:p text:style-name="Body"><text:span>Сэвидж</text:span></text:p>
          </table:table-cell>
          <table:table-cell table:style-name="Cell">
            <text:p text:style-name="Body"><text:span>А3</text:span></text:p>
          </table:table-cell>
        </table:table-row>
        <table:table-row>
          <table:table-cell table:style-name="Cell">
            <text:p text:style-name="Body"><text:span>Гурвиц (alpha=0,6)</text:span></text:p>
          </table:table-cell>
          <table:table-cell table:style-name="Cell">
            <text:p text:style-name="Body"><text:span>А3</text:span></text:p>
          </table:table-cell>
        </table:table-row>
      </table:table>
      <text:p text:style-name="Body"><text:span>Большинство критериев (3 из 5) указывают на </text:span><text:span text:style-name="Bold">А3</text:span><text:span>.</text:span></text:p>
      <text:p text:style-name="Body"/>
      <text:h text:outline-level="3" text:style-name="H3">Задание 2. Нефтяная компания (минимизация затрат)</text:h>
      <text:p text:style-name="Body"><text:span text:style-name="Bold">Условие:</text:span><text:span> Нефтяная компания выбирает проект строительства вышки (A, B, C, D). Затраты зависят от погоды (S1-S5). Критерий минимизируется. Коэффициент доверия alpha = 0,6.</text:span></text:p>
      <text:h text:outline-level="4" text:style-name="H4">Матрица затрат (млн руб.)</text:h>
      <table:table table:style-name="Table"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/>
          </table:table-cell>
          <table:table-cell table:style-name="HeaderCell">
            <text:p text:style-name="Body"><text:span>S1</text:span></text:p>
          </table:table-cell>
          <table:table-cell table:style-name="HeaderCell">
            <text:p text:style-name="Body"><text:span>S2</text:span></text:p>
          </table:table-cell>
          <table:table-cell table:style-name="HeaderCell">
            <text:p text:style-name="Body"><text:span>S3</text:span></text:p>
          </table:table-cell>
          <table:table-cell table:style-name="HeaderCell">
            <text:p text:style-name="Body"><text:span>S4</text:span></text:p>
          </table:table-cell>
          <table:table-cell table:style-name="HeaderCell">
            <text:p text:style-name="Body"><text:span>S5</text:span></text:p>
          </table:table-cell>
        </table:table-row>
        <table:table-row>
          <table:table-cell table:style-name="Cell">
            <text:p text:style-name="Body"><text:span>A</text:span></text:p>
          </table:table-cell>
          <table:table-cell table:style-name="Cell">
            <text:p text:style-name="Body"><text:span>7</text:span></text:p>
          </table:table-cell>
          <table:table-cell table:style-name="Cell">
            <text:p text:style-name="Body"><text:span>12</text:span></text:p>
          </table:table-cell>
          <table:table-cell table:style-name="Cell">
            <text:p text:style-name="Body"><text:span>8</text:span></text:p>
          </table:table-cell>
          <table:table-cell table:style-name="Cell">
            <text:p text:style-name="Body"><text:span>10</text:span></text:p>
          </table:table-cell>
          <table:table-cell table:style-name="Cell">
            <text:p text:style-name="Body"><text:span>5</text:span></text:p>
          </table:table-cell>
        </table:table-row>
        <table:table-row>
          <table:table-cell table:style-name="Cell">
            <text:p text:style-name="Body"><text:span>B</text:span></text:p>
          </table:table-cell>
          <table:table-cell table:style-name="Cell">
            <text:p text:style-name="Body"><text:span>9</text:span></text:p>
          </table:table-cell>
          <table:table-cell table:style-name="Cell">
            <text:p text:style-name="Body"><text:span>10</text:span></text:p>
          </table:table-cell>
          <table:table-cell table:style-name="Cell">
            <text:p text:style-name="Body"><text:span>7</text:span></text:p>
          </table:table-cell>
          <table:table-cell table:style-name="Cell">
            <text:p text:style-name="Body"><text:span>8</text:span></text:p>
          </table:table-cell>
          <table:table-cell table:style-name="Cell">
            <text:p text:style-name="Body"><text:span>9</text:span></text:p>
          </table:table-cell>
        </table:table-row>
        <table:table-row>
          <table:table-cell table:style-name="Cell">
            <text:p text:style-name="Body"><text:span>C</text:span></text:p>
          </table:table-cell>
          <table:table-cell table:style-name="Cell">
            <text:p text:style-name="Body"><text:span>6</text:span></text:p>
          </table:table-cell>
          <table:table-cell table:style-name="Cell">
            <text:p text:style-name="Body"><text:span>8</text:span></text:p>
          </table:table-cell>
          <table:table-cell table:style-name="Cell">
            <text:p text:style-name="Body"><text:span>15</text:span></text:p>
          </table:table-cell>
          <table:table-cell table:style-name="Cell">
            <text:p text:style-name="Body"><text:span>9</text:span></text:p>
          </table:table-cell>
          <table:table-cell table:style-name="Cell">
            <text:p text:style-name="Body"><text:span>7</text:span></text:p>
          </table:table-cell>
        </table:table-row>
        <table:table-row>
          <table:table-cell table:style-name="Cell">
            <text:p text:style-name="Body"><text:span>D</text:span></text:p>
          </table:table-cell>
          <table:table-cell table:style-name="Cell">
            <text:p text:style-name="Body"><text:span>9</text:span></text:p>
          </table:table-cell>
          <table:table-cell table:style-name="Cell">
            <text:p text:style-name="Body"><text:span>10</text:span></text:p>
          </table:table-cell>
          <table:table-cell table:style-name="Cell">
            <text:p text:style-name="Body"><text:span>8</text:span></text:p>
          </table:table-cell>
          <table:table-cell table:style-name="Cell">
            <text:p text:style-name="Body"><text:span>11</text:span></text:p>
          </table:table-cell>
          <table:table-cell table:style-name="Cell">
            <text:p text:style-name="Body"><text:span>7</text:span></text:p>
          </table:table-cell>
        </table:table-row>
      </table:table>
      <text:h text:outline-level="4" text:style-name="H4">Решение</text:h>
      <text:p text:style-name="Body"><text:span>Поскольку критерий минимизируется, формулы меняются:</text:span></text:p>
      <text:p text:style-name="Body"><text:span text:style-name="Bold">1. Критерий Лапласа</text:span><text:span> (среднее -&gt; выбираем min):</text:span></text:p>
      <table:table table:style-name="Table">
        <table:table-column table:style-name="Col"/>
        <table:table-column table:style-name="Col"/>
        <table:table-row>
          <table:table-cell table:style-name="HeaderCell">
            <text:p text:style-name="Body"><text:span>Проект</text:span></text:p>
          </table:table-cell>
          <table:table-cell table:style-name="HeaderCell">
            <text:p text:style-name="Body"><text:span>L</text:span></text:p>
          </table:table-cell>
        </table:table-row>
        <table:table-row>
          <table:table-cell table:style-name="Cell">
            <text:p text:style-name="Body"><text:span text:style-name="Bold">A</text:span></text:p>
          </table:table-cell>
          <table:table-cell table:style-name="Cell">
            <text:p text:style-name="Body"><text:span text:style-name="Bold">8,40</text:span></text:p>
          </table:table-cell>
        </table:table-row>
        <table:table-row>
          <table:table-cell table:style-name="Cell">
            <text:p text:style-name="Body"><text:span>B</text:span></text:p>
          </table:table-cell>
          <table:table-cell table:style-name="Cell">
            <text:p text:style-name="Body"><text:span>8,60</text:span></text:p>
          </table:table-cell>
        </table:table-row>
        <table:table-row>
          <table:table-cell table:style-name="Cell">
            <text:p text:style-name="Body"><text:span>C</text:span></text:p>
          </table:table-cell>
          <table:table-cell table:style-name="Cell">
            <text:p text:style-name="Body"><text:span>9,00</text:span></text:p>
          </table:table-cell>
        </table:table-row>
        <table:table-row>
          <table:table-cell table:style-name="Cell">
            <text:p text:style-name="Body"><text:span>D</text:span></text:p>
          </table:table-cell>
          <table:table-cell table:style-name="Cell">
            <text:p text:style-name="Body"><text:span>9,00</text:span></text:p>
          </table:table-cell>
        </table:table-row>
      </table:table>
      <text:p text:style-name="Body"><text:span>Лучшая: </text:span><text:span text:style-name="Bold">A</text:span><text:span> (8,40)</text:span></text:p>
      <text:p text:style-name="Body"><text:span text:style-name="Bold">2. Критерий Вальда</text:span><text:span> (minimax — для каждой альтернативы берём max затрат, выбираем min):</text:span></text:p>
      <table:table table:style-name="Table">
        <table:table-column table:style-name="Col"/>
        <table:table-column table:style-name="Col"/>
        <table:table-row>
          <table:table-cell table:style-name="HeaderCell">
            <text:p text:style-name="Body"><text:span>Проект</text:span></text:p>
          </table:table-cell>
          <table:table-cell table:style-name="HeaderCell">
            <text:p text:style-name="Body"><text:span>max(ai)</text:span></text:p>
          </table:table-cell>
        </table:table-row>
        <table:table-row>
          <table:table-cell table:style-name="Cell">
            <text:p text:style-name="Body"><text:span>A</text:span></text:p>
          </table:table-cell>
          <table:table-cell table:style-name="Cell">
            <text:p text:style-name="Body"><text:span>12</text:span></text:p>
          </table:table-cell>
        </table:table-row>
        <table:table-row>
          <table:table-cell table:style-name="Cell">
            <text:p text:style-name="Body"><text:span text:style-name="Bold">B</text:span></text:p>
          </table:table-cell>
          <table:table-cell table:style-name="Cell">
            <text:p text:style-name="Body"><text:span text:style-name="Bold">10</text:span></text:p>
          </table:table-cell>
        </table:table-row>
        <table:table-row>
          <table:table-cell table:style-name="Cell">
            <text:p text:style-name="Body"><text:span>C</text:span></text:p>
          </table:table-cell>
          <table:table-cell table:style-name="Cell">
            <text:p text:style-name="Body"><text:span>15</text:span></text:p>
          </table:table-cell>
        </table:table-row>
        <table:table-row>
          <table:table-cell table:style-name="Cell">
            <text:p text:style-name="Body"><text:span>D</text:span></text:p>
          </table:table-cell>
          <table:table-cell table:style-name="Cell">
            <text:p text:style-name="Body"><text:span>11</text:span></text:p>
          </table:table-cell>
        </table:table-row>
      </table:table>
      <text:p text:style-name="Body"><text:span>Лучшая: </text:span><text:span text:style-name="Bold">B</text:span><text:span> (10)</text:span></text:p>
      <text:p text:style-name="Body"><text:span text:style-name="Bold">3. Критерий максимального оптимизма</text:span><text:span> (для минимизации — берём min затрат):</text:span></text:p>
      <table:table table:style-name="Table">
        <table:table-column table:style-name="Col"/>
        <table:table-column table:style-name="Col"/>
        <table:table-row>
          <table:table-cell table:style-name="HeaderCell">
            <text:p text:style-name="Body"><text:span>Проект</text:span></text:p>
          </table:table-cell>
          <table:table-cell table:style-name="HeaderCell">
            <text:p text:style-name="Body"><text:span>min(ai)</text:span></text:p>
          </table:table-cell>
        </table:table-row>
        <table:table-row>
          <table:table-cell table:style-name="Cell">
            <text:p text:style-name="Body"><text:span text:style-name="Bold">A</text:span></text:p>
          </table:table-cell>
          <table:table-cell table:style-name="Cell">
            <text:p text:style-name="Body"><text:span text:style-name="Bold">5</text:span></text:p>
          </table:table-cell>
        </table:table-row>
        <table:table-row>
          <table:table-cell table:style-name="Cell">
            <text:p text:style-name="Body"><text:span>B</text:span></text:p>
          </table:table-cell>
          <table:table-cell table:style-name="Cell">
            <text:p text:style-name="Body"><text:span>7</text:span></text:p>
          </table:table-cell>
        </table:table-row>
        <table:table-row>
          <table:table-cell table:style-name="Cell">
            <text:p text:style-name="Body"><text:span>C</text:span></text:p>
          </table:table-cell>
          <table:table-cell table:style-name="Cell">
            <text:p text:style-name="Body"><text:span>6</text:span></text:p>
          </table:table-cell>
        </table:table-row>
        <table:table-row>
          <table:table-cell table:style-name="Cell">
            <text:p text:style-name="Body"><text:span>D</text:span></text:p>
          </table:table-cell>
          <table:table-cell table:style-name="Cell">
            <text:p text:style-name="Body"><text:span>7</text:span></text:p>
          </table:table-cell>
        </table:table-row>
      </table:table>
      <text:p text:style-name="Body"><text:span>Лучшая: </text:span><text:span text:style-name="Bold">A</text:span><text:span> (5)</text:span></text:p>
      <text:p text:style-name="Body"><text:span text:style-name="Bold">4. Критерий Сэвиджа</text:span><text:span> (матрица рисков для минимизации: элемент - min столбца):</text:span></text:p>
      <table:table table:style-name="Table"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/>
          </table:table-cell>
          <table:table-cell table:style-name="HeaderCell">
            <text:p text:style-name="Body"><text:span>S1</text:span></text:p>
          </table:table-cell>
          <table:table-cell table:style-name="HeaderCell">
            <text:p text:style-name="Body"><text:span>S2</text:span></text:p>
          </table:table-cell>
          <table:table-cell table:style-name="HeaderCell">
            <text:p text:style-name="Body"><text:span>S3</text:span></text:p>
          </table:table-cell>
          <table:table-cell table:style-name="HeaderCell">
            <text:p text:style-name="Body"><text:span>S4</text:span></text:p>
          </table:table-cell>
          <table:table-cell table:style-name="HeaderCell">
            <text:p text:style-name="Body"><text:span>S5</text:span></text:p>
          </table:table-cell>
          <table:table-cell table:style-name="HeaderCell">
            <text:p text:style-name="Body"><text:span>max(risk)</text:span></text:p>
          </table:table-cell>
        </table:table-row>
        <table:table-row>
          <table:table-cell table:style-name="Cell">
            <text:p text:style-name="Body"><text:span>A</text:span></text:p>
          </table:table-cell>
          <table:table-cell table:style-name="Cell">
            <text:p text:style-name="Body"><text:span>1</text:span></text:p>
          </table:table-cell>
          <table:table-cell table:style-name="Cell">
            <text:p text:style-name="Body"><text:span>4</text:span></text:p>
          </table:table-cell>
          <table:table-cell table:style-name="Cell">
            <text:p text:style-name="Body"><text:span>1</text:span></text:p>
          </table:table-cell>
          <table:table-cell table:style-name="Cell">
            <text:p text:style-name="Body"><text:span>2</text:span></text:p>
          </table:table-cell>
          <table:table-cell table:style-name="Cell">
            <text:p text:style-name="Body"><text:span>0</text:span></text:p>
          </table:table-cell>
          <table:table-cell table:style-name="Cell">
            <text:p text:style-name="Body"><text:span>4</text:span></text:p>
          </table:table-cell>
        </table:table-row>
        <table:table-row>
          <table:table-cell table:style-name="Cell">
            <text:p text:style-name="Body"><text:span>B</text:span></text:p>
          </table:table-cell>
          <table:table-cell table:style-name="Cell">
            <text:p text:style-name="Body"><text:span>3</text:span></text:p>
          </table:table-cell>
          <table:table-cell table:style-name="Cell">
            <text:p text:style-name="Body"><text:span>2</text:span></text:p>
          </table:table-cell>
          <table:table-cell table:style-name="Cell">
            <text:p text:style-name="Body"><text:span>0</text:span></text:p>
          </table:table-cell>
          <table:table-cell table:style-name="Cell">
            <text:p text:style-name="Body"><text:span>0</text:span></text:p>
          </table:table-cell>
          <table:table-cell table:style-name="Cell">
            <text:p text:style-name="Body"><text:span>4</text:span></text:p>
          </table:table-cell>
          <table:table-cell table:style-name="Cell">
            <text:p text:style-name="Body"><text:span>4</text:span></text:p>
          </table:table-cell>
        </table:table-row>
        <table:table-row>
          <table:table-cell table:style-name="Cell">
            <text:p text:style-name="Body"><text:span>C</text:span></text:p>
          </table:table-cell>
          <table:table-cell table:style-name="Cell">
            <text:p text:style-name="Body"><text:span>0</text:span></text:p>
          </table:table-cell>
          <table:table-cell table:style-name="Cell">
            <text:p text:style-name="Body"><text:span>0</text:span></text:p>
          </table:table-cell>
          <table:table-cell table:style-name="Cell">
            <text:p text:style-name="Body"><text:span>8</text:span></text:p>
          </table:table-cell>
          <table:table-cell table:style-name="Cell">
            <text:p text:style-name="Body"><text:span>1</text:span></text:p>
          </table:table-cell>
          <table:table-cell table:style-name="Cell">
            <text:p text:style-name="Body"><text:span>2</text:span></text:p>
          </table:table-cell>
          <table:table-cell table:style-name="Cell">
            <text:p text:style-name="Body"><text:span>8</text:span></text:p>
          </table:table-cell>
        </table:table-row>
        <table:table-row>
          <table:table-cell table:style-name="Cell">
            <text:p text:style-name="Body"><text:span text:style-name="Bold">D</text:span></text:p>
          </table:table-cell>
          <table:table-cell table:style-name="Cell">
            <text:p text:style-name="Body"><text:span text:style-name="Bold">3</text:span></text:p>
          </table:table-cell>
          <table:table-cell table:style-name="Cell">
            <text:p text:style-name="Body"><text:span text:style-name="Bold">2</text:span></text:p>
          </table:table-cell>
          <table:table-cell table:style-name="Cell">
            <text:p text:style-name="Body"><text:span text:style-name="Bold">1</text:span></text:p>
          </table:table-cell>
          <table:table-cell table:style-name="Cell">
            <text:p text:style-name="Body"><text:span text:style-name="Bold">3</text:span></text:p>
          </table:table-cell>
          <table:table-cell table:style-name="Cell">
            <text:p text:style-name="Body"><text:span text:style-name="Bold">2</text:span></text:p>
          </table:table-cell>
          <table:table-cell table:style-name="Cell">
            <text:p text:style-name="Body"><text:span text:style-name="Bold">3</text:span></text:p>
          </table:table-cell>
        </table:table-row>
      </table:table>
      <text:p text:style-name="Body"><text:span>Лучшая: </text:span><text:span text:style-name="Bold">D</text:span><text:span> (минимальный max риск = 3)</text:span></text:p>
      <text:p text:style-name="Body"><text:span text:style-name="Bold">5. Критерий Гурвица</text:span><text:span> (alpha = 0,6, для минимизации):</text:span></text:p>
      <text:p text:style-name="Body"><text:span>H = alpha × min(ai) + (1-alpha) × max(ai)</text:span></text:p>
      <table:table table:style-name="Table">
        <table:table-column table:style-name="Col"/>
        <table:table-column table:style-name="Col"/>
        <table:table-column table:style-name="Col"/>
        <table:table-row>
          <table:table-cell table:style-name="HeaderCell">
            <text:p text:style-name="Body"><text:span>Проект</text:span></text:p>
          </table:table-cell>
          <table:table-cell table:style-name="HeaderCell">
            <text:p text:style-name="Body"><text:span>Расчёт</text:span></text:p>
          </table:table-cell>
          <table:table-cell table:style-name="HeaderCell">
            <text:p text:style-name="Body"><text:span>H</text:span></text:p>
          </table:table-cell>
        </table:table-row>
        <table:table-row>
          <table:table-cell table:style-name="Cell">
            <text:p text:style-name="Body"><text:span text:style-name="Bold">A</text:span></text:p>
          </table:table-cell>
          <table:table-cell table:style-name="Cell">
            <text:p text:style-name="Body"><text:span text:style-name="Bold">0,6×5 + 0,4×12</text:span></text:p>
          </table:table-cell>
          <table:table-cell table:style-name="Cell">
            <text:p text:style-name="Body"><text:span text:style-name="Bold">7,8</text:span></text:p>
          </table:table-cell>
        </table:table-row>
        <table:table-row>
          <table:table-cell table:style-name="Cell">
            <text:p text:style-name="Body"><text:span>B</text:span></text:p>
          </table:table-cell>
          <table:table-cell table:style-name="Cell">
            <text:p text:style-name="Body"><text:span>0,6×7 + 0,4×10</text:span></text:p>
          </table:table-cell>
          <table:table-cell table:style-name="Cell">
            <text:p text:style-name="Body"><text:span>8,2</text:span></text:p>
          </table:table-cell>
        </table:table-row>
        <table:table-row>
          <table:table-cell table:style-name="Cell">
            <text:p text:style-name="Body"><text:span>C</text:span></text:p>
          </table:table-cell>
          <table:table-cell table:style-name="Cell">
            <text:p text:style-name="Body"><text:span>0,6×6 + 0,4×15</text:span></text:p>
          </table:table-cell>
          <table:table-cell table:style-name="Cell">
            <text:p text:style-name="Body"><text:span>9,6</text:span></text:p>
          </table:table-cell>
        </table:table-row>
        <table:table-row>
          <table:table-cell table:style-name="Cell">
            <text:p text:style-name="Body"><text:span>D</text:span></text:p>
          </table:table-cell>
          <table:table-cell table:style-name="Cell">
            <text:p text:style-name="Body"><text:span>0,6×7 + 0,4×11</text:span></text:p>
          </table:table-cell>
          <table:table-cell table:style-name="Cell">
            <text:p text:style-name="Body"><text:span>8,6</text:span></text:p>
          </table:table-cell>
        </table:table-row>
      </table:table>
      <text:p text:style-name="Body"><text:span>Лучшая: </text:span><text:span text:style-name="Bold">A</text:span><text:span> (7,8)</text:span></text:p>
      <text:h text:outline-level="4" text:style-name="H4">Ответ</text:h>
      <table:table table:style-name="Table">
        <table:table-column table:style-name="Col"/>
        <table:table-column table:style-name="Col"/>
        <table:table-row>
          <table:table-cell table:style-name="HeaderCell">
            <text:p text:style-name="Body"><text:span>Критерий</text:span></text:p>
          </table:table-cell>
          <table:table-cell table:style-name="HeaderCell">
            <text:p text:style-name="Body"><text:span>Лучший проект</text:span></text:p>
          </table:table-cell>
        </table:table-row>
        <table:table-row>
          <table:table-cell table:style-name="Cell">
            <text:p text:style-name="Body"><text:span>Лаплас</text:span></text:p>
          </table:table-cell>
          <table:table-cell table:style-name="Cell">
            <text:p text:style-name="Body"><text:span>A</text:span></text:p>
          </table:table-cell>
        </table:table-row>
        <table:table-row>
          <table:table-cell table:style-name="Cell">
            <text:p text:style-name="Body"><text:span>Вальд</text:span></text:p>
          </table:table-cell>
          <table:table-cell table:style-name="Cell">
            <text:p text:style-name="Body"><text:span>B</text:span></text:p>
          </table:table-cell>
        </table:table-row>
        <table:table-row>
          <table:table-cell table:style-name="Cell">
            <text:p text:style-name="Body"><text:span>Макс. оптимизм</text:span></text:p>
          </table:table-cell>
          <table:table-cell table:style-name="Cell">
            <text:p text:style-name="Body"><text:span>A</text:span></text:p>
          </table:table-cell>
        </table:table-row>
        <table:table-row>
          <table:table-cell table:style-name="Cell">
            <text:p text:style-name="Body"><text:span>Сэвидж</text:span></text:p>
          </table:table-cell>
          <table:table-cell table:style-name="Cell">
            <text:p text:style-name="Body"><text:span>D</text:span></text:p>
          </table:table-cell>
        </table:table-row>
        <table:table-row>
          <table:table-cell table:style-name="Cell">
            <text:p text:style-name="Body"><text:span>Гурвиц (alpha=0,6)</text:span></text:p>
          </table:table-cell>
          <table:table-cell table:style-name="Cell">
            <text:p text:style-name="Body"><text:span>A</text:span></text:p>
          </table:table-cell>
        </table:table-row>
      </table:table>
      <text:p text:style-name="Body"><text:span>Большинство критериев (3 из 5) указывают на проект </text:span><text:span text:style-name="Bold">A</text:span><text:span>.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H1" style:family="paragraph" style:display-name="H1">
      <style:text-properties fo:font-size="18pt" fo:font-weight="bold"/>
    </style:style>
    <style:style style:name="H2" style:family="paragraph" style:display-name="H2">
      <style:text-properties fo:font-size="14pt" fo:font-weight="bold"/>
    </style:style>
    <style:style style:name="H3" style:family="paragraph" style:display-name="H3">
      <style:text-properties fo:font-size="12pt" fo:font-weight="bold"/>
    </style:style>
    <style:style style:name="H4" style:family="paragraph" style:display-name="H4">
      <style:text-properties fo:font-size="11pt" fo:font-weight="bold"/>
    </style:style>
    <style:style style:name="Body" style:family="paragraph" style:display-name="Body">
      <style:text-properties fo:font-size="11pt"/>
    </style:style>
    <style:style style:name="Bold" style:family="text" style:display-name="Bold"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