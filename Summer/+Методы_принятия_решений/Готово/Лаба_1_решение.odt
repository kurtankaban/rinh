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Col" style:family="table-column" style:display-name="Col">
      <style:table-column-properties style:column-width="3.2cm"/>
    </style:style>
    <style:style style:name="Cell" style:family="table-cell" style:display-name="Cell">
      <style:table-cell-properties fo:border="0.05pt solid #000000" fo:padding="0.08cm"/>
    </style:style>
    <style:style style:name="HeaderCell" style:family="table-cell" style:display-name="HeaderCell">
      <style:table-cell-properties fo:border="0.05pt solid #000000" fo:padding="0.08cm" fo:background-color="#E8E8E8"/>
    </style:style>
    <style:style style:name="Table" style:family="table" style:display-name="Table"/>
  </office:automatic-styles>
  <office:body>
    <office:text>
      <text:h text:outline-level="1" text:style-name="H1">Лабораторная работа 1. Многокритериальные задачи оптимизации</text:h>
      <text:h text:outline-level="2" text:style-name="H2">Задание 1. Выбор адвоката (взвешенная сумма)</text:h>
      <text:p text:style-name="Body"><text:span text:style-name="Bold">Условие:</text:span><text:span> ЛПР выбирает адвоката из 4 кандидатов (А1-А4) по 4 критериям: Стоимость (К1), Авторитет (К2), Репутация (К3), Специализация (К4). Оценки по 10-балльной шкале.</text:span></text:p>
      <text:h text:outline-level="3" text:style-name="H3">Исходные данные</text:h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><text:span>Альтернатива</text:span></text:p>
          </table:table-cell>
          <table:table-cell table:style-name="HeaderCell">
            <text:p text:style-name="Body"><text:span>К1</text:span></text:p>
          </table:table-cell>
          <table:table-cell table:style-name="HeaderCell">
            <text:p text:style-name="Body"><text:span>К2</text:span></text:p>
          </table:table-cell>
          <table:table-cell table:style-name="HeaderCell">
            <text:p text:style-name="Body"><text:span>К3</text:span></text:p>
          </table:table-cell>
          <table:table-cell table:style-name="HeaderCell">
            <text:p text:style-name="Body"><text:span>К4</text:span></text:p>
          </table:table-cell>
        </table:table-row>
        <table:table-row>
          <table:table-cell table:style-name="Cell">
            <text:p text:style-name="Body"><text:span>А1</text:span></text:p>
          </table:table-cell>
          <table:table-cell table:style-name="Cell">
            <text:p text:style-name="Body"><text:span>3</text:span></text:p>
          </table:table-cell>
          <table:table-cell table:style-name="Cell">
            <text:p text:style-name="Body"><text:span>7</text:span></text:p>
          </table:table-cell>
          <table:table-cell table:style-name="Cell">
            <text:p text:style-name="Body"><text:span>2</text:span></text:p>
          </table:table-cell>
          <table:table-cell table:style-name="Cell">
            <text:p text:style-name="Body"><text:span>9</text:span></text:p>
          </table:table-cell>
        </table:table-row>
        <table:table-row>
          <table:table-cell table:style-name="Cell">
            <text:p text:style-name="Body"><text:span>А2</text:span></text:p>
          </table:table-cell>
          <table:table-cell table:style-name="Cell">
            <text:p text:style-name="Body"><text:span>8</text:span></text:p>
          </table:table-cell>
          <table:table-cell table:style-name="Cell">
            <text:p text:style-name="Body"><text:span>3</text:span></text:p>
          </table:table-cell>
          <table:table-cell table:style-name="Cell">
            <text:p text:style-name="Body"><text:span>6</text:span></text:p>
          </table:table-cell>
          <table:table-cell table:style-name="Cell">
            <text:p text:style-name="Body"><text:span>7</text:span></text:p>
          </table:table-cell>
        </table:table-row>
        <table:table-row>
          <table:table-cell table:style-name="Cell">
            <text:p text:style-name="Body"><text:span>А3</text:span></text:p>
          </table:table-cell>
          <table:table-cell table:style-name="Cell">
            <text:p text:style-name="Body"><text:span>4</text:span></text:p>
          </table:table-cell>
          <table:table-cell table:style-name="Cell">
            <text:p text:style-name="Body"><text:span>8</text:span></text:p>
          </table:table-cell>
          <table:table-cell table:style-name="Cell">
            <text:p text:style-name="Body"><text:span>3</text:span></text:p>
          </table:table-cell>
          <table:table-cell table:style-name="Cell">
            <text:p text:style-name="Body"><text:span>5</text:span></text:p>
          </table:table-cell>
        </table:table-row>
        <table:table-row>
          <table:table-cell table:style-name="Cell">
            <text:p text:style-name="Body"><text:span>А4</text:span></text:p>
          </table:table-cell>
          <table:table-cell table:style-name="Cell">
            <text:p text:style-name="Body"><text:span>9</text:span></text:p>
          </table:table-cell>
          <table:table-cell table:style-name="Cell">
            <text:p text:style-name="Body"><text:span>6</text:span></text:p>
          </table:table-cell>
          <table:table-cell table:style-name="Cell">
            <text:p text:style-name="Body"><text:span>5</text:span></text:p>
          </table:table-cell>
          <table:table-cell table:style-name="Cell">
            <text:p text:style-name="Body"><text:span>4</text:span></text:p>
          </table:table-cell>
        </table:table-row>
        <table:table-row>
          <table:table-cell table:style-name="Cell">
            <text:p text:style-name="Body"><text:span text:style-name="Bold">Вес</text:span></text:p>
          </table:table-cell>
          <table:table-cell table:style-name="Cell">
            <text:p text:style-name="Body"><text:span text:style-name="Bold">8</text:span></text:p>
          </table:table-cell>
          <table:table-cell table:style-name="Cell">
            <text:p text:style-name="Body"><text:span text:style-name="Bold">9</text:span></text:p>
          </table:table-cell>
          <table:table-cell table:style-name="Cell">
            <text:p text:style-name="Body"><text:span text:style-name="Bold">6</text:span></text:p>
          </table:table-cell>
          <table:table-cell table:style-name="Cell">
            <text:p text:style-name="Body"><text:span text:style-name="Bold">7</text:span></text:p>
          </table:table-cell>
        </table:table-row>
      </table:table>
      <text:h text:outline-level="3" text:style-name="H3">Решение</text:h>
      <text:p text:style-name="Body"><text:span>Все оценки в одной размерности (10-балльная шкала), поэтому применяем метод взвешенной суммы без нормализации.</text:span></text:p>
      <text:p text:style-name="Body"><text:span>Функция полезности: F(Ai) = Sum(aij * wj)</text:span></text:p>
      <table:table table:style-name="Table"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><text:span>Альтернатива</text:span></text:p>
          </table:table-cell>
          <table:table-cell table:style-name="HeaderCell">
            <text:p text:style-name="Body"><text:span>Расчёт</text:span></text:p>
          </table:table-cell>
          <table:table-cell table:style-name="HeaderCell">
            <text:p text:style-name="Body"><text:span>F</text:span></text:p>
          </table:table-cell>
        </table:table-row>
        <table:table-row>
          <table:table-cell table:style-name="Cell">
            <text:p text:style-name="Body"><text:span>А1</text:span></text:p>
          </table:table-cell>
          <table:table-cell table:style-name="Cell">
            <text:p text:style-name="Body"><text:span>3×8 + 7×9 + 2×6 + 9×7</text:span></text:p>
          </table:table-cell>
          <table:table-cell table:style-name="Cell">
            <text:p text:style-name="Body"><text:span text:style-name="Bold">162</text:span></text:p>
          </table:table-cell>
        </table:table-row>
        <table:table-row>
          <table:table-cell table:style-name="Cell">
            <text:p text:style-name="Body"><text:span>А2</text:span></text:p>
          </table:table-cell>
          <table:table-cell table:style-name="Cell">
            <text:p text:style-name="Body"><text:span>8×8 + 3×9 + 6×6 + 7×7</text:span></text:p>
          </table:table-cell>
          <table:table-cell table:style-name="Cell">
            <text:p text:style-name="Body"><text:span text:style-name="Bold">176</text:span></text:p>
          </table:table-cell>
        </table:table-row>
        <table:table-row>
          <table:table-cell table:style-name="Cell">
            <text:p text:style-name="Body"><text:span>А3</text:span></text:p>
          </table:table-cell>
          <table:table-cell table:style-name="Cell">
            <text:p text:style-name="Body"><text:span>4×8 + 8×9 + 3×6 + 5×7</text:span></text:p>
          </table:table-cell>
          <table:table-cell table:style-name="Cell">
            <text:p text:style-name="Body"><text:span text:style-name="Bold">157</text:span></text:p>
          </table:table-cell>
        </table:table-row>
        <table:table-row>
          <table:table-cell table:style-name="Cell">
            <text:p text:style-name="Body"><text:span>А4</text:span></text:p>
          </table:table-cell>
          <table:table-cell table:style-name="Cell">
            <text:p text:style-name="Body"><text:span>9×8 + 6×9 + 5×6 + 4×7</text:span></text:p>
          </table:table-cell>
          <table:table-cell table:style-name="Cell">
            <text:p text:style-name="Body"><text:span text:style-name="Bold">184</text:span></text:p>
          </table:table-cell>
        </table:table-row>
      </table:table>
      <text:h text:outline-level="3" text:style-name="H3">Ответ</text:h>
      <text:p text:style-name="Body"><text:span>Максимальная функция полезности F = 184 у альтернативы </text:span><text:span text:style-name="Bold">А4</text:span><text:span>. Следовательно, лучший адвокат — </text:span><text:span text:style-name="Bold">А4</text:span><text:span>.</text:span></text:p>
      <text:p text:style-name="Body"/>
      <text:h text:outline-level="2" text:style-name="H2">Задание 2. Найм юриста (нормализация)</text:h>
      <text:p text:style-name="Body"><text:span text:style-name="Bold">Условие:</text:span><text:span> Директор выбирает юриста из 5 кандидатов по 5 критериям с разными размерностями.</text:span></text:p>
      <text:h text:outline-level="3" text:style-name="H3">Исходные данные</text:h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><text:span>Альтернатива</text:span></text:p>
          </table:table-cell>
          <table:table-cell table:style-name="HeaderCell">
            <text:p text:style-name="Body"><text:span>К1 (Образование, max)</text:span></text:p>
          </table:table-cell>
          <table:table-cell table:style-name="HeaderCell">
            <text:p text:style-name="Body"><text:span>К2 (Зарплата, min)</text:span></text:p>
          </table:table-cell>
          <table:table-cell table:style-name="HeaderCell">
            <text:p text:style-name="Body"><text:span>К3 (Стаж, max)</text:span></text:p>
          </table:table-cell>
          <table:table-cell table:style-name="HeaderCell">
            <text:p text:style-name="Body"><text:span>К4 (Доля выигранных дел, max)</text:span></text:p>
          </table:table-cell>
          <table:table-cell table:style-name="HeaderCell">
            <text:p text:style-name="Body"><text:span>К5 (Авторитет, max)</text:span></text:p>
          </table:table-cell>
        </table:table-row>
        <table:table-row>
          <table:table-cell table:style-name="Cell">
            <text:p text:style-name="Body"><text:span>А1</text:span></text:p>
          </table:table-cell>
          <table:table-cell table:style-name="Cell">
            <text:p text:style-name="Body"><text:span>85</text:span></text:p>
          </table:table-cell>
          <table:table-cell table:style-name="Cell">
            <text:p text:style-name="Body"><text:span>30</text:span></text:p>
          </table:table-cell>
          <table:table-cell table:style-name="Cell">
            <text:p text:style-name="Body"><text:span>22</text:span></text:p>
          </table:table-cell>
          <table:table-cell table:style-name="Cell">
            <text:p text:style-name="Body"><text:span>0,65</text:span></text:p>
          </table:table-cell>
          <table:table-cell table:style-name="Cell">
            <text:p text:style-name="Body"><text:span>6</text:span></text:p>
          </table:table-cell>
        </table:table-row>
        <table:table-row>
          <table:table-cell table:style-name="Cell">
            <text:p text:style-name="Body"><text:span>А2</text:span></text:p>
          </table:table-cell>
          <table:table-cell table:style-name="Cell">
            <text:p text:style-name="Body"><text:span>60</text:span></text:p>
          </table:table-cell>
          <table:table-cell table:style-name="Cell">
            <text:p text:style-name="Body"><text:span>20</text:span></text:p>
          </table:table-cell>
          <table:table-cell table:style-name="Cell">
            <text:p text:style-name="Body"><text:span>10</text:span></text:p>
          </table:table-cell>
          <table:table-cell table:style-name="Cell">
            <text:p text:style-name="Body"><text:span>0,60</text:span></text:p>
          </table:table-cell>
          <table:table-cell table:style-name="Cell">
            <text:p text:style-name="Body"><text:span>7</text:span></text:p>
          </table:table-cell>
        </table:table-row>
        <table:table-row>
          <table:table-cell table:style-name="Cell">
            <text:p text:style-name="Body"><text:span>А3</text:span></text:p>
          </table:table-cell>
          <table:table-cell table:style-name="Cell">
            <text:p text:style-name="Body"><text:span>30</text:span></text:p>
          </table:table-cell>
          <table:table-cell table:style-name="Cell">
            <text:p text:style-name="Body"><text:span>12</text:span></text:p>
          </table:table-cell>
          <table:table-cell table:style-name="Cell">
            <text:p text:style-name="Body"><text:span>5</text:span></text:p>
          </table:table-cell>
          <table:table-cell table:style-name="Cell">
            <text:p text:style-name="Body"><text:span>0,45</text:span></text:p>
          </table:table-cell>
          <table:table-cell table:style-name="Cell">
            <text:p text:style-name="Body"><text:span>5</text:span></text:p>
          </table:table-cell>
        </table:table-row>
        <table:table-row>
          <table:table-cell table:style-name="Cell">
            <text:p text:style-name="Body"><text:span>А4</text:span></text:p>
          </table:table-cell>
          <table:table-cell table:style-name="Cell">
            <text:p text:style-name="Body"><text:span>75</text:span></text:p>
          </table:table-cell>
          <table:table-cell table:style-name="Cell">
            <text:p text:style-name="Body"><text:span>24</text:span></text:p>
          </table:table-cell>
          <table:table-cell table:style-name="Cell">
            <text:p text:style-name="Body"><text:span>13</text:span></text:p>
          </table:table-cell>
          <table:table-cell table:style-name="Cell">
            <text:p text:style-name="Body"><text:span>0,70</text:span></text:p>
          </table:table-cell>
          <table:table-cell table:style-name="Cell">
            <text:p text:style-name="Body"><text:span>8</text:span></text:p>
          </table:table-cell>
        </table:table-row>
        <table:table-row>
          <table:table-cell table:style-name="Cell">
            <text:p text:style-name="Body"><text:span>А5</text:span></text:p>
          </table:table-cell>
          <table:table-cell table:style-name="Cell">
            <text:p text:style-name="Body"><text:span>40</text:span></text:p>
          </table:table-cell>
          <table:table-cell table:style-name="Cell">
            <text:p text:style-name="Body"><text:span>15</text:span></text:p>
          </table:table-cell>
          <table:table-cell table:style-name="Cell">
            <text:p text:style-name="Body"><text:span>7</text:span></text:p>
          </table:table-cell>
          <table:table-cell table:style-name="Cell">
            <text:p text:style-name="Body"><text:span>0,55</text:span></text:p>
          </table:table-cell>
          <table:table-cell table:style-name="Cell">
            <text:p text:style-name="Body"><text:span>7</text:span></text:p>
          </table:table-cell>
        </table:table-row>
        <table:table-row>
          <table:table-cell table:style-name="Cell">
            <text:p text:style-name="Body"><text:span text:style-name="Bold">Вес</text:span></text:p>
          </table:table-cell>
          <table:table-cell table:style-name="Cell">
            <text:p text:style-name="Body"><text:span text:style-name="Bold">7</text:span></text:p>
          </table:table-cell>
          <table:table-cell table:style-name="Cell">
            <text:p text:style-name="Body"><text:span text:style-name="Bold">5</text:span></text:p>
          </table:table-cell>
          <table:table-cell table:style-name="Cell">
            <text:p text:style-name="Body"><text:span text:style-name="Bold">6</text:span></text:p>
          </table:table-cell>
          <table:table-cell table:style-name="Cell">
            <text:p text:style-name="Body"><text:span text:style-name="Bold">8</text:span></text:p>
          </table:table-cell>
          <table:table-cell table:style-name="Cell">
            <text:p text:style-name="Body"><text:span text:style-name="Bold">6</text:span></text:p>
          </table:table-cell>
        </table:table-row>
      </table:table>
      <text:h text:outline-level="3" text:style-name="H3">Решение</text:h>
      <text:p text:style-name="Body"><text:span>Поскольку критерии имеют разные размерности, необходима нормализация.</text:span></text:p>
      <text:p text:style-name="Body"><text:span>Для максимизируемых критериев: u = (x - min) / (max - min)</text:span></text:p>
      <text:p text:style-name="Body"><text:span>Для минимизируемых критериев: u = (max - x) / (max - min)</text:span></text:p>
      <text:p text:style-name="Body"><text:span text:style-name="Bold">Нормализованная матрица:</text:span></text:p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><text:span>Альтернатива</text:span></text:p>
          </table:table-cell>
          <table:table-cell table:style-name="HeaderCell">
            <text:p text:style-name="Body"><text:span>К1</text:span></text:p>
          </table:table-cell>
          <table:table-cell table:style-name="HeaderCell">
            <text:p text:style-name="Body"><text:span>К2</text:span></text:p>
          </table:table-cell>
          <table:table-cell table:style-name="HeaderCell">
            <text:p text:style-name="Body"><text:span>К3</text:span></text:p>
          </table:table-cell>
          <table:table-cell table:style-name="HeaderCell">
            <text:p text:style-name="Body"><text:span>К4</text:span></text:p>
          </table:table-cell>
          <table:table-cell table:style-name="HeaderCell">
            <text:p text:style-name="Body"><text:span>К5</text:span></text:p>
          </table:table-cell>
        </table:table-row>
        <table:table-row>
          <table:table-cell table:style-name="Cell">
            <text:p text:style-name="Body"><text:span>А1</text:span></text:p>
          </table:table-cell>
          <table:table-cell table:style-name="Cell">
            <text:p text:style-name="Body"><text:span>1,000</text:span></text:p>
          </table:table-cell>
          <table:table-cell table:style-name="Cell">
            <text:p text:style-name="Body"><text:span>0,000</text:span></text:p>
          </table:table-cell>
          <table:table-cell table:style-name="Cell">
            <text:p text:style-name="Body"><text:span>1,000</text:span></text:p>
          </table:table-cell>
          <table:table-cell table:style-name="Cell">
            <text:p text:style-name="Body"><text:span>0,800</text:span></text:p>
          </table:table-cell>
          <table:table-cell table:style-name="Cell">
            <text:p text:style-name="Body"><text:span>0,333</text:span></text:p>
          </table:table-cell>
        </table:table-row>
        <table:table-row>
          <table:table-cell table:style-name="Cell">
            <text:p text:style-name="Body"><text:span>А2</text:span></text:p>
          </table:table-cell>
          <table:table-cell table:style-name="Cell">
            <text:p text:style-name="Body"><text:span>0,545</text:span></text:p>
          </table:table-cell>
          <table:table-cell table:style-name="Cell">
            <text:p text:style-name="Body"><text:span>0,556</text:span></text:p>
          </table:table-cell>
          <table:table-cell table:style-name="Cell">
            <text:p text:style-name="Body"><text:span>0,294</text:span></text:p>
          </table:table-cell>
          <table:table-cell table:style-name="Cell">
            <text:p text:style-name="Body"><text:span>0,600</text:span></text:p>
          </table:table-cell>
          <table:table-cell table:style-name="Cell">
            <text:p text:style-name="Body"><text:span>0,667</text:span></text:p>
          </table:table-cell>
        </table:table-row>
        <table:table-row>
          <table:table-cell table:style-name="Cell">
            <text:p text:style-name="Body"><text:span>А3</text:span></text:p>
          </table:table-cell>
          <table:table-cell table:style-name="Cell">
            <text:p text:style-name="Body"><text:span>0,000</text:span></text:p>
          </table:table-cell>
          <table:table-cell table:style-name="Cell">
            <text:p text:style-name="Body"><text:span>1,000</text:span></text:p>
          </table:table-cell>
          <table:table-cell table:style-name="Cell">
            <text:p text:style-name="Body"><text:span>0,000</text:span></text:p>
          </table:table-cell>
          <table:table-cell table:style-name="Cell">
            <text:p text:style-name="Body"><text:span>0,000</text:span></text:p>
          </table:table-cell>
          <table:table-cell table:style-name="Cell">
            <text:p text:style-name="Body"><text:span>0,000</text:span></text:p>
          </table:table-cell>
        </table:table-row>
        <table:table-row>
          <table:table-cell table:style-name="Cell">
            <text:p text:style-name="Body"><text:span>А4</text:span></text:p>
          </table:table-cell>
          <table:table-cell table:style-name="Cell">
            <text:p text:style-name="Body"><text:span>0,818</text:span></text:p>
          </table:table-cell>
          <table:table-cell table:style-name="Cell">
            <text:p text:style-name="Body"><text:span>0,333</text:span></text:p>
          </table:table-cell>
          <table:table-cell table:style-name="Cell">
            <text:p text:style-name="Body"><text:span>0,471</text:span></text:p>
          </table:table-cell>
          <table:table-cell table:style-name="Cell">
            <text:p text:style-name="Body"><text:span>1,000</text:span></text:p>
          </table:table-cell>
          <table:table-cell table:style-name="Cell">
            <text:p text:style-name="Body"><text:span>1,000</text:span></text:p>
          </table:table-cell>
        </table:table-row>
        <table:table-row>
          <table:table-cell table:style-name="Cell">
            <text:p text:style-name="Body"><text:span>А5</text:span></text:p>
          </table:table-cell>
          <table:table-cell table:style-name="Cell">
            <text:p text:style-name="Body"><text:span>0,182</text:span></text:p>
          </table:table-cell>
          <table:table-cell table:style-name="Cell">
            <text:p text:style-name="Body"><text:span>0,833</text:span></text:p>
          </table:table-cell>
          <table:table-cell table:style-name="Cell">
            <text:p text:style-name="Body"><text:span>0,118</text:span></text:p>
          </table:table-cell>
          <table:table-cell table:style-name="Cell">
            <text:p text:style-name="Body"><text:span>0,400</text:span></text:p>
          </table:table-cell>
          <table:table-cell table:style-name="Cell">
            <text:p text:style-name="Body"><text:span>0,667</text:span></text:p>
          </table:table-cell>
        </table:table-row>
      </table:table>
      <text:p text:style-name="Body"><text:span text:style-name="Bold">Функции полезности:</text:span></text:p>
      <table:table table:style-name="Table">
        <table:table-column table:style-name="Col"/>
        <table:table-column table:style-name="Col"/>
        <table:table-row>
          <table:table-cell table:style-name="HeaderCell">
            <text:p text:style-name="Body"><text:span>Альтернатива</text:span></text:p>
          </table:table-cell>
          <table:table-cell table:style-name="HeaderCell">
            <text:p text:style-name="Body"><text:span>F</text:span></text:p>
          </table:table-cell>
        </table:table-row>
        <table:table-row>
          <table:table-cell table:style-name="Cell">
            <text:p text:style-name="Body"><text:span>А1</text:span></text:p>
          </table:table-cell>
          <table:table-cell table:style-name="Cell">
            <text:p text:style-name="Body"><text:span>21,400</text:span></text:p>
          </table:table-cell>
        </table:table-row>
        <table:table-row>
          <table:table-cell table:style-name="Cell">
            <text:p text:style-name="Body"><text:span>А2</text:span></text:p>
          </table:table-cell>
          <table:table-cell table:style-name="Cell">
            <text:p text:style-name="Body"><text:span>17,161</text:span></text:p>
          </table:table-cell>
        </table:table-row>
        <table:table-row>
          <table:table-cell table:style-name="Cell">
            <text:p text:style-name="Body"><text:span>А3</text:span></text:p>
          </table:table-cell>
          <table:table-cell table:style-name="Cell">
            <text:p text:style-name="Body"><text:span>5,000</text:span></text:p>
          </table:table-cell>
        </table:table-row>
        <table:table-row>
          <table:table-cell table:style-name="Cell">
            <text:p text:style-name="Body"><text:span>А4</text:span></text:p>
          </table:table-cell>
          <table:table-cell table:style-name="Cell">
            <text:p text:style-name="Body"><text:span text:style-name="Bold">24,217</text:span></text:p>
          </table:table-cell>
        </table:table-row>
        <table:table-row>
          <table:table-cell table:style-name="Cell">
            <text:p text:style-name="Body"><text:span>А5</text:span></text:p>
          </table:table-cell>
          <table:table-cell table:style-name="Cell">
            <text:p text:style-name="Body"><text:span>13,345</text:span></text:p>
          </table:table-cell>
        </table:table-row>
      </table:table>
      <text:h text:outline-level="3" text:style-name="H3">Ответ</text:h>
      <text:p text:style-name="Body"><text:span>Максимальная функция полезности F = 24,217 у альтернативы </text:span><text:span text:style-name="Bold">А4</text:span><text:span>. Лучший кандидат — </text:span><text:span text:style-name="Bold">А4</text:span><text:span>.</text:span></text:p>
      <text:p text:style-name="Body"/>
      <text:h text:outline-level="2" text:style-name="H2">Задание 3. Выбор проекта сети (латентные переменные)</text:h>
      <text:p text:style-name="Body"><text:span text:style-name="Bold">Условие:</text:span><text:span> Выбрать лучший проект локальной сети из 5 вариантов по 5 критериям.</text:span></text:p>
      <text:h text:outline-level="3" text:style-name="H3">Исходные данные</text:h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><text:span>Проект</text:span></text:p>
          </table:table-cell>
          <table:table-cell table:style-name="HeaderCell">
            <text:p text:style-name="Body"><text:span>К1 (Пропуск. способность, max)</text:span></text:p>
          </table:table-cell>
          <table:table-cell table:style-name="HeaderCell">
            <text:p text:style-name="Body"><text:span>К2 (Стоимость, min)</text:span></text:p>
          </table:table-cell>
          <table:table-cell table:style-name="HeaderCell">
            <text:p text:style-name="Body"><text:span>К3 (Ресурс, max)</text:span></text:p>
          </table:table-cell>
          <table:table-cell table:style-name="HeaderCell">
            <text:p text:style-name="Body"><text:span>К4 (Безотказность, max)</text:span></text:p>
          </table:table-cell>
          <table:table-cell table:style-name="HeaderCell">
            <text:p text:style-name="Body"><text:span>К5 (Обслуживание, max)</text:span></text:p>
          </table:table-cell>
        </table:table-row>
        <table:table-row>
          <table:table-cell table:style-name="Cell">
            <text:p text:style-name="Body"><text:span>А1</text:span></text:p>
          </table:table-cell>
          <table:table-cell table:style-name="Cell">
            <text:p text:style-name="Body"><text:span>67</text:span></text:p>
          </table:table-cell>
          <table:table-cell table:style-name="Cell">
            <text:p text:style-name="Body"><text:span>29</text:span></text:p>
          </table:table-cell>
          <table:table-cell table:style-name="Cell">
            <text:p text:style-name="Body"><text:span>11</text:span></text:p>
          </table:table-cell>
          <table:table-cell table:style-name="Cell">
            <text:p text:style-name="Body"><text:span>0,85</text:span></text:p>
          </table:table-cell>
          <table:table-cell table:style-name="Cell">
            <text:p text:style-name="Body"><text:span>9</text:span></text:p>
          </table:table-cell>
        </table:table-row>
        <table:table-row>
          <table:table-cell table:style-name="Cell">
            <text:p text:style-name="Body"><text:span>А2</text:span></text:p>
          </table:table-cell>
          <table:table-cell table:style-name="Cell">
            <text:p text:style-name="Body"><text:span>33</text:span></text:p>
          </table:table-cell>
          <table:table-cell table:style-name="Cell">
            <text:p text:style-name="Body"><text:span>26</text:span></text:p>
          </table:table-cell>
          <table:table-cell table:style-name="Cell">
            <text:p text:style-name="Body"><text:span>14</text:span></text:p>
          </table:table-cell>
          <table:table-cell table:style-name="Cell">
            <text:p text:style-name="Body"><text:span>0,73</text:span></text:p>
          </table:table-cell>
          <table:table-cell table:style-name="Cell">
            <text:p text:style-name="Body"><text:span>6</text:span></text:p>
          </table:table-cell>
        </table:table-row>
        <table:table-row>
          <table:table-cell table:style-name="Cell">
            <text:p text:style-name="Body"><text:span>А3</text:span></text:p>
          </table:table-cell>
          <table:table-cell table:style-name="Cell">
            <text:p text:style-name="Body"><text:span>88</text:span></text:p>
          </table:table-cell>
          <table:table-cell table:style-name="Cell">
            <text:p text:style-name="Body"><text:span>11</text:span></text:p>
          </table:table-cell>
          <table:table-cell table:style-name="Cell">
            <text:p text:style-name="Body"><text:span>17</text:span></text:p>
          </table:table-cell>
          <table:table-cell table:style-name="Cell">
            <text:p text:style-name="Body"><text:span>0,81</text:span></text:p>
          </table:table-cell>
          <table:table-cell table:style-name="Cell">
            <text:p text:style-name="Body"><text:span>6</text:span></text:p>
          </table:table-cell>
        </table:table-row>
        <table:table-row>
          <table:table-cell table:style-name="Cell">
            <text:p text:style-name="Body"><text:span>А4</text:span></text:p>
          </table:table-cell>
          <table:table-cell table:style-name="Cell">
            <text:p text:style-name="Body"><text:span>73</text:span></text:p>
          </table:table-cell>
          <table:table-cell table:style-name="Cell">
            <text:p text:style-name="Body"><text:span>32</text:span></text:p>
          </table:table-cell>
          <table:table-cell table:style-name="Cell">
            <text:p text:style-name="Body"><text:span>15</text:span></text:p>
          </table:table-cell>
          <table:table-cell table:style-name="Cell">
            <text:p text:style-name="Body"><text:span>0,93</text:span></text:p>
          </table:table-cell>
          <table:table-cell table:style-name="Cell">
            <text:p text:style-name="Body"><text:span>8</text:span></text:p>
          </table:table-cell>
        </table:table-row>
        <table:table-row>
          <table:table-cell table:style-name="Cell">
            <text:p text:style-name="Body"><text:span>А5</text:span></text:p>
          </table:table-cell>
          <table:table-cell table:style-name="Cell">
            <text:p text:style-name="Body"><text:span>73</text:span></text:p>
          </table:table-cell>
          <table:table-cell table:style-name="Cell">
            <text:p text:style-name="Body"><text:span>24</text:span></text:p>
          </table:table-cell>
          <table:table-cell table:style-name="Cell">
            <text:p text:style-name="Body"><text:span>8</text:span></text:p>
          </table:table-cell>
          <table:table-cell table:style-name="Cell">
            <text:p text:style-name="Body"><text:span>0,78</text:span></text:p>
          </table:table-cell>
          <table:table-cell table:style-name="Cell">
            <text:p text:style-name="Body"><text:span>8</text:span></text:p>
          </table:table-cell>
        </table:table-row>
        <table:table-row>
          <table:table-cell table:style-name="Cell">
            <text:p text:style-name="Body"><text:span text:style-name="Bold">Вес</text:span></text:p>
          </table:table-cell>
          <table:table-cell table:style-name="Cell">
            <text:p text:style-name="Body"><text:span text:style-name="Bold">9</text:span></text:p>
          </table:table-cell>
          <table:table-cell table:style-name="Cell">
            <text:p text:style-name="Body"><text:span text:style-name="Bold">8</text:span></text:p>
          </table:table-cell>
          <table:table-cell table:style-name="Cell">
            <text:p text:style-name="Body"><text:span text:style-name="Bold">6</text:span></text:p>
          </table:table-cell>
          <table:table-cell table:style-name="Cell">
            <text:p text:style-name="Body"><text:span text:style-name="Bold">7</text:span></text:p>
          </table:table-cell>
          <table:table-cell table:style-name="Cell">
            <text:p text:style-name="Body"><text:span text:style-name="Bold">7</text:span></text:p>
          </table:table-cell>
        </table:table-row>
      </table:table>
      <text:h text:outline-level="3" text:style-name="H3">Решение</text:h>
      <text:p text:style-name="Body"><text:span text:style-name="Bold">Шаг 1. Нормализация:</text:span></text:p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><text:span>Проект</text:span></text:p>
          </table:table-cell>
          <table:table-cell table:style-name="HeaderCell">
            <text:p text:style-name="Body"><text:span>К1</text:span></text:p>
          </table:table-cell>
          <table:table-cell table:style-name="HeaderCell">
            <text:p text:style-name="Body"><text:span>К2</text:span></text:p>
          </table:table-cell>
          <table:table-cell table:style-name="HeaderCell">
            <text:p text:style-name="Body"><text:span>К3</text:span></text:p>
          </table:table-cell>
          <table:table-cell table:style-name="HeaderCell">
            <text:p text:style-name="Body"><text:span>К4</text:span></text:p>
          </table:table-cell>
          <table:table-cell table:style-name="HeaderCell">
            <text:p text:style-name="Body"><text:span>К5</text:span></text:p>
          </table:table-cell>
        </table:table-row>
        <table:table-row>
          <table:table-cell table:style-name="Cell">
            <text:p text:style-name="Body"><text:span>А1</text:span></text:p>
          </table:table-cell>
          <table:table-cell table:style-name="Cell">
            <text:p text:style-name="Body"><text:span>0,618</text:span></text:p>
          </table:table-cell>
          <table:table-cell table:style-name="Cell">
            <text:p text:style-name="Body"><text:span>0,143</text:span></text:p>
          </table:table-cell>
          <table:table-cell table:style-name="Cell">
            <text:p text:style-name="Body"><text:span>0,333</text:span></text:p>
          </table:table-cell>
          <table:table-cell table:style-name="Cell">
            <text:p text:style-name="Body"><text:span>0,600</text:span></text:p>
          </table:table-cell>
          <table:table-cell table:style-name="Cell">
            <text:p text:style-name="Body"><text:span>1,000</text:span></text:p>
          </table:table-cell>
        </table:table-row>
        <table:table-row>
          <table:table-cell table:style-name="Cell">
            <text:p text:style-name="Body"><text:span>А2</text:span></text:p>
          </table:table-cell>
          <table:table-cell table:style-name="Cell">
            <text:p text:style-name="Body"><text:span>0,000</text:span></text:p>
          </table:table-cell>
          <table:table-cell table:style-name="Cell">
            <text:p text:style-name="Body"><text:span>0,286</text:span></text:p>
          </table:table-cell>
          <table:table-cell table:style-name="Cell">
            <text:p text:style-name="Body"><text:span>0,667</text:span></text:p>
          </table:table-cell>
          <table:table-cell table:style-name="Cell">
            <text:p text:style-name="Body"><text:span>0,000</text:span></text:p>
          </table:table-cell>
          <table:table-cell table:style-name="Cell">
            <text:p text:style-name="Body"><text:span>0,000</text:span></text:p>
          </table:table-cell>
        </table:table-row>
        <table:table-row>
          <table:table-cell table:style-name="Cell">
            <text:p text:style-name="Body"><text:span>А3</text:span></text:p>
          </table:table-cell>
          <table:table-cell table:style-name="Cell">
            <text:p text:style-name="Body"><text:span>1,000</text:span></text:p>
          </table:table-cell>
          <table:table-cell table:style-name="Cell">
            <text:p text:style-name="Body"><text:span>1,000</text:span></text:p>
          </table:table-cell>
          <table:table-cell table:style-name="Cell">
            <text:p text:style-name="Body"><text:span>1,000</text:span></text:p>
          </table:table-cell>
          <table:table-cell table:style-name="Cell">
            <text:p text:style-name="Body"><text:span>0,400</text:span></text:p>
          </table:table-cell>
          <table:table-cell table:style-name="Cell">
            <text:p text:style-name="Body"><text:span>0,000</text:span></text:p>
          </table:table-cell>
        </table:table-row>
        <table:table-row>
          <table:table-cell table:style-name="Cell">
            <text:p text:style-name="Body"><text:span>А4</text:span></text:p>
          </table:table-cell>
          <table:table-cell table:style-name="Cell">
            <text:p text:style-name="Body"><text:span>0,727</text:span></text:p>
          </table:table-cell>
          <table:table-cell table:style-name="Cell">
            <text:p text:style-name="Body"><text:span>0,000</text:span></text:p>
          </table:table-cell>
          <table:table-cell table:style-name="Cell">
            <text:p text:style-name="Body"><text:span>0,778</text:span></text:p>
          </table:table-cell>
          <table:table-cell table:style-name="Cell">
            <text:p text:style-name="Body"><text:span>1,000</text:span></text:p>
          </table:table-cell>
          <table:table-cell table:style-name="Cell">
            <text:p text:style-name="Body"><text:span>0,667</text:span></text:p>
          </table:table-cell>
        </table:table-row>
        <table:table-row>
          <table:table-cell table:style-name="Cell">
            <text:p text:style-name="Body"><text:span>А5</text:span></text:p>
          </table:table-cell>
          <table:table-cell table:style-name="Cell">
            <text:p text:style-name="Body"><text:span>0,727</text:span></text:p>
          </table:table-cell>
          <table:table-cell table:style-name="Cell">
            <text:p text:style-name="Body"><text:span>0,381</text:span></text:p>
          </table:table-cell>
          <table:table-cell table:style-name="Cell">
            <text:p text:style-name="Body"><text:span>0,000</text:span></text:p>
          </table:table-cell>
          <table:table-cell table:style-name="Cell">
            <text:p text:style-name="Body"><text:span>0,250</text:span></text:p>
          </table:table-cell>
          <table:table-cell table:style-name="Cell">
            <text:p text:style-name="Body"><text:span>0,667</text:span></text:p>
          </table:table-cell>
        </table:table-row>
      </table:table>
      <text:p text:style-name="Body"><text:span text:style-name="Bold">Шаг 2. Метод латентных переменных.</text:span></text:p>
      <text:p text:style-name="Body"><text:span>Минимизируем целевую функцию:</text:span></text:p>
      <text:p text:style-name="Body"><text:span>S(theta, beta) = Sum_i Sum_j wj * (uij - exp(theta_i - beta_j)/(1+exp(theta_i - beta_j)))^2 -&gt; min</text:span></text:p>
      <text:p text:style-name="Body"><text:span>Решаем с помощью надстройки «Поиск решения» (Solver).</text:span></text:p>
      <text:p text:style-name="Body"><text:span text:style-name="Bold">Результаты оптимизации:</text:span></text:p>
      <table:table table:style-name="Table">
        <table:table-column table:style-name="Col"/>
        <table:table-column table:style-name="Col"/>
        <table:table-row>
          <table:table-cell table:style-name="HeaderCell">
            <text:p text:style-name="Body"><text:span>Проект</text:span></text:p>
          </table:table-cell>
          <table:table-cell table:style-name="HeaderCell">
            <text:p text:style-name="Body"><text:span>theta_i</text:span></text:p>
          </table:table-cell>
        </table:table-row>
        <table:table-row>
          <table:table-cell table:style-name="Cell">
            <text:p text:style-name="Body"><text:span>А1</text:span></text:p>
          </table:table-cell>
          <table:table-cell table:style-name="Cell">
            <text:p text:style-name="Body"><text:span>1,1948</text:span></text:p>
          </table:table-cell>
        </table:table-row>
        <table:table-row>
          <table:table-cell table:style-name="Cell">
            <text:p text:style-name="Body"><text:span>А2</text:span></text:p>
          </table:table-cell>
          <table:table-cell table:style-name="Cell">
            <text:p text:style-name="Body"><text:span>-1,2282</text:span></text:p>
          </table:table-cell>
        </table:table-row>
        <table:table-row>
          <table:table-cell table:style-name="Cell">
            <text:p text:style-name="Body"><text:span>А3</text:span></text:p>
          </table:table-cell>
          <table:table-cell table:style-name="Cell">
            <text:p text:style-name="Body"><text:span text:style-name="Bold">2,0437</text:span></text:p>
          </table:table-cell>
        </table:table-row>
        <table:table-row>
          <table:table-cell table:style-name="Cell">
            <text:p text:style-name="Body"><text:span>А4</text:span></text:p>
          </table:table-cell>
          <table:table-cell table:style-name="Cell">
            <text:p text:style-name="Body"><text:span>1,5265</text:span></text:p>
          </table:table-cell>
        </table:table-row>
        <table:table-row>
          <table:table-cell table:style-name="Cell">
            <text:p text:style-name="Body"><text:span>А5</text:span></text:p>
          </table:table-cell>
          <table:table-cell table:style-name="Cell">
            <text:p text:style-name="Body"><text:span>0,6945</text:span></text:p>
          </table:table-cell>
        </table:table-row>
      </table:table>
      <text:p text:style-name="Body"><text:span>Степени выполнимости критериев: beta(K1) = 0,315; beta(K2) = 1,846; beta(K3) = 1,096; beta(K4) = 1,075; beta(K5) = 0,822.</text:span></text:p>
      <text:h text:outline-level="3" text:style-name="H3">Ответ</text:h>
      <text:p text:style-name="Body"><text:span>Наибольшее значение theta = 2,0437 у проекта </text:span><text:span text:style-name="Bold">А3</text:span><text:span>. Лучший проект — </text:span><text:span text:style-name="Bold">А3</text:span><text:span>.</text:span></text:p>
      <text:p text:style-name="Body"><text:span>Для проверки, обычный метод взвешенной суммы также даёт максимум у А3 (F = 25,800).</text:span></text:p>
      <text:p text:style-name="Body"/>
      <text:h text:outline-level="2" text:style-name="H2">Задание МАИ. Покупка автомобиля (метод аналитической иерархии)</text:h>
      <text:p text:style-name="Body"><text:span text:style-name="Bold">Условие:</text:span><text:span> Выбрать автомобиль из 4 вариантов (A, B, C, D) по 3 критериям: Цена (К1), Комфортность (К2), Экономичность (К3).</text:span></text:p>
      <text:h text:outline-level="3" text:style-name="H3">Исходные данные — матрицы парных сравнений</text:h>
      <text:p text:style-name="Body"><text:span text:style-name="Bold">Альтернативы по К1 (Цена):</text:span></text:p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><text:span>K1</text:span></text:p>
          </table:table-cell>
          <table:table-cell table:style-name="HeaderCell">
            <text:p text:style-name="Body"><text:span>A</text:span></text:p>
          </table:table-cell>
          <table:table-cell table:style-name="HeaderCell">
            <text:p text:style-name="Body"><text:span>B</text:span></text:p>
          </table:table-cell>
          <table:table-cell table:style-name="HeaderCell">
            <text:p text:style-name="Body"><text:span>C</text:span></text:p>
          </table:table-cell>
          <table:table-cell table:style-name="HeaderCell">
            <text:p text:style-name="Body"><text:span>D</text:span></text:p>
          </table:table-cell>
        </table:table-row>
        <table:table-row>
          <table:table-cell table:style-name="Cell">
            <text:p text:style-name="Body"><text:span>A</text:span></text:p>
          </table:table-cell>
          <table:table-cell table:style-name="Cell">
            <text:p text:style-name="Body"><text:span>1</text:span></text:p>
          </table:table-cell>
          <table:table-cell table:style-name="Cell">
            <text:p text:style-name="Body"><text:span>1/5</text:span></text:p>
          </table:table-cell>
          <table:table-cell table:style-name="Cell">
            <text:p text:style-name="Body"><text:span>3</text:span></text:p>
          </table:table-cell>
          <table:table-cell table:style-name="Cell">
            <text:p text:style-name="Body"><text:span>1/2</text:span></text:p>
          </table:table-cell>
        </table:table-row>
        <table:table-row>
          <table:table-cell table:style-name="Cell">
            <text:p text:style-name="Body"><text:span>B</text:span></text:p>
          </table:table-cell>
          <table:table-cell table:style-name="Cell">
            <text:p text:style-name="Body"><text:span>5</text:span></text:p>
          </table:table-cell>
          <table:table-cell table:style-name="Cell">
            <text:p text:style-name="Body"><text:span>1</text:span></text:p>
          </table:table-cell>
          <table:table-cell table:style-name="Cell">
            <text:p text:style-name="Body"><text:span>1/3</text:span></text:p>
          </table:table-cell>
          <table:table-cell table:style-name="Cell">
            <text:p text:style-name="Body"><text:span>1/7</text:span></text:p>
          </table:table-cell>
        </table:table-row>
        <table:table-row>
          <table:table-cell table:style-name="Cell">
            <text:p text:style-name="Body"><text:span>C</text:span></text:p>
          </table:table-cell>
          <table:table-cell table:style-name="Cell">
            <text:p text:style-name="Body"><text:span>1/3</text:span></text:p>
          </table:table-cell>
          <table:table-cell table:style-name="Cell">
            <text:p text:style-name="Body"><text:span>3</text:span></text:p>
          </table:table-cell>
          <table:table-cell table:style-name="Cell">
            <text:p text:style-name="Body"><text:span>1</text:span></text:p>
          </table:table-cell>
          <table:table-cell table:style-name="Cell">
            <text:p text:style-name="Body"><text:span>3</text:span></text:p>
          </table:table-cell>
        </table:table-row>
        <table:table-row>
          <table:table-cell table:style-name="Cell">
            <text:p text:style-name="Body"><text:span>D</text:span></text:p>
          </table:table-cell>
          <table:table-cell table:style-name="Cell">
            <text:p text:style-name="Body"><text:span>2</text:span></text:p>
          </table:table-cell>
          <table:table-cell table:style-name="Cell">
            <text:p text:style-name="Body"><text:span>7</text:span></text:p>
          </table:table-cell>
          <table:table-cell table:style-name="Cell">
            <text:p text:style-name="Body"><text:span>1/3</text:span></text:p>
          </table:table-cell>
          <table:table-cell table:style-name="Cell">
            <text:p text:style-name="Body"><text:span>1</text:span></text:p>
          </table:table-cell>
        </table:table-row>
      </table:table>
      <text:p text:style-name="Body"><text:span text:style-name="Bold">Альтернативы по К2 (Комфортность):</text:span></text:p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><text:span>K2</text:span></text:p>
          </table:table-cell>
          <table:table-cell table:style-name="HeaderCell">
            <text:p text:style-name="Body"><text:span>A</text:span></text:p>
          </table:table-cell>
          <table:table-cell table:style-name="HeaderCell">
            <text:p text:style-name="Body"><text:span>B</text:span></text:p>
          </table:table-cell>
          <table:table-cell table:style-name="HeaderCell">
            <text:p text:style-name="Body"><text:span>C</text:span></text:p>
          </table:table-cell>
          <table:table-cell table:style-name="HeaderCell">
            <text:p text:style-name="Body"><text:span>D</text:span></text:p>
          </table:table-cell>
        </table:table-row>
        <table:table-row>
          <table:table-cell table:style-name="Cell">
            <text:p text:style-name="Body"><text:span>A</text:span></text:p>
          </table:table-cell>
          <table:table-cell table:style-name="Cell">
            <text:p text:style-name="Body"><text:span>1</text:span></text:p>
          </table:table-cell>
          <table:table-cell table:style-name="Cell">
            <text:p text:style-name="Body"><text:span>4</text:span></text:p>
          </table:table-cell>
          <table:table-cell table:style-name="Cell">
            <text:p text:style-name="Body"><text:span>3</text:span></text:p>
          </table:table-cell>
          <table:table-cell table:style-name="Cell">
            <text:p text:style-name="Body"><text:span>1/5</text:span></text:p>
          </table:table-cell>
        </table:table-row>
        <table:table-row>
          <table:table-cell table:style-name="Cell">
            <text:p text:style-name="Body"><text:span>B</text:span></text:p>
          </table:table-cell>
          <table:table-cell table:style-name="Cell">
            <text:p text:style-name="Body"><text:span>1/4</text:span></text:p>
          </table:table-cell>
          <table:table-cell table:style-name="Cell">
            <text:p text:style-name="Body"><text:span>1</text:span></text:p>
          </table:table-cell>
          <table:table-cell table:style-name="Cell">
            <text:p text:style-name="Body"><text:span>2</text:span></text:p>
          </table:table-cell>
          <table:table-cell table:style-name="Cell">
            <text:p text:style-name="Body"><text:span>5</text:span></text:p>
          </table:table-cell>
        </table:table-row>
        <table:table-row>
          <table:table-cell table:style-name="Cell">
            <text:p text:style-name="Body"><text:span>C</text:span></text:p>
          </table:table-cell>
          <table:table-cell table:style-name="Cell">
            <text:p text:style-name="Body"><text:span>1/3</text:span></text:p>
          </table:table-cell>
          <table:table-cell table:style-name="Cell">
            <text:p text:style-name="Body"><text:span>1/2</text:span></text:p>
          </table:table-cell>
          <table:table-cell table:style-name="Cell">
            <text:p text:style-name="Body"><text:span>1</text:span></text:p>
          </table:table-cell>
          <table:table-cell table:style-name="Cell">
            <text:p text:style-name="Body"><text:span>3</text:span></text:p>
          </table:table-cell>
        </table:table-row>
        <table:table-row>
          <table:table-cell table:style-name="Cell">
            <text:p text:style-name="Body"><text:span>D</text:span></text:p>
          </table:table-cell>
          <table:table-cell table:style-name="Cell">
            <text:p text:style-name="Body"><text:span>5</text:span></text:p>
          </table:table-cell>
          <table:table-cell table:style-name="Cell">
            <text:p text:style-name="Body"><text:span>1/5</text:span></text:p>
          </table:table-cell>
          <table:table-cell table:style-name="Cell">
            <text:p text:style-name="Body"><text:span>1/3</text:span></text:p>
          </table:table-cell>
          <table:table-cell table:style-name="Cell">
            <text:p text:style-name="Body"><text:span>1</text:span></text:p>
          </table:table-cell>
        </table:table-row>
      </table:table>
      <text:p text:style-name="Body"><text:span text:style-name="Bold">Альтернативы по К3 (Экономичность):</text:span></text:p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><text:span>K3</text:span></text:p>
          </table:table-cell>
          <table:table-cell table:style-name="HeaderCell">
            <text:p text:style-name="Body"><text:span>A</text:span></text:p>
          </table:table-cell>
          <table:table-cell table:style-name="HeaderCell">
            <text:p text:style-name="Body"><text:span>B</text:span></text:p>
          </table:table-cell>
          <table:table-cell table:style-name="HeaderCell">
            <text:p text:style-name="Body"><text:span>C</text:span></text:p>
          </table:table-cell>
          <table:table-cell table:style-name="HeaderCell">
            <text:p text:style-name="Body"><text:span>D</text:span></text:p>
          </table:table-cell>
        </table:table-row>
        <table:table-row>
          <table:table-cell table:style-name="Cell">
            <text:p text:style-name="Body"><text:span>A</text:span></text:p>
          </table:table-cell>
          <table:table-cell table:style-name="Cell">
            <text:p text:style-name="Body"><text:span>1</text:span></text:p>
          </table:table-cell>
          <table:table-cell table:style-name="Cell">
            <text:p text:style-name="Body"><text:span>3</text:span></text:p>
          </table:table-cell>
          <table:table-cell table:style-name="Cell">
            <text:p text:style-name="Body"><text:span>1/7</text:span></text:p>
          </table:table-cell>
          <table:table-cell table:style-name="Cell">
            <text:p text:style-name="Body"><text:span>5</text:span></text:p>
          </table:table-cell>
        </table:table-row>
        <table:table-row>
          <table:table-cell table:style-name="Cell">
            <text:p text:style-name="Body"><text:span>B</text:span></text:p>
          </table:table-cell>
          <table:table-cell table:style-name="Cell">
            <text:p text:style-name="Body"><text:span>1/3</text:span></text:p>
          </table:table-cell>
          <table:table-cell table:style-name="Cell">
            <text:p text:style-name="Body"><text:span>1</text:span></text:p>
          </table:table-cell>
          <table:table-cell table:style-name="Cell">
            <text:p text:style-name="Body"><text:span>6</text:span></text:p>
          </table:table-cell>
          <table:table-cell table:style-name="Cell">
            <text:p text:style-name="Body"><text:span>3</text:span></text:p>
          </table:table-cell>
        </table:table-row>
        <table:table-row>
          <table:table-cell table:style-name="Cell">
            <text:p text:style-name="Body"><text:span>C</text:span></text:p>
          </table:table-cell>
          <table:table-cell table:style-name="Cell">
            <text:p text:style-name="Body"><text:span>7</text:span></text:p>
          </table:table-cell>
          <table:table-cell table:style-name="Cell">
            <text:p text:style-name="Body"><text:span>1/6</text:span></text:p>
          </table:table-cell>
          <table:table-cell table:style-name="Cell">
            <text:p text:style-name="Body"><text:span>1</text:span></text:p>
          </table:table-cell>
          <table:table-cell table:style-name="Cell">
            <text:p text:style-name="Body"><text:span>1/5</text:span></text:p>
          </table:table-cell>
        </table:table-row>
        <table:table-row>
          <table:table-cell table:style-name="Cell">
            <text:p text:style-name="Body"><text:span>D</text:span></text:p>
          </table:table-cell>
          <table:table-cell table:style-name="Cell">
            <text:p text:style-name="Body"><text:span>1/5</text:span></text:p>
          </table:table-cell>
          <table:table-cell table:style-name="Cell">
            <text:p text:style-name="Body"><text:span>1/3</text:span></text:p>
          </table:table-cell>
          <table:table-cell table:style-name="Cell">
            <text:p text:style-name="Body"><text:span>5</text:span></text:p>
          </table:table-cell>
          <table:table-cell table:style-name="Cell">
            <text:p text:style-name="Body"><text:span>1</text:span></text:p>
          </table:table-cell>
        </table:table-row>
      </table:table>
      <text:p text:style-name="Body"><text:span text:style-name="Bold">Критерии между собой:</text:span></text:p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/>
          </table:table-cell>
          <table:table-cell table:style-name="HeaderCell">
            <text:p text:style-name="Body"><text:span>К1</text:span></text:p>
          </table:table-cell>
          <table:table-cell table:style-name="HeaderCell">
            <text:p text:style-name="Body"><text:span>К2</text:span></text:p>
          </table:table-cell>
          <table:table-cell table:style-name="HeaderCell">
            <text:p text:style-name="Body"><text:span>К3</text:span></text:p>
          </table:table-cell>
        </table:table-row>
        <table:table-row>
          <table:table-cell table:style-name="Cell">
            <text:p text:style-name="Body"><text:span>К1</text:span></text:p>
          </table:table-cell>
          <table:table-cell table:style-name="Cell">
            <text:p text:style-name="Body"><text:span>1</text:span></text:p>
          </table:table-cell>
          <table:table-cell table:style-name="Cell">
            <text:p text:style-name="Body"><text:span>3</text:span></text:p>
          </table:table-cell>
          <table:table-cell table:style-name="Cell">
            <text:p text:style-name="Body"><text:span>1/2</text:span></text:p>
          </table:table-cell>
        </table:table-row>
        <table:table-row>
          <table:table-cell table:style-name="Cell">
            <text:p text:style-name="Body"><text:span>К2</text:span></text:p>
          </table:table-cell>
          <table:table-cell table:style-name="Cell">
            <text:p text:style-name="Body"><text:span>1/3</text:span></text:p>
          </table:table-cell>
          <table:table-cell table:style-name="Cell">
            <text:p text:style-name="Body"><text:span>1</text:span></text:p>
          </table:table-cell>
          <table:table-cell table:style-name="Cell">
            <text:p text:style-name="Body"><text:span>5</text:span></text:p>
          </table:table-cell>
        </table:table-row>
        <table:table-row>
          <table:table-cell table:style-name="Cell">
            <text:p text:style-name="Body"><text:span>К3</text:span></text:p>
          </table:table-cell>
          <table:table-cell table:style-name="Cell">
            <text:p text:style-name="Body"><text:span>2</text:span></text:p>
          </table:table-cell>
          <table:table-cell table:style-name="Cell">
            <text:p text:style-name="Body"><text:span>1/5</text:span></text:p>
          </table:table-cell>
          <table:table-cell table:style-name="Cell">
            <text:p text:style-name="Body"><text:span>1</text:span></text:p>
          </table:table-cell>
        </table:table-row>
      </table:table>
      <text:h text:outline-level="3" text:style-name="H3">Решение</text:h>
      <text:p text:style-name="Body"><text:span>Вычисляем собственные векторы каждой матрицы методом среднего геометрического: для каждой строки перемножаем элементы и извлекаем корень n-й степени, затем нормируем.</text:span></text:p>
      <text:p text:style-name="Body"><text:span text:style-name="Bold">Веса альтернатив:</text:span></text:p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><text:span>Альтернатива</text:span></text:p>
          </table:table-cell>
          <table:table-cell table:style-name="HeaderCell">
            <text:p text:style-name="Body"><text:span>К1</text:span></text:p>
          </table:table-cell>
          <table:table-cell table:style-name="HeaderCell">
            <text:p text:style-name="Body"><text:span>К2</text:span></text:p>
          </table:table-cell>
          <table:table-cell table:style-name="HeaderCell">
            <text:p text:style-name="Body"><text:span>К3</text:span></text:p>
          </table:table-cell>
        </table:table-row>
        <table:table-row>
          <table:table-cell table:style-name="Cell">
            <text:p text:style-name="Body"><text:span>A</text:span></text:p>
          </table:table-cell>
          <table:table-cell table:style-name="Cell">
            <text:p text:style-name="Body"><text:span>0,1752</text:span></text:p>
          </table:table-cell>
          <table:table-cell table:style-name="Cell">
            <text:p text:style-name="Body"><text:span>0,3034</text:span></text:p>
          </table:table-cell>
          <table:table-cell table:style-name="Cell">
            <text:p text:style-name="Body"><text:span>0,2860</text:span></text:p>
          </table:table-cell>
        </table:table-row>
        <table:table-row>
          <table:table-cell table:style-name="Cell">
            <text:p text:style-name="Body"><text:span>B</text:span></text:p>
          </table:table-cell>
          <table:table-cell table:style-name="Cell">
            <text:p text:style-name="Body"><text:span>0,1654</text:span></text:p>
          </table:table-cell>
          <table:table-cell table:style-name="Cell">
            <text:p text:style-name="Body"><text:span>0,3065</text:span></text:p>
          </table:table-cell>
          <table:table-cell table:style-name="Cell">
            <text:p text:style-name="Body"><text:span>0,3700</text:span></text:p>
          </table:table-cell>
        </table:table-row>
        <table:table-row>
          <table:table-cell table:style-name="Cell">
            <text:p text:style-name="Body"><text:span>C</text:span></text:p>
          </table:table-cell>
          <table:table-cell table:style-name="Cell">
            <text:p text:style-name="Body"><text:span>0,3115</text:span></text:p>
          </table:table-cell>
          <table:table-cell table:style-name="Cell">
            <text:p text:style-name="Body"><text:span>0,2050</text:span></text:p>
          </table:table-cell>
          <table:table-cell table:style-name="Cell">
            <text:p text:style-name="Body"><text:span>0,1643</text:span></text:p>
          </table:table-cell>
        </table:table-row>
        <table:table-row>
          <table:table-cell table:style-name="Cell">
            <text:p text:style-name="Body"><text:span>D</text:span></text:p>
          </table:table-cell>
          <table:table-cell table:style-name="Cell">
            <text:p text:style-name="Body"><text:span>0,3479</text:span></text:p>
          </table:table-cell>
          <table:table-cell table:style-name="Cell">
            <text:p text:style-name="Body"><text:span>0,1852</text:span></text:p>
          </table:table-cell>
          <table:table-cell table:style-name="Cell">
            <text:p text:style-name="Body"><text:span>0,1796</text:span></text:p>
          </table:table-cell>
        </table:table-row>
      </table:table>
      <text:p text:style-name="Body"><text:span text:style-name="Bold">Веса критериев:</text:span><text:span> К1 = 0,3732; К2 = 0,3866; К3 = 0,2402</text:span></text:p>
      <text:p text:style-name="Body"><text:span text:style-name="Bold">Функции полезности:</text:span></text:p>
      <text:p text:style-name="Body"><text:span>F(A) = 0,1752×0,3732 + 0,3034×0,3866 + 0,2860×0,2402 = </text:span><text:span text:style-name="Bold">0,2514</text:span></text:p>
      <text:p text:style-name="Body"><text:span>F(B) = 0,1654×0,3732 + 0,3065×0,3866 + 0,3700×0,2402 = </text:span><text:span text:style-name="Bold">0,2691</text:span></text:p>
      <text:p text:style-name="Body"><text:span>F(C) = 0,3115×0,3732 + 0,2050×0,3866 + 0,1643×0,2402 = </text:span><text:span text:style-name="Bold">0,2350</text:span></text:p>
      <text:p text:style-name="Body"><text:span>F(D) = 0,3479×0,3732 + 0,1852×0,3866 + 0,1796×0,2402 = </text:span><text:span text:style-name="Bold">0,2446</text:span></text:p>
      <text:h text:outline-level="3" text:style-name="H3">Ответ</text:h>
      <text:p text:style-name="Body"><text:span>Максимальная функция полезности F = 0,2691 у альтернативы </text:span><text:span text:style-name="Bold">B</text:span><text:span>. Лучший автомобиль — </text:span><text:span text:style-name="Bold">B</text:span><text:span>.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H1" style:family="paragraph" style:display-name="H1">
      <style:text-properties fo:font-size="18pt" fo:font-weight="bold"/>
    </style:style>
    <style:style style:name="H2" style:family="paragraph" style:display-name="H2">
      <style:text-properties fo:font-size="14pt" fo:font-weight="bold"/>
    </style:style>
    <style:style style:name="H3" style:family="paragraph" style:display-name="H3">
      <style:text-properties fo:font-size="12pt" fo:font-weight="bold"/>
    </style:style>
    <style:style style:name="H4" style:family="paragraph" style:display-name="H4">
      <style:text-properties fo:font-size="11pt" fo:font-weight="bold"/>
    </style:style>
    <style:style style:name="Body" style:family="paragraph" style:display-name="Body">
      <style:text-properties fo:font-size="11pt"/>
    </style:style>
    <style:style style:name="Bold" style:family="text" style:display-name="Bold"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