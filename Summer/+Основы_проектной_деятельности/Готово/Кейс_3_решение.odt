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" style:family="table">
      <style:table-properties style:width="16.995cm" table:align="left"/>
    </style:style>
    <style:style style:name="Table.A" style:family="table-column">
      <style:table-column-properties style:column-width="0.997cm"/>
    </style:style>
    <style:style style:name="Table.B" style:family="table-column">
      <style:table-column-properties style:column-width="6.615cm"/>
    </style:style>
    <style:style style:name="Table.C" style:family="table-column">
      <style:table-column-properties style:column-width="2.588cm"/>
    </style:style>
    <style:style style:name="Table.D" style:family="table-column">
      <style:table-column-properties style:column-width="2.501cm"/>
    </style:style>
    <style:style style:name="Table.E" style:family="table-column">
      <style:table-column-properties style:column-width="4.295cm"/>
    </style:style>
    <style:style style:name="Table.A1" style:family="table-cell">
      <style:table-cell-properties style:vertical-align="middle" fo:padding="0.101cm" fo:border="none"/>
    </style:style>
    <style:style style:name="Table.B1" style:family="table-cell">
      <style:table-cell-properties fo:padding="0.101cm" fo:border="none"/>
    </style:style>
    <style:style style:name="Table.C1" style:family="table-cell">
      <style:table-cell-properties fo:padding="0.101cm" fo:border="none"/>
    </style:style>
    <style:style style:name="Table.D1" style:family="table-cell">
      <style:table-cell-properties fo:padding="0.101cm" fo:border="none"/>
    </style:style>
    <style:style style:name="Table.E1" style:family="table-cell">
      <style:table-cell-properties fo:padding="0.101cm" fo:border="none"/>
    </style:style>
    <style:style style:name="Table.B2" style:family="table-cell">
      <style:table-cell-properties fo:padding="0.101cm" fo:border="none"/>
    </style:style>
    <style:style style:name="Table.C2" style:family="table-cell">
      <style:table-cell-properties fo:padding="0.101cm" fo:border="none"/>
    </style:style>
    <style:style style:name="Table.D2" style:family="table-cell">
      <style:table-cell-properties fo:padding="0.101cm" fo:border="none"/>
    </style:style>
    <style:style style:name="Table.E2" style:family="table-cell">
      <style:table-cell-properties fo:padding="0.101cm" fo:border="none"/>
    </style:style>
    <style:style style:name="Table.B3" style:family="table-cell">
      <style:table-cell-properties fo:padding="0.101cm" fo:border="none"/>
    </style:style>
    <style:style style:name="Table.C3" style:family="table-cell">
      <style:table-cell-properties fo:padding="0.101cm" fo:border="none"/>
    </style:style>
    <style:style style:name="Table.D3" style:family="table-cell">
      <style:table-cell-properties fo:padding="0.101cm" fo:border="none"/>
    </style:style>
    <style:style style:name="Table.E3" style:family="table-cell">
      <style:table-cell-properties fo:padding="0.101cm" fo:border="none"/>
    </style:style>
    <style:style style:name="Table.B4" style:family="table-cell">
      <style:table-cell-properties fo:padding="0.101cm" fo:border="none"/>
    </style:style>
    <style:style style:name="Table.C4" style:family="table-cell">
      <style:table-cell-properties fo:padding="0.101cm" fo:border="none"/>
    </style:style>
    <style:style style:name="Table.D4" style:family="table-cell">
      <style:table-cell-properties fo:padding="0.101cm" fo:border="none"/>
    </style:style>
    <style:style style:name="Table.E4" style:family="table-cell">
      <style:table-cell-properties fo:padding="0.101cm" fo:border="none"/>
    </style:style>
    <style:style style:name="Table.B5" style:family="table-cell">
      <style:table-cell-properties fo:padding="0.101cm" fo:border="none"/>
    </style:style>
    <style:style style:name="Table.C5" style:family="table-cell">
      <style:table-cell-properties fo:padding="0.101cm" fo:border="none"/>
    </style:style>
    <style:style style:name="Table.D5" style:family="table-cell">
      <style:table-cell-properties fo:padding="0.101cm" fo:border="none"/>
    </style:style>
    <style:style style:name="Table.E5" style:family="table-cell">
      <style:table-cell-properties fo:padding="0.101cm" fo:border="none"/>
    </style:style>
    <style:style style:name="Table.B6" style:family="table-cell">
      <style:table-cell-properties fo:padding="0.101cm" fo:border="none"/>
    </style:style>
    <style:style style:name="Table.C6" style:family="table-cell">
      <style:table-cell-properties fo:padding="0.101cm" fo:border="none"/>
    </style:style>
    <style:style style:name="Table.D6" style:family="table-cell">
      <style:table-cell-properties fo:padding="0.101cm" fo:border="none"/>
    </style:style>
    <style:style style:name="Table.E6" style:family="table-cell">
      <style:table-cell-properties fo:padding="0.101cm" fo:border="none"/>
    </style:style>
    <style:style style:name="Table.B7" style:family="table-cell">
      <style:table-cell-properties fo:padding="0.101cm" fo:border="none"/>
    </style:style>
    <style:style style:name="Table.C7" style:family="table-cell">
      <style:table-cell-properties fo:padding="0.101cm" fo:border="none"/>
    </style:style>
    <style:style style:name="Table.D7" style:family="table-cell">
      <style:table-cell-properties fo:padding="0.101cm" fo:border="none"/>
    </style:style>
    <style:style style:name="Table.E7" style:family="table-cell">
      <style:table-cell-properties fo:padding="0.101cm" fo:border="none"/>
    </style:style>
    <style:style style:name="Table.B8" style:family="table-cell">
      <style:table-cell-properties fo:padding="0.101cm" fo:border="none"/>
    </style:style>
    <style:style style:name="Table.C8" style:family="table-cell">
      <style:table-cell-properties fo:padding="0.101cm" fo:border="none"/>
    </style:style>
    <style:style style:name="Table.D8" style:family="table-cell">
      <style:table-cell-properties fo:padding="0.101cm" fo:border="none"/>
    </style:style>
    <style:style style:name="Table.E8" style:family="table-cell">
      <style:table-cell-properties fo:padding="0.101cm" fo:border="none"/>
    </style:style>
    <style:style style:name="Table.B9" style:family="table-cell">
      <style:table-cell-properties fo:padding="0.101cm" fo:border="none"/>
    </style:style>
    <style:style style:name="Table.C9" style:family="table-cell">
      <style:table-cell-properties fo:padding="0.101cm" fo:border="none"/>
    </style:style>
    <style:style style:name="Table.D9" style:family="table-cell">
      <style:table-cell-properties fo:padding="0.101cm" fo:border="none"/>
    </style:style>
    <style:style style:name="Table.E9" style:family="table-cell">
      <style:table-cell-properties fo:padding="0.101cm" fo:border="none"/>
    </style:style>
    <style:style style:name="Table.B10" style:family="table-cell">
      <style:table-cell-properties fo:padding="0.101cm" fo:border="none"/>
    </style:style>
    <style:style style:name="Table.C10" style:family="table-cell">
      <style:table-cell-properties fo:padding="0.101cm" fo:border="none"/>
    </style:style>
    <style:style style:name="Table.D10" style:family="table-cell">
      <style:table-cell-properties fo:padding="0.101cm" fo:border="none"/>
    </style:style>
    <style:style style:name="Table.E10" style:family="table-cell">
      <style:table-cell-properties fo:padding="0.101cm" fo:border="none"/>
    </style:style>
    <style:style style:name="Table.B11" style:family="table-cell">
      <style:table-cell-properties fo:padding="0.101cm" fo:border="none"/>
    </style:style>
    <style:style style:name="Table.C11" style:family="table-cell">
      <style:table-cell-properties fo:padding="0.101cm" fo:border="none"/>
    </style:style>
    <style:style style:name="Table.D11" style:family="table-cell">
      <style:table-cell-properties fo:padding="0.101cm" fo:border="none"/>
    </style:style>
    <style:style style:name="Table.E11" style:family="table-cell">
      <style:table-cell-properties fo:padding="0.101cm" fo:border="none"/>
    </style:style>
    <style:style style:name="Table_5f_1" style:display-name="Table_1" style:family="table">
      <style:table-properties style:width="16.995cm" table:align="left"/>
    </style:style>
    <style:style style:name="Table_5f_1.A" style:display-name="Table_1.A" style:family="table-column">
      <style:table-column-properties style:column-width="2.402cm"/>
    </style:style>
    <style:style style:name="Table_5f_1.B" style:display-name="Table_1.B" style:family="table-column">
      <style:table-column-properties style:column-width="6.003cm"/>
    </style:style>
    <style:style style:name="Table_5f_1.C" style:display-name="Table_1.C" style:family="table-column">
      <style:table-column-properties style:column-width="8.59cm"/>
    </style:style>
    <style:style style:name="Table_5f_1.A1" style:display-name="Table_1.A1" style:family="table-cell">
      <style:table-cell-properties fo:padding="0.101cm" fo:border="none"/>
    </style:style>
    <style:style style:name="Table_5f_2" style:display-name="Table_2" style:family="table">
      <style:table-properties style:width="16.995cm" table:align="left"/>
    </style:style>
    <style:style style:name="Table_5f_2.A" style:display-name="Table_2.A" style:family="table-column">
      <style:table-column-properties style:column-width="0.896cm"/>
    </style:style>
    <style:style style:name="Table_5f_2.B" style:display-name="Table_2.B" style:family="table-column">
      <style:table-column-properties style:column-width="5.8cm"/>
    </style:style>
    <style:style style:name="Table_5f_2.C" style:display-name="Table_2.C" style:family="table-column">
      <style:table-column-properties style:column-width="10.299cm"/>
    </style:style>
    <style:style style:name="Table_5f_2.A1" style:display-name="Table_2.A1" style:family="table-cell">
      <style:table-cell-properties style:vertical-align="middle" fo:padding="0.101cm" fo:border="none"/>
    </style:style>
    <style:style style:name="Table_5f_2.B1" style:display-name="Table_2.B1" style:family="table-cell">
      <style:table-cell-properties fo:padding="0.101cm" fo:border="none"/>
    </style:style>
    <style:style style:name="Table_5f_2.C1" style:display-name="Table_2.C1" style:family="table-cell">
      <style:table-cell-properties fo:padding="0.101cm" fo:border="none"/>
    </style:style>
    <style:style style:name="Table_5f_2.B2" style:display-name="Table_2.B2" style:family="table-cell">
      <style:table-cell-properties fo:padding="0.101cm" fo:border="none"/>
    </style:style>
    <style:style style:name="Table_5f_2.C2" style:display-name="Table_2.C2" style:family="table-cell">
      <style:table-cell-properties fo:padding="0.101cm" fo:border="none"/>
    </style:style>
    <style:style style:name="Table_5f_2.B3" style:display-name="Table_2.B3" style:family="table-cell">
      <style:table-cell-properties fo:padding="0.101cm" fo:border="none"/>
    </style:style>
    <style:style style:name="Table_5f_2.C3" style:display-name="Table_2.C3" style:family="table-cell">
      <style:table-cell-properties fo:padding="0.101cm" fo:border="none"/>
    </style:style>
    <style:style style:name="Table_5f_2.B4" style:display-name="Table_2.B4" style:family="table-cell">
      <style:table-cell-properties fo:padding="0.101cm" fo:border="none"/>
    </style:style>
    <style:style style:name="Table_5f_2.C4" style:display-name="Table_2.C4" style:family="table-cell">
      <style:table-cell-properties fo:padding="0.101cm" fo:border="none"/>
    </style:style>
    <style:style style:name="Table_5f_2.B5" style:display-name="Table_2.B5" style:family="table-cell">
      <style:table-cell-properties fo:padding="0.101cm" fo:border="none"/>
    </style:style>
    <style:style style:name="Table_5f_2.C5" style:display-name="Table_2.C5" style:family="table-cell">
      <style:table-cell-properties fo:padding="0.101cm" fo:border="none"/>
    </style:style>
    <style:style style:name="Table_5f_2.B6" style:display-name="Table_2.B6" style:family="table-cell">
      <style:table-cell-properties fo:padding="0.101cm" fo:border="none"/>
    </style:style>
    <style:style style:name="Table_5f_2.C6" style:display-name="Table_2.C6" style:family="table-cell">
      <style:table-cell-properties fo:padding="0.101cm" fo:border="none"/>
    </style:style>
    <style:style style:name="Table_5f_2.B7" style:display-name="Table_2.B7" style:family="table-cell">
      <style:table-cell-properties fo:padding="0.101cm" fo:border="none"/>
    </style:style>
    <style:style style:name="Table_5f_2.C7" style:display-name="Table_2.C7" style:family="table-cell">
      <style:table-cell-properties fo:padding="0.101cm" fo:border="none"/>
    </style:style>
    <style:style style:name="Table_5f_2.B8" style:display-name="Table_2.B8" style:family="table-cell">
      <style:table-cell-properties fo:padding="0.101cm" fo:border="none"/>
    </style:style>
    <style:style style:name="Table_5f_2.C8" style:display-name="Table_2.C8" style:family="table-cell">
      <style:table-cell-properties fo:padding="0.101cm" fo:border="none"/>
    </style:style>
    <style:style style:name="Table_5f_2.B9" style:display-name="Table_2.B9" style:family="table-cell">
      <style:table-cell-properties fo:padding="0.101cm" fo:border="none"/>
    </style:style>
    <style:style style:name="Table_5f_2.C9" style:display-name="Table_2.C9" style:family="table-cell">
      <style:table-cell-properties fo:padding="0.101cm" fo:border="none"/>
    </style:style>
    <style:style style:name="Table_5f_2.B10" style:display-name="Table_2.B10" style:family="table-cell">
      <style:table-cell-properties fo:padding="0.101cm" fo:border="none"/>
    </style:style>
    <style:style style:name="Table_5f_2.C10" style:display-name="Table_2.C10" style:family="table-cell">
      <style:table-cell-properties fo:padding="0.101cm" fo:border="none"/>
    </style:style>
    <style:style style:name="Table_5f_2.B11" style:display-name="Table_2.B11" style:family="table-cell">
      <style:table-cell-properties fo:padding="0.101cm" fo:border="none"/>
    </style:style>
    <style:style style:name="Table_5f_2.C11" style:display-name="Table_2.C11" style:family="table-cell">
      <style:table-cell-properties fo:padding="0.101cm" fo:border="none"/>
    </style:style>
    <style:style style:name="P1" style:family="paragraph" style:parent-style-name="Standard" style:list-style-name="">
      <style:paragraph-properties fo:margin-top="0cm" fo:margin-bottom="0.3cm" style:contextual-spacing="false" fo:line-height="100%"/>
      <style:text-properties style:font-name="Times New Roman" fo:font-size="14pt" fo:font-weight="bold"/>
    </style:style>
    <style:style style:name="P2" style:family="paragraph" style:parent-style-name="Standard">
      <style:paragraph-properties fo:margin-top="0.499cm" fo:margin-bottom="0.3cm" style:contextual-spacing="false" fo:line-height="100%"/>
      <style:text-properties style:font-name="Times New Roman" fo:font-size="14pt" fo:font-weight="bold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font-weight="bold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/>
    </style:style>
    <style:style style:name="P5" style:family="paragraph" style:parent-style-name="Standard">
      <style:paragraph-properties fo:margin-top="0cm" fo:margin-bottom="0.199cm" style:contextual-spacing="false" fo:line-height="100%"/>
      <style:text-properties style:font-name="Times New Roman" fo:font-size="14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fo:font-size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Кейс 3. Работа со стейкхолдерами проекта и коммуникация с ними</text:h>
      <text:p text:style-name="P2">Исходные данные</text:p>
      <text:p text:style-name="P5">Проект: мобильное приложение для создания индивидуального плана питания, режима дня и активностей, спорта.</text:p>
      <text:p text:style-name="P5">Старт проекта: 1 сентября 2026 г.</text:p>
      <text:p text:style-name="P5">Роль: Руководитель проекта.</text:p>
      <text:p text:style-name="P5"/>
      <text:p text:style-name="P2">Задание 1. Матрица стейкхолдеров</text:p>
      <text:p text:style-name="P2">Перечень стейкхолдеров</text:p>
      <table:table table:name="Table" table:style-name="Table">
        <table:table-column table:style-name="Table.A"/>
        <table:table-column table:style-name="Table.B"/>
        <table:table-column table:style-name="Table.C"/>
        <table:table-column table:style-name="Table.D"/>
        <table:table-column table:style-name="Table.E"/>
        <table:table-row>
          <table:table-cell table:style-name="Table.A1" office:value-type="string">
            <text:p text:style-name="P4">№</text:p>
          </table:table-cell>
          <table:table-cell table:style-name="Table.B1" office:value-type="string">
            <text:p text:style-name="P4">Стейкхолдер</text:p>
          </table:table-cell>
          <table:table-cell table:style-name="Table.C1" office:value-type="string">
            <text:p text:style-name="P4">Интерес</text:p>
          </table:table-cell>
          <table:table-cell table:style-name="Table.D1" office:value-type="string">
            <text:p text:style-name="P4">Влияние</text:p>
          </table:table-cell>
          <table:table-cell table:style-name="Table.E1" office:value-type="string">
            <text:p text:style-name="P4">Квадрант</text:p>
          </table:table-cell>
        </table:table-row>
        <table:table-row>
          <table:table-cell table:style-name="Table.A1" office:value-type="string">
            <text:p text:style-name="P7">1</text:p>
          </table:table-cell>
          <table:table-cell table:style-name="Table.B2" office:value-type="string">
            <text:p text:style-name="P6">Инвестор / заказчик</text:p>
          </table:table-cell>
          <table:table-cell table:style-name="Table.C2" office:value-type="string">
            <text:p text:style-name="P6">Высокий</text:p>
          </table:table-cell>
          <table:table-cell table:style-name="Table.D2" office:value-type="string">
            <text:p text:style-name="P6">Высокое</text:p>
          </table:table-cell>
          <table:table-cell table:style-name="Table.E2" office:value-type="string">
            <text:p text:style-name="P6">Управлять тесно</text:p>
          </table:table-cell>
        </table:table-row>
        <table:table-row>
          <table:table-cell table:style-name="Table.A1" office:value-type="string">
            <text:p text:style-name="P7">2</text:p>
          </table:table-cell>
          <table:table-cell table:style-name="Table.B2" office:value-type="string">
            <text:p text:style-name="P6">Команда разработки (разработчики, дизайнеры, тестировщики)</text:p>
          </table:table-cell>
          <table:table-cell table:style-name="Table.C3" office:value-type="string">
            <text:p text:style-name="P6">Высокий</text:p>
          </table:table-cell>
          <table:table-cell table:style-name="Table.D2" office:value-type="string">
            <text:p text:style-name="P6">Высокое</text:p>
          </table:table-cell>
          <table:table-cell table:style-name="Table.E3" office:value-type="string">
            <text:p text:style-name="P6">Управлять тесно</text:p>
          </table:table-cell>
        </table:table-row>
        <table:table-row>
          <table:table-cell table:style-name="Table.A1" office:value-type="string">
            <text:p text:style-name="P7">3</text:p>
          </table:table-cell>
          <table:table-cell table:style-name="Table.B2" office:value-type="string">
            <text:p text:style-name="P6">Конечные пользователи (люди, следящие за здоровьем)</text:p>
          </table:table-cell>
          <table:table-cell table:style-name="Table.C4" office:value-type="string">
            <text:p text:style-name="P6">Высокий</text:p>
          </table:table-cell>
          <table:table-cell table:style-name="Table.D2" office:value-type="string">
            <text:p text:style-name="P6">Низкое</text:p>
          </table:table-cell>
          <table:table-cell table:style-name="Table.E4" office:value-type="string">
            <text:p text:style-name="P6">Информировать</text:p>
          </table:table-cell>
        </table:table-row>
        <table:table-row>
          <table:table-cell table:style-name="Table.A1" office:value-type="string">
            <text:p text:style-name="P7">4</text:p>
          </table:table-cell>
          <table:table-cell table:style-name="Table.B2" office:value-type="string">
            <text:p text:style-name="P6">Нутрициологи / диетологи (эксперты контента)</text:p>
          </table:table-cell>
          <table:table-cell table:style-name="Table.C5" office:value-type="string">
            <text:p text:style-name="P6">Высокий</text:p>
          </table:table-cell>
          <table:table-cell table:style-name="Table.D2" office:value-type="string">
            <text:p text:style-name="P6">Среднее</text:p>
          </table:table-cell>
          <table:table-cell table:style-name="Table.E5" office:value-type="string">
            <text:p text:style-name="P6">Информировать</text:p>
          </table:table-cell>
        </table:table-row>
        <table:table-row>
          <table:table-cell table:style-name="Table.A1" office:value-type="string">
            <text:p text:style-name="P7">5</text:p>
          </table:table-cell>
          <table:table-cell table:style-name="Table.B2" office:value-type="string">
            <text:p text:style-name="P6">Фитнес-тренеры</text:p>
          </table:table-cell>
          <table:table-cell table:style-name="Table.C6" office:value-type="string">
            <text:p text:style-name="P6">Средний</text:p>
          </table:table-cell>
          <table:table-cell table:style-name="Table.D2" office:value-type="string">
            <text:p text:style-name="P6">Низкое</text:p>
          </table:table-cell>
          <table:table-cell table:style-name="Table.E6" office:value-type="string">
            <text:p text:style-name="P6">Информировать</text:p>
          </table:table-cell>
        </table:table-row>
        <table:table-row>
          <table:table-cell table:style-name="Table.A1" office:value-type="string">
            <text:p text:style-name="P7">6</text:p>
          </table:table-cell>
          <table:table-cell table:style-name="Table.B2" office:value-type="string">
            <text:p text:style-name="P6">Маркетологи и PR-специалисты</text:p>
          </table:table-cell>
          <table:table-cell table:style-name="Table.C7" office:value-type="string">
            <text:p text:style-name="P6">Средний</text:p>
          </table:table-cell>
          <table:table-cell table:style-name="Table.D2" office:value-type="string">
            <text:p text:style-name="P6">Среднее</text:p>
          </table:table-cell>
          <table:table-cell table:style-name="Table.E7" office:value-type="string">
            <text:p text:style-name="P6">Информировать</text:p>
          </table:table-cell>
        </table:table-row>
        <table:table-row>
          <table:table-cell table:style-name="Table.A1" office:value-type="string">
            <text:p text:style-name="P7">7</text:p>
          </table:table-cell>
          <table:table-cell table:style-name="Table.B2" office:value-type="string">
            <text:p text:style-name="P6">App Store / Google Play (площадки дистрибуции)</text:p>
          </table:table-cell>
          <table:table-cell table:style-name="Table.C8" office:value-type="string">
            <text:p text:style-name="P6">Низкий</text:p>
          </table:table-cell>
          <table:table-cell table:style-name="Table.D2" office:value-type="string">
            <text:p text:style-name="P6">Высокое</text:p>
          </table:table-cell>
          <table:table-cell table:style-name="Table.E8" office:value-type="string">
            <text:p text:style-name="P6">Удовлетворять</text:p>
          </table:table-cell>
        </table:table-row>
        <table:table-row>
          <table:table-cell table:style-name="Table.A1" office:value-type="string">
            <text:p text:style-name="P7">8</text:p>
          </table:table-cell>
          <table:table-cell table:style-name="Table.B2" office:value-type="string">
            <text:p text:style-name="P6">Конкуренты (аналогичные приложения)</text:p>
          </table:table-cell>
          <table:table-cell table:style-name="Table.C9" office:value-type="string">
            <text:p text:style-name="P6">Низкий</text:p>
          </table:table-cell>
          <table:table-cell table:style-name="Table.D2" office:value-type="string">
            <text:p text:style-name="P6">Низкое</text:p>
          </table:table-cell>
          <table:table-cell table:style-name="Table.E9" office:value-type="string">
            <text:p text:style-name="P6">Наблюдать</text:p>
          </table:table-cell>
        </table:table-row>
        <table:table-row>
          <table:table-cell table:style-name="Table.A1" office:value-type="string">
            <text:p text:style-name="P7">9</text:p>
          </table:table-cell>
          <table:table-cell table:style-name="Table.B2" office:value-type="string">
            <text:p text:style-name="P6">Регулирующие органы (Роспотребнадзор, защита данных)</text:p>
          </table:table-cell>
          <table:table-cell table:style-name="Table.C10" office:value-type="string">
            <text:p text:style-name="P6">Низкий</text:p>
          </table:table-cell>
          <table:table-cell table:style-name="Table.D2" office:value-type="string">
            <text:p text:style-name="P6">Высокое</text:p>
          </table:table-cell>
          <table:table-cell table:style-name="Table.E10" office:value-type="string">
            <text:p text:style-name="P6">Удовлетворять</text:p>
          </table:table-cell>
        </table:table-row>
        <table:table-row>
          <table:table-cell table:style-name="Table.A1" office:value-type="string">
            <text:p text:style-name="P7">10</text:p>
          </table:table-cell>
          <table:table-cell table:style-name="Table.B2" office:value-type="string">
            <text:p text:style-name="P6">Партнёры (спортзалы, магазины здорового питания)</text:p>
          </table:table-cell>
          <table:table-cell table:style-name="Table.C11" office:value-type="string">
            <text:p text:style-name="P6">Средний</text:p>
          </table:table-cell>
          <table:table-cell table:style-name="Table.D2" office:value-type="string">
            <text:p text:style-name="P6">Низкое</text:p>
          </table:table-cell>
          <table:table-cell table:style-name="Table.E11" office:value-type="string">
            <text:p text:style-name="P6">Информировать</text:p>
          </table:table-cell>
        </table:table-row>
      </table:table>
      <text:p text:style-name="P5"/>
      <text:p text:style-name="P2"/>
      <text:p text:style-name="P2"><text:soft-page-break/>Матрица «Влияние / Интерес»</text:p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row>
          <table:table-cell table:style-name="Table_5f_1.A1" office:value-type="string">
            <text:p text:style-name="P3"/>
          </table:table-cell>
          <table:table-cell table:style-name="Table_5f_1.A1" office:value-type="string">
            <text:p text:style-name="P3">Низкий интерес</text:p>
          </table:table-cell>
          <table:table-cell table:style-name="Table_5f_1.A1" office:value-type="string">
            <text:p text:style-name="P3">Высокий интерес</text:p>
          </table:table-cell>
        </table:table-row>
        <table:table-row>
          <table:table-cell table:style-name="Table_5f_1.A1" office:value-type="string">
            <text:p text:style-name="P3">Высокое влияние</text:p>
          </table:table-cell>
          <table:table-cell table:style-name="Table_5f_1.A1" office:value-type="string">
            <text:p text:style-name="P6">App Store / Google Play; Регулирующие органы (<text:span text:style-name="T1">удовлетворять</text:span>)</text:p>
          </table:table-cell>
          <table:table-cell table:style-name="Table_5f_1.A1" office:value-type="string">
            <text:p text:style-name="P6">Инвестор / заказчик; Команда разработки (<text:span text:style-name="T1">управлять тесно</text:span>)</text:p>
          </table:table-cell>
        </table:table-row>
        <table:table-row>
          <table:table-cell table:style-name="Table_5f_1.A1" office:value-type="string">
            <text:p text:style-name="P3">Низкое влияние</text:p>
          </table:table-cell>
          <table:table-cell table:style-name="Table_5f_1.A1" office:value-type="string">
            <text:p text:style-name="P6">Конкуренты (<text:span text:style-name="T1">наблюдать</text:span>)</text:p>
          </table:table-cell>
          <table:table-cell table:style-name="Table_5f_1.A1" office:value-type="string">
            <text:p text:style-name="P6">Пользователи; Нутрициологи; Фитнес-тренеры; Маркетологи; Партнёры (<text:span text:style-name="T1">информировать</text:span>)</text:p>
          </table:table-cell>
        </table:table-row>
      </table:table>
      <text:p text:style-name="P5"/>
      <text:p text:style-name="P5"/>
      <text:p text:style-name="P2">Задание 2. Общая цель с каждым стейкхолдером</text:p>
      <table:table table:name="Table_2" table:style-name="Table_5f_2">
        <table:table-column table:style-name="Table_5f_2.A"/>
        <table:table-column table:style-name="Table_5f_2.B"/>
        <table:table-column table:style-name="Table_5f_2.C"/>
        <table:table-row>
          <table:table-cell table:style-name="Table_5f_2.A1" office:value-type="string">
            <text:p text:style-name="P4">№</text:p>
          </table:table-cell>
          <table:table-cell table:style-name="Table_5f_2.B1" office:value-type="string">
            <text:p text:style-name="P3">Стейкхолдер</text:p>
          </table:table-cell>
          <table:table-cell table:style-name="Table_5f_2.C1" office:value-type="string">
            <text:p text:style-name="P3">Общая цель</text:p>
          </table:table-cell>
        </table:table-row>
        <table:table-row>
          <table:table-cell table:style-name="Table_5f_2.A1" office:value-type="string">
            <text:p text:style-name="P7">1</text:p>
          </table:table-cell>
          <table:table-cell table:style-name="Table_5f_2.B2" office:value-type="string">
            <text:p text:style-name="P3">Инвестор / заказчик</text:p>
          </table:table-cell>
          <table:table-cell table:style-name="Table_5f_2.C2" office:value-type="string">
            <text:p text:style-name="P6">Вывести приложение на рынок к 1 марта 2027 г. и достичь 50 000 активных пользователей к 1 марта 2028 г., обеспечив возврат инвестиций</text:p>
          </table:table-cell>
        </table:table-row>
        <table:table-row>
          <table:table-cell table:style-name="Table_5f_2.A1" office:value-type="string">
            <text:p text:style-name="P7">2</text:p>
          </table:table-cell>
          <table:table-cell table:style-name="Table_5f_2.B3" office:value-type="string">
            <text:p text:style-name="P3">Команда разработки</text:p>
          </table:table-cell>
          <table:table-cell table:style-name="Table_5f_2.C3" office:value-type="string">
            <text:p text:style-name="P6">К 1 февраля 2027 г. создать качественный, стабильный и удобный продукт (MVP), который получит рейтинг не ниже 4,5 в магазинах приложений</text:p>
          </table:table-cell>
        </table:table-row>
        <table:table-row>
          <table:table-cell table:style-name="Table_5f_2.A1" office:value-type="string">
            <text:p text:style-name="P7">3</text:p>
          </table:table-cell>
          <table:table-cell table:style-name="Table_5f_2.B4" office:value-type="string">
            <text:p text:style-name="P3">Конечные пользователи</text:p>
          </table:table-cell>
          <table:table-cell table:style-name="Table_5f_2.C4" office:value-type="string">
            <text:p text:style-name="P6">Помочь пользователям сформировать здоровые привычки питания и активности, обеспечив удержание не менее 40% пользователей к 1 июня 2027 г. (через 3 месяца после релиза)</text:p>
          </table:table-cell>
        </table:table-row>
        <table:table-row>
          <table:table-cell table:style-name="Table_5f_2.A1" office:value-type="string">
            <text:p text:style-name="P7">4</text:p>
          </table:table-cell>
          <table:table-cell table:style-name="Table_5f_2.B5" office:value-type="string">
            <text:p text:style-name="P3">Нутрициологи / диетологи</text:p>
          </table:table-cell>
          <table:table-cell table:style-name="Table_5f_2.C5" office:value-type="string">
            <text:p text:style-name="P6">К 15 января 2027 г. подготовить научно обоснованную базу рекомендаций по питанию, повысив доверие пользователей и профессиональную репутацию экспертов</text:p>
          </table:table-cell>
        </table:table-row>
        <table:table-row>
          <table:table-cell table:style-name="Table_5f_2.A1" office:value-type="string">
            <text:p text:style-name="P7">5</text:p>
          </table:table-cell>
          <table:table-cell table:style-name="Table_5f_2.B6" office:value-type="string">
            <text:p text:style-name="P3">Фитнес-тренеры</text:p>
          </table:table-cell>
          <table:table-cell table:style-name="Table_5f_2.C6" office:value-type="string">
            <text:p text:style-name="P6">К 1 февраля 2027 г. интегрировать в приложение программы тренировок, разработанные профессиональными тренерами, расширив их клиентскую базу</text:p>
          </table:table-cell>
        </table:table-row>
        <table:table-row>
          <table:table-cell table:style-name="Table_5f_2.A1" office:value-type="string">
            <text:p text:style-name="P7">6</text:p>
          </table:table-cell>
          <table:table-cell table:style-name="Table_5f_2.B7" office:value-type="string">
            <text:p text:style-name="P3">Маркетологи и PR</text:p>
          </table:table-cell>
          <table:table-cell table:style-name="Table_5f_2.C7" office:value-type="string">
            <text:p text:style-name="P6">К 1 февраля 2027 г. сформировать узнаваемый бренд приложения; с 1 марта 2027 г. обеспечить стабильный поток новых пользователей через эффективные каналы продвижения</text:p>
          </table:table-cell>
        </table:table-row>
        <table:table-row>
          <table:table-cell table:style-name="Table_5f_2.A1" office:value-type="string">
            <text:p text:style-name="P7">7</text:p>
          </table:table-cell>
          <table:table-cell table:style-name="Table_5f_2.B8" office:value-type="string">
            <text:p text:style-name="P3">App Store / Google Play</text:p>
          </table:table-cell>
          <table:table-cell table:style-name="Table_5f_2.C8" office:value-type="string">
            <text:p text:style-name="P6">К 1 марта 2027 г. обеспечить соответствие приложения всем требованиям площадок для <text:soft-page-break/>успешной публикации и продвижения в каталоге</text:p>
          </table:table-cell>
        </table:table-row>
        <table:table-row>
          <table:table-cell table:style-name="Table_5f_2.A1" office:value-type="string">
            <text:p text:style-name="P7">8</text:p>
          </table:table-cell>
          <table:table-cell table:style-name="Table_5f_2.B9" office:value-type="string">
            <text:p text:style-name="P3">Конкуренты</text:p>
          </table:table-cell>
          <table:table-cell table:style-name="Table_5f_2.C9" office:value-type="string">
            <text:p text:style-name="P6">(Прямая общая цель отсутствует — ведётся мониторинг их решений для определения конкурентных преимуществ нашего продукта)</text:p>
          </table:table-cell>
        </table:table-row>
        <table:table-row>
          <table:table-cell table:style-name="Table_5f_2.A1" office:value-type="string">
            <text:p text:style-name="P7">9</text:p>
          </table:table-cell>
          <table:table-cell table:style-name="Table_5f_2.B10" office:value-type="string">
            <text:p text:style-name="P3">Регулирующие органы</text:p>
          </table:table-cell>
          <table:table-cell table:style-name="Table_5f_2.C10" office:value-type="string">
            <text:p text:style-name="P6">К 15 февраля 2027 г. обеспечить полное соответствие приложения требованиям законодательства в области защиты персональных данных и медицинских рекомендаций</text:p>
          </table:table-cell>
        </table:table-row>
        <table:table-row>
          <table:table-cell table:style-name="Table_5f_2.A1" office:value-type="string">
            <text:p text:style-name="P7">10</text:p>
          </table:table-cell>
          <table:table-cell table:style-name="Table_5f_2.B11" office:value-type="string">
            <text:p text:style-name="P3">Партнёры (спортзалы, магазины)</text:p>
          </table:table-cell>
          <table:table-cell table:style-name="Table_5f_2.C11" office:value-type="string">
            <text:p text:style-name="P6">К 1 апреля 2027 г. организовать взаимовыгодное сотрудничество: приложение рекомендует услуги партнёров, а партнёры продвигают приложение среди своих клиентов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6-06-18T15:11:38.699000000</dc:date>
    <meta:editing-duration>PT1M22S</meta:editing-duration>
    <meta:editing-cycles>1</meta:editing-cycles>
    <meta:document-statistic meta:table-count="3" meta:image-count="0" meta:object-count="0" meta:page-count="3" meta:paragraph-count="105" meta:word-count="408" meta:character-count="3024" meta:non-whitespace-character-count="2720"/>
  </office:meta>
</office:document-meta>
</file>