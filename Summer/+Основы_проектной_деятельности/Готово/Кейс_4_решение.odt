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" style:family="table">
      <style:table-properties style:width="17cm" table:align="margins"/>
    </style:style>
    <style:style style:name="Table.A" style:family="table-column">
      <style:table-column-properties style:column-width="8.5cm" style:rel-column-width="32767*"/>
    </style:style>
    <style:style style:name="Table.B" style:family="table-column">
      <style:table-column-properties style:column-width="8.5cm" style:rel-column-width="32768*"/>
    </style:style>
    <style:style style:name="Table.A1" style:family="table-cell">
      <style:table-cell-properties fo:padding="0.101cm" fo:border="none"/>
    </style:style>
    <style:style style:name="Table_5f_1" style:display-name="Table_1" style:family="table">
      <style:table-properties style:width="17cm" table:align="margins"/>
    </style:style>
    <style:style style:name="Table_5f_1.A" style:display-name="Table_1.A" style:family="table-column">
      <style:table-column-properties style:column-width="8.5cm" style:rel-column-width="32767*"/>
    </style:style>
    <style:style style:name="Table_5f_1.B" style:display-name="Table_1.B" style:family="table-column">
      <style:table-column-properties style:column-width="8.5cm" style:rel-column-width="32768*"/>
    </style:style>
    <style:style style:name="Table_5f_1.A1" style:display-name="Table_1.A1" style:family="table-cell">
      <style:table-cell-properties fo:padding="0.101cm" fo:border="none"/>
    </style:style>
    <style:style style:name="Table_5f_2" style:display-name="Table_2" style:family="table">
      <style:table-properties style:width="17cm" table:align="margins"/>
    </style:style>
    <style:style style:name="Table_5f_2.A" style:display-name="Table_2.A" style:family="table-column">
      <style:table-column-properties style:column-width="8.5cm" style:rel-column-width="32767*"/>
    </style:style>
    <style:style style:name="Table_5f_2.B" style:display-name="Table_2.B" style:family="table-column">
      <style:table-column-properties style:column-width="8.5cm" style:rel-column-width="32768*"/>
    </style:style>
    <style:style style:name="Table_5f_2.A1" style:display-name="Table_2.A1" style:family="table-cell">
      <style:table-cell-properties fo:padding="0.101cm" fo:border="none"/>
    </style:style>
    <style:style style:name="Table_5f_3" style:display-name="Table_3" style:family="table">
      <style:table-properties style:width="17cm" table:align="margins"/>
    </style:style>
    <style:style style:name="Table_5f_3.A" style:display-name="Table_3.A" style:family="table-column">
      <style:table-column-properties style:column-width="8.5cm" style:rel-column-width="32767*"/>
    </style:style>
    <style:style style:name="Table_5f_3.B" style:display-name="Table_3.B" style:family="table-column">
      <style:table-column-properties style:column-width="8.5cm" style:rel-column-width="32768*"/>
    </style:style>
    <style:style style:name="Table_5f_3.A1" style:display-name="Table_3.A1" style:family="table-cell">
      <style:table-cell-properties fo:padding="0.101cm" fo:border="none"/>
    </style:style>
    <style:style style:name="Table_5f_4" style:display-name="Table_4" style:family="table">
      <style:table-properties style:width="17cm" table:align="margins"/>
    </style:style>
    <style:style style:name="Table_5f_4.A" style:display-name="Table_4.A" style:family="table-column">
      <style:table-column-properties style:column-width="8.5cm" style:rel-column-width="32767*"/>
    </style:style>
    <style:style style:name="Table_5f_4.B" style:display-name="Table_4.B" style:family="table-column">
      <style:table-column-properties style:column-width="8.5cm" style:rel-column-width="32768*"/>
    </style:style>
    <style:style style:name="Table_5f_4.A1" style:display-name="Table_4.A1" style:family="table-cell">
      <style:table-cell-properties fo:padding="0.101cm" fo:border="none"/>
    </style:style>
    <style:style style:name="Table_5f_5" style:display-name="Table_5" style:family="table">
      <style:table-properties style:width="17cm" table:align="margins"/>
    </style:style>
    <style:style style:name="Table_5f_5.A" style:display-name="Table_5.A" style:family="table-column">
      <style:table-column-properties style:column-width="8.5cm" style:rel-column-width="32767*"/>
    </style:style>
    <style:style style:name="Table_5f_5.B" style:display-name="Table_5.B" style:family="table-column">
      <style:table-column-properties style:column-width="8.5cm" style:rel-column-width="32768*"/>
    </style:style>
    <style:style style:name="Table_5f_5.A1" style:display-name="Table_5.A1" style:family="table-cell">
      <style:table-cell-properties fo:padding="0.101cm" fo:border="none"/>
    </style:style>
    <style:style style:name="P1" style:family="paragraph" style:parent-style-name="Standard" style:list-style-name="">
      <style:paragraph-properties fo:margin-top="0cm" fo:margin-bottom="0.3cm" style:contextual-spacing="false" fo:line-height="100%"/>
      <style:text-properties style:font-name="Times New Roman" fo:font-size="14pt" fo:font-weight="bold"/>
    </style:style>
    <style:style style:name="P2" style:family="paragraph" style:parent-style-name="Standard">
      <style:paragraph-properties fo:margin-top="0.499cm" fo:margin-bottom="0.3cm" style:contextual-spacing="false" fo:line-height="100%"/>
      <style:text-properties style:font-name="Times New Roman" fo:font-size="14pt" fo:font-weight="bold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bold"/>
    </style:style>
    <style:style style:name="P4" style:family="paragraph" style:parent-style-name="Standard">
      <style:paragraph-properties fo:margin-top="0cm" fo:margin-bottom="0.199cm" style:contextual-spacing="false" fo:line-height="100%"/>
      <style:text-properties style:font-name="Times New Roman" fo:font-size="14pt"/>
    </style:style>
    <style:style style:name="P5" style:family="paragraph" style:parent-style-name="Standard">
      <style:paragraph-properties fo:margin-left="0.801cm" fo:margin-top="0cm" fo:margin-bottom="0.101cm" style:contextual-spacing="false" fo:line-height="100%"/>
      <style:text-properties style:font-name="Times New Roman" fo:font-size="14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4pt"/>
    </style:style>
    <style:style style:name="P7" style:family="paragraph" style:parent-style-name="Standard">
      <style:paragraph-properties fo:margin-top="0.499cm" fo:margin-bottom="0.3cm" style:contextual-spacing="false" fo:line-height="100%"/>
      <style:text-properties style:font-name="Times New Roman" fo:font-size="14pt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Кейс 4. Инструменты подбора команды проекта</text:h>
      <text:p text:style-name="P2">Исходные данные</text:p>
      <text:p text:style-name="P4">Проект: организация инновационного центра по созданию развивающих игр для детей.</text:p>
      <text:p text:style-name="P4"/>
      <text:p text:style-name="P2">Задание 1. Анализ инструментов подбора специалистов</text:p>
      <text:p text:style-name="P2">1. Тесты на профпригодность</text:p>
      <table:table table:name="Table" table:style-name="Table">
        <table:table-column table:style-name="Table.A"/>
        <table:table-column table:style-name="Table.B"/>
        <table:table-row>
          <table:table-cell table:style-name="Table.A1" office:value-type="string">
            <text:p text:style-name="P3">Достоинства</text:p>
          </table:table-cell>
          <table:table-cell table:style-name="Table.A1" office:value-type="string">
            <text:p text:style-name="P3">Недостатки</text:p>
          </table:table-cell>
        </table:table-row>
        <table:table-row>
          <table:table-cell table:style-name="Table.A1" office:value-type="string">
            <text:p text:style-name="P6">Позволяют оценить практические навыки кандидата в условиях, приближённых к реальной работе</text:p>
          </table:table-cell>
          <table:table-cell table:style-name="Table.A1" office:value-type="string">
            <text:p text:style-name="P6">Разработка качественных тестов требует значительных затрат времени и ресурсов</text:p>
          </table:table-cell>
        </table:table-row>
        <table:table-row>
          <table:table-cell table:style-name="Table.A1" office:value-type="string">
            <text:p text:style-name="P6">Высокая прогностическая валидность — результаты коррелируют с будущей эффективностью</text:p>
          </table:table-cell>
          <table:table-cell table:style-name="Table.A1" office:value-type="string">
            <text:p text:style-name="P6">Могут не учитывать креативность и нестандартное мышление, важные для инновационного проекта</text:p>
          </table:table-cell>
        </table:table-row>
        <table:table-row>
          <table:table-cell table:style-name="Table.A1" office:value-type="string">
            <text:p text:style-name="P6">Объективность оценки — результаты измеримы и сопоставимы</text:p>
          </table:table-cell>
          <table:table-cell table:style-name="Table.A1" office:value-type="string">
            <text:p text:style-name="P6">Стрессовая ситуация тестирования может исказить реальный уровень компетенций кандидата</text:p>
          </table:table-cell>
        </table:table-row>
        <table:table-row>
          <table:table-cell table:style-name="Table.A1" office:value-type="string">
            <text:p text:style-name="P6">Возможность оценить конкретные технические навыки (программирование, дизайн, педагогика)</text:p>
          </table:table-cell>
          <table:table-cell table:style-name="Table.A1" office:value-type="string">
            <text:p text:style-name="P6">Не оценивают коммуникативные навыки и способность работать в команде</text:p>
          </table:table-cell>
        </table:table-row>
      </table:table>
      <text:p text:style-name="P4"/>
      <text:p text:style-name="P2">2. Общие тесты способностей</text:p>
      <table:table table:name="Table_1" table:style-name="Table_5f_1">
        <table:table-column table:style-name="Table_5f_1.A"/>
        <table:table-column table:style-name="Table_5f_1.B"/>
        <table:table-row>
          <table:table-cell table:style-name="Table_5f_1.A1" office:value-type="string">
            <text:p text:style-name="P3">Достоинства</text:p>
          </table:table-cell>
          <table:table-cell table:style-name="Table_5f_1.A1" office:value-type="string">
            <text:p text:style-name="P3">Недостатки</text:p>
          </table:table-cell>
        </table:table-row>
        <table:table-row>
          <table:table-cell table:style-name="Table_5f_1.A1" office:value-type="string">
            <text:p text:style-name="P6">Позволяют оценить общий интеллектуальный потенциал кандидата</text:p>
          </table:table-cell>
          <table:table-cell table:style-name="Table_5f_1.A1" office:value-type="string">
            <text:p text:style-name="P6">Не учитывают специфику предметной области (разработка игр для детей)</text:p>
          </table:table-cell>
        </table:table-row>
        <table:table-row>
          <table:table-cell table:style-name="Table_5f_1.A1" office:value-type="string">
            <text:p text:style-name="P6">Стандартизированы — можно сравнивать результаты разных кандидатов</text:p>
          </table:table-cell>
          <table:table-cell table:style-name="Table_5f_1.A1" office:value-type="string">
            <text:p text:style-name="P6">Высокий IQ не гарантирует успешность в конкретном проекте</text:p>
          </table:table-cell>
        </table:table-row>
        <table:table-row>
          <table:table-cell table:style-name="Table_5f_1.A1" office:value-type="string">
            <text:p text:style-name="P6">Быстрота проведения и обработки результатов</text:p>
          </table:table-cell>
          <table:table-cell table:style-name="Table_5f_1.A1" office:value-type="string">
            <text:p text:style-name="P6">Могут вызывать стресс у кандидатов, что искажает результаты</text:p>
          </table:table-cell>
        </table:table-row>
        <table:table-row>
          <table:table-cell table:style-name="Table_5f_1.A1" office:value-type="string">
            <text:p text:style-name="P6">Оценивают когнитивные способности: внимание, память, логику</text:p>
          </table:table-cell>
          <table:table-cell table:style-name="Table_5f_1.A1" office:value-type="string">
            <text:p text:style-name="P6">Не оценивают мотивацию, лидерские качества и креативность</text:p>
          </table:table-cell>
        </table:table-row>
      </table:table>
      <text:p text:style-name="P7"><text:soft-page-break/><text:span text:style-name="T1">3. Биографические тесты и изучение биографии</text:span></text:p>
      <table:table table:name="Table_2" table:style-name="Table_5f_2">
        <table:table-column table:style-name="Table_5f_2.A"/>
        <table:table-column table:style-name="Table_5f_2.B"/>
        <table:table-row>
          <table:table-cell table:style-name="Table_5f_2.A1" office:value-type="string">
            <text:p text:style-name="P3">Достоинства</text:p>
          </table:table-cell>
          <table:table-cell table:style-name="Table_5f_2.A1" office:value-type="string">
            <text:p text:style-name="P3">Недостатки</text:p>
          </table:table-cell>
        </table:table-row>
        <table:table-row>
          <table:table-cell table:style-name="Table_5f_2.A1" office:value-type="string">
            <text:p text:style-name="P6">Дают комплексное представление о жизненном пути и ценностях кандидата</text:p>
          </table:table-cell>
          <table:table-cell table:style-name="Table_5f_2.A1" office:value-type="string">
            <text:p text:style-name="P6">Субъективность интерпретации биографических данных</text:p>
          </table:table-cell>
        </table:table-row>
        <table:table-row>
          <table:table-cell table:style-name="Table_5f_2.A1" office:value-type="string">
            <text:p text:style-name="P6">Позволяют проследить профессиональное развитие и карьерный рост</text:p>
          </table:table-cell>
          <table:table-cell table:style-name="Table_5f_2.A1" office:value-type="string">
            <text:p text:style-name="P6">Информация может быть неполной или устаревшей</text:p>
          </table:table-cell>
        </table:table-row>
        <table:table-row>
          <table:table-cell table:style-name="Table_5f_2.A1" office:value-type="string">
            <text:p text:style-name="P6">Не вызывают стресса у кандидата</text:p>
          </table:table-cell>
          <table:table-cell table:style-name="Table_5f_2.A1" office:value-type="string">
            <text:p text:style-name="P6">Не отражают текущий уровень компетенций и потенциал развития</text:p>
          </table:table-cell>
        </table:table-row>
        <table:table-row>
          <table:table-cell table:style-name="Table_5f_2.A1" office:value-type="string">
            <text:p text:style-name="P6">Помогают оценить стабильность и надёжность кандидата</text:p>
          </table:table-cell>
          <table:table-cell table:style-name="Table_5f_2.A1" office:value-type="string">
            <text:p text:style-name="P6">Могут содержать предвзятость (дискриминация по возрасту, семейному положению)</text:p>
          </table:table-cell>
        </table:table-row>
      </table:table>
      <text:p text:style-name="P4"/>
      <text:p text:style-name="P2">4. Личностные тесты</text:p>
      <table:table table:name="Table_3" table:style-name="Table_5f_3">
        <table:table-column table:style-name="Table_5f_3.A"/>
        <table:table-column table:style-name="Table_5f_3.B"/>
        <table:table-row>
          <table:table-cell table:style-name="Table_5f_3.A1" office:value-type="string">
            <text:p text:style-name="P3">Достоинства</text:p>
          </table:table-cell>
          <table:table-cell table:style-name="Table_5f_3.A1" office:value-type="string">
            <text:p text:style-name="P3">Недостатки</text:p>
          </table:table-cell>
        </table:table-row>
        <table:table-row>
          <table:table-cell table:style-name="Table_5f_3.A1" office:value-type="string">
            <text:p text:style-name="P6">Позволяют оценить психологическую совместимость с командой</text:p>
          </table:table-cell>
          <table:table-cell table:style-name="Table_5f_3.A1" office:value-type="string">
            <text:p text:style-name="P6">Кандидаты могут давать социально желательные ответы</text:p>
          </table:table-cell>
        </table:table-row>
        <table:table-row>
          <table:table-cell table:style-name="Table_5f_3.A1" office:value-type="string">
            <text:p text:style-name="P6">Помогают определить стиль работы и коммуникации кандидата</text:p>
          </table:table-cell>
          <table:table-cell table:style-name="Table_5f_3.A1" office:value-type="string">
            <text:p text:style-name="P6">Результаты зависят от текущего эмоционального состояния</text:p>
          </table:table-cell>
        </table:table-row>
        <table:table-row>
          <table:table-cell table:style-name="Table_5f_3.A1" office:value-type="string">
            <text:p text:style-name="P6">Выявляют предрасположенность к определённым видам деятельности</text:p>
          </table:table-cell>
          <table:table-cell table:style-name="Table_5f_3.A1" office:value-type="string">
            <text:p text:style-name="P6">Низкая прогностическая валидность для конкретных рабочих задач</text:p>
          </table:table-cell>
        </table:table-row>
        <table:table-row>
          <table:table-cell table:style-name="Table_5f_3.A1" office:value-type="string">
            <text:p text:style-name="P6">Стандартизированы, позволяют сравнивать кандидатов</text:p>
          </table:table-cell>
          <table:table-cell table:style-name="Table_5f_3.A1" office:value-type="string">
            <text:p text:style-name="P6">Требуют квалифицированного психолога для интерпретации результатов</text:p>
          </table:table-cell>
        </table:table-row>
      </table:table>
      <text:p text:style-name="P4"/>
      <text:p text:style-name="P2">5. Интервью</text:p>
      <table:table table:name="Table_4" table:style-name="Table_5f_4">
        <table:table-column table:style-name="Table_5f_4.A"/>
        <table:table-column table:style-name="Table_5f_4.B"/>
        <table:table-row>
          <table:table-cell table:style-name="Table_5f_4.A1" office:value-type="string">
            <text:p text:style-name="P3">Достоинства</text:p>
          </table:table-cell>
          <table:table-cell table:style-name="Table_5f_4.A1" office:value-type="string">
            <text:p text:style-name="P3">Недостатки</text:p>
          </table:table-cell>
        </table:table-row>
        <table:table-row>
          <table:table-cell table:style-name="Table_5f_4.A1" office:value-type="string">
            <text:p text:style-name="P6">Позволяют оценить коммуникативные навыки, мотивацию и личностные качества</text:p>
          </table:table-cell>
          <table:table-cell table:style-name="Table_5f_4.A1" office:value-type="string">
            <text:p text:style-name="P6">Субъективность оценки интервьюера</text:p>
          </table:table-cell>
        </table:table-row>
        <table:table-row>
          <table:table-cell table:style-name="Table_5f_4.A1" office:value-type="string">
            <text:p text:style-name="P6">Гибкость — можно адаптировать вопросы в процессе беседы</text:p>
          </table:table-cell>
          <table:table-cell table:style-name="Table_5f_4.A1" office:value-type="string">
            <text:p text:style-name="P6">Высокие требования к квалификации интервьюера</text:p>
          </table:table-cell>
        </table:table-row>
        <table:table-row>
          <table:table-cell table:style-name="Table_5f_4.A1" office:value-type="string">
            <text:p text:style-name="P6">Возможность оценить «химию» между кандидатом и командой</text:p>
          </table:table-cell>
          <table:table-cell table:style-name="Table_5f_4.A1" office:value-type="string">
            <text:p text:style-name="P6">Занимает много времени при большом количестве кандидатов</text:p>
          </table:table-cell>
        </table:table-row>
        <text:soft-page-break/>
        <table:table-row>
          <table:table-cell table:style-name="Table_5f_4.A1" office:value-type="string">
            <text:p text:style-name="P6">Кандидат может задать вопросы и лучше понять проект</text:p>
          </table:table-cell>
          <table:table-cell table:style-name="Table_5f_4.A1" office:value-type="string">
            <text:p text:style-name="P6">Кандидат может подготовить «правильные» ответы, не отражающие реальность</text:p>
          </table:table-cell>
        </table:table-row>
      </table:table>
      <text:p text:style-name="P4"/>
      <text:p text:style-name="P2">6. Рекомендации</text:p>
      <table:table table:name="Table_5" table:style-name="Table_5f_5">
        <table:table-column table:style-name="Table_5f_5.A"/>
        <table:table-column table:style-name="Table_5f_5.B"/>
        <table:table-row>
          <table:table-cell table:style-name="Table_5f_5.A1" office:value-type="string">
            <text:p text:style-name="P3">Достоинства</text:p>
          </table:table-cell>
          <table:table-cell table:style-name="Table_5f_5.A1" office:value-type="string">
            <text:p text:style-name="P3">Недостатки</text:p>
          </table:table-cell>
        </table:table-row>
        <table:table-row>
          <table:table-cell table:style-name="Table_5f_5.A1" office:value-type="string">
            <text:p text:style-name="P6">Дают информацию о реальном опыте работы кандидата от третьих лиц</text:p>
          </table:table-cell>
          <table:table-cell table:style-name="Table_5f_5.A1" office:value-type="string">
            <text:p text:style-name="P6">Рекомендатели могут быть предвзяты (как положительно, так и отрицательно)</text:p>
          </table:table-cell>
        </table:table-row>
        <table:table-row>
          <table:table-cell table:style-name="Table_5f_5.A1" office:value-type="string">
            <text:p text:style-name="P6">Позволяют подтвердить или опровергнуть заявленные кандидатом достижения</text:p>
          </table:table-cell>
          <table:table-cell table:style-name="Table_5f_5.A1" office:value-type="string">
            <text:p text:style-name="P6">Не все кандидаты могут предоставить рекомендации (конфиденциальность)</text:p>
          </table:table-cell>
        </table:table-row>
        <table:table-row>
          <table:table-cell table:style-name="Table_5f_5.A1" office:value-type="string">
            <text:p text:style-name="P6">Низкие затраты на получение</text:p>
          </table:table-cell>
          <table:table-cell table:style-name="Table_5f_5.A1" office:value-type="string">
            <text:p text:style-name="P6">Информация может быть неактуальной или поверхностной</text:p>
          </table:table-cell>
        </table:table-row>
        <table:table-row>
          <table:table-cell table:style-name="Table_5f_5.A1" office:value-type="string">
            <text:p text:style-name="P6">Возможность узнать о поведении кандидата в реальных рабочих ситуациях</text:p>
          </table:table-cell>
          <table:table-cell table:style-name="Table_5f_5.A1" office:value-type="string">
            <text:p text:style-name="P6">Сложно проверить достоверность рекомендации от частных лиц</text:p>
          </table:table-cell>
        </table:table-row>
      </table:table>
      <text:p text:style-name="P4"/>
      <text:p text:style-name="P2">Задание 2. Наиболее предпочтительный инструмент</text:p>
      <text:p text:style-name="P4">Для проекта создания инновационного центра по разработке развивающих игр для детей наиболее предпочтительным является <text:span text:style-name="T1">комбинированный подход</text:span>, включающий:</text:p>
      <text:p text:style-name="P5"><text:span text:style-name="T1">Интервью</text:span> (основной инструмент) — позволяет оценить креативность, мотивацию, способность генерировать идеи и работать в команде. Для инновационного проекта критически важны «мягкие» навыки: умение мыслить нестандартно, понимание детской психологии, способность к междисциплинарному сотрудничеству — всё это лучше всего выявляется в ходе структурированного интервью.</text:p>
      <text:p text:style-name="P5"><text:span text:style-name="T1">Тесты на профпригодность</text:span> (дополнительный инструмент) — для оценки конкретных технических компетенций (программирование, геймдизайн, педагогический опыт). Кандидату можно предложить разработать прототип простой развивающей игры или предложить концепцию.</text:p>
      <text:p text:style-name="P4"><text:span text:style-name="T1">Обоснование выбора:</text:span> Инновационный центр по созданию развивающих игр для детей требует от сотрудников сочетания творческих способностей, технических навыков и понимания возрастной психологии. Стандартные тесты способностей и личностные тесты не могут в полной мере оценить эти комплексные компетенции. Интервью позволяет выявить творческий потенциал, а тест на профпригодность — подтвердить практические навык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6-06-18T15:12:40.151000000</dc:date>
    <meta:editing-duration>PT51S</meta:editing-duration>
    <meta:editing-cycles>1</meta:editing-cycles>
    <meta:document-statistic meta:table-count="6" meta:image-count="0" meta:object-count="0" meta:page-count="3" meta:paragraph-count="75" meta:word-count="532" meta:character-count="4623" meta:non-whitespace-character-count="4158"/>
  </office:meta>
</office:document-meta>
</file>