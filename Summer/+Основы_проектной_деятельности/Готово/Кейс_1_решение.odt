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" style:family="table">
      <style:table-properties style:width="16.995cm" table:align="left"/>
    </style:style>
    <style:style style:name="Table.A" style:family="table-column">
      <style:table-column-properties style:column-width="4.009cm"/>
    </style:style>
    <style:style style:name="Table.B" style:family="table-column">
      <style:table-column-properties style:column-width="12.986cm"/>
    </style:style>
    <style:style style:name="Table.A1" style:family="table-cell">
      <style:table-cell-properties fo:padding="0.101cm" fo:border="none"/>
    </style:style>
    <style:style style:name="Table.A2" style:family="table-cell">
      <style:table-cell-properties style:vertical-align="middle" fo:padding="0.101cm" fo:border="none"/>
    </style:style>
    <style:style style:name="Table_5f_1" style:display-name="Table_1" style:family="table">
      <style:table-properties style:width="16.995cm" table:align="left"/>
    </style:style>
    <style:style style:name="Table_5f_1.A" style:display-name="Table_1.A" style:family="table-column">
      <style:table-column-properties style:column-width="5.666cm"/>
    </style:style>
    <style:style style:name="Table_5f_1.B" style:display-name="Table_1.B" style:family="table-column">
      <style:table-column-properties style:column-width="7.237cm"/>
    </style:style>
    <style:style style:name="Table_5f_1.C" style:display-name="Table_1.C" style:family="table-column">
      <style:table-column-properties style:column-width="4.092cm"/>
    </style:style>
    <style:style style:name="Table_5f_1.A1" style:display-name="Table_1.A1" style:family="table-cell">
      <style:table-cell-properties style:vertical-align="middle" fo:padding="0.101cm" fo:border="none"/>
    </style:style>
    <style:style style:name="Table_5f_1.A2" style:display-name="Table_1.A2" style:family="table-cell">
      <style:table-cell-properties fo:padding="0.101cm" fo:border="none"/>
    </style:style>
    <style:style style:name="Table_5f_1.B2" style:display-name="Table_1.B2" style:family="table-cell">
      <style:table-cell-properties fo:padding="0.101cm" fo:border="none"/>
    </style:style>
    <style:style style:name="Table_5f_1.C2" style:display-name="Table_1.C2" style:family="table-cell">
      <style:table-cell-properties fo:padding="0.101cm" fo:border="none"/>
    </style:style>
    <style:style style:name="Table_5f_1.A3" style:display-name="Table_1.A3" style:family="table-cell">
      <style:table-cell-properties fo:padding="0.101cm" fo:border="none"/>
    </style:style>
    <style:style style:name="Table_5f_1.B3" style:display-name="Table_1.B3" style:family="table-cell">
      <style:table-cell-properties fo:padding="0.101cm" fo:border="none"/>
    </style:style>
    <style:style style:name="Table_5f_1.C3" style:display-name="Table_1.C3" style:family="table-cell">
      <style:table-cell-properties fo:padding="0.101cm" fo:border="none"/>
    </style:style>
    <style:style style:name="Table_5f_1.A4" style:display-name="Table_1.A4" style:family="table-cell">
      <style:table-cell-properties fo:padding="0.101cm" fo:border="none"/>
    </style:style>
    <style:style style:name="Table_5f_1.B4" style:display-name="Table_1.B4" style:family="table-cell">
      <style:table-cell-properties fo:padding="0.101cm" fo:border="none"/>
    </style:style>
    <style:style style:name="Table_5f_1.C4" style:display-name="Table_1.C4" style:family="table-cell">
      <style:table-cell-properties fo:padding="0.101cm" fo:border="none"/>
    </style:style>
    <style:style style:name="Table_5f_1.A5" style:display-name="Table_1.A5" style:family="table-cell">
      <style:table-cell-properties fo:padding="0.101cm" fo:border="none"/>
    </style:style>
    <style:style style:name="Table_5f_1.B5" style:display-name="Table_1.B5" style:family="table-cell">
      <style:table-cell-properties fo:padding="0.101cm" fo:border="none"/>
    </style:style>
    <style:style style:name="Table_5f_1.C5" style:display-name="Table_1.C5" style:family="table-cell">
      <style:table-cell-properties fo:padding="0.101cm" fo:border="none"/>
    </style:style>
    <style:style style:name="Table_5f_1.A6" style:display-name="Table_1.A6" style:family="table-cell">
      <style:table-cell-properties fo:padding="0.101cm" fo:border="none"/>
    </style:style>
    <style:style style:name="Table_5f_1.B6" style:display-name="Table_1.B6" style:family="table-cell">
      <style:table-cell-properties fo:padding="0.101cm" fo:border="none"/>
    </style:style>
    <style:style style:name="Table_5f_1.C6" style:display-name="Table_1.C6" style:family="table-cell">
      <style:table-cell-properties fo:padding="0.101cm" fo:border="none"/>
    </style:style>
    <style:style style:name="Table_5f_2" style:display-name="Table_2" style:family="table">
      <style:table-properties style:width="16.995cm" table:align="left"/>
    </style:style>
    <style:style style:name="Table_5f_2.A" style:display-name="Table_2.A" style:family="table-column">
      <style:table-column-properties style:column-width="5.108cm"/>
    </style:style>
    <style:style style:name="Table_5f_2.B" style:display-name="Table_2.B" style:family="table-column">
      <style:table-column-properties style:column-width="11.887cm"/>
    </style:style>
    <style:style style:name="Table_5f_2.A1" style:display-name="Table_2.A1" style:family="table-cell">
      <style:table-cell-properties fo:padding="0.101cm" fo:border="none"/>
    </style:style>
    <style:style style:name="Table_5f_2.A2" style:display-name="Table_2.A2" style:family="table-cell">
      <style:table-cell-properties style:vertical-align="middle" fo:padding="0.101cm" fo:border="none"/>
    </style:style>
    <style:style style:name="Table_5f_3" style:display-name="Table_3" style:family="table">
      <style:table-properties style:width="16.995cm" table:align="left"/>
    </style:style>
    <style:style style:name="Table_5f_3.A" style:display-name="Table_3.A" style:family="table-column">
      <style:table-column-properties style:column-width="5.006cm"/>
    </style:style>
    <style:style style:name="Table_5f_3.B" style:display-name="Table_3.B" style:family="table-column">
      <style:table-column-properties style:column-width="11.989cm"/>
    </style:style>
    <style:style style:name="Table_5f_3.A1" style:display-name="Table_3.A1" style:family="table-cell">
      <style:table-cell-properties style:vertical-align="middle" fo:padding="0.101cm" fo:border="none"/>
    </style:style>
    <style:style style:name="Table_5f_3.B2" style:display-name="Table_3.B2" style:family="table-cell">
      <style:table-cell-properties fo:padding="0.101cm" fo:border="none"/>
    </style:style>
    <style:style style:name="Table_5f_3.B3" style:display-name="Table_3.B3" style:family="table-cell">
      <style:table-cell-properties fo:padding="0.101cm" fo:border="none"/>
    </style:style>
    <style:style style:name="Table_5f_3.B4" style:display-name="Table_3.B4" style:family="table-cell">
      <style:table-cell-properties fo:padding="0.101cm" fo:border="none"/>
    </style:style>
    <style:style style:name="Table_5f_3.B5" style:display-name="Table_3.B5" style:family="table-cell">
      <style:table-cell-properties fo:padding="0.101cm" fo:border="none"/>
    </style:style>
    <style:style style:name="Table_5f_3.B6" style:display-name="Table_3.B6" style:family="table-cell">
      <style:table-cell-properties fo:padding="0.101cm" fo:border="none"/>
    </style:style>
    <style:style style:name="Table_5f_4" style:display-name="Table_4" style:family="table">
      <style:table-properties style:width="16.995cm" table:align="left"/>
    </style:style>
    <style:style style:name="Table_5f_4.A" style:display-name="Table_4.A" style:family="table-column">
      <style:table-column-properties style:column-width="6.9cm"/>
    </style:style>
    <style:style style:name="Table_5f_4.B" style:display-name="Table_4.B" style:family="table-column">
      <style:table-column-properties style:column-width="10.095cm"/>
    </style:style>
    <style:style style:name="Table_5f_4.A1" style:display-name="Table_4.A1" style:family="table-cell">
      <style:table-cell-properties style:vertical-align="middle" fo:padding="0.101cm" fo:border="none"/>
    </style:style>
    <style:style style:name="Table_5f_4.A2" style:display-name="Table_4.A2" style:family="table-cell">
      <style:table-cell-properties fo:padding="0.101cm" fo:border="none"/>
    </style:style>
    <style:style style:name="Table_5f_4.B2" style:display-name="Table_4.B2" style:family="table-cell">
      <style:table-cell-properties fo:padding="0.101cm" fo:border="none"/>
    </style:style>
    <style:style style:name="Table_5f_4.A3" style:display-name="Table_4.A3" style:family="table-cell">
      <style:table-cell-properties fo:padding="0.101cm" fo:border="none"/>
    </style:style>
    <style:style style:name="Table_5f_4.B3" style:display-name="Table_4.B3" style:family="table-cell">
      <style:table-cell-properties fo:padding="0.101cm" fo:border="none"/>
    </style:style>
    <style:style style:name="Table_5f_4.A4" style:display-name="Table_4.A4" style:family="table-cell">
      <style:table-cell-properties fo:padding="0.101cm" fo:border="none"/>
    </style:style>
    <style:style style:name="Table_5f_4.B4" style:display-name="Table_4.B4" style:family="table-cell">
      <style:table-cell-properties fo:padding="0.101cm" fo:border="none"/>
    </style:style>
    <style:style style:name="Table_5f_4.A5" style:display-name="Table_4.A5" style:family="table-cell">
      <style:table-cell-properties fo:padding="0.101cm" fo:border="none"/>
    </style:style>
    <style:style style:name="Table_5f_4.B5" style:display-name="Table_4.B5" style:family="table-cell">
      <style:table-cell-properties fo:padding="0.101cm" fo:border="none"/>
    </style:style>
    <style:style style:name="Table_5f_4.A6" style:display-name="Table_4.A6" style:family="table-cell">
      <style:table-cell-properties fo:padding="0.101cm" fo:border="none"/>
    </style:style>
    <style:style style:name="Table_5f_4.B6" style:display-name="Table_4.B6" style:family="table-cell">
      <style:table-cell-properties fo:padding="0.101cm" fo:border="none"/>
    </style:style>
    <style:style style:name="Table_5f_4.A7" style:display-name="Table_4.A7" style:family="table-cell">
      <style:table-cell-properties fo:padding="0.101cm" fo:border="none"/>
    </style:style>
    <style:style style:name="Table_5f_4.B7" style:display-name="Table_4.B7" style:family="table-cell">
      <style:table-cell-properties fo:padding="0.101cm" fo:border="none"/>
    </style:style>
    <style:style style:name="Table_5f_4.A8" style:display-name="Table_4.A8" style:family="table-cell">
      <style:table-cell-properties fo:padding="0.101cm" fo:border="none"/>
    </style:style>
    <style:style style:name="Table_5f_4.B8" style:display-name="Table_4.B8" style:family="table-cell">
      <style:table-cell-properties fo:padding="0.101cm" fo:border="none"/>
    </style:style>
    <style:style style:name="Table_5f_4.A9" style:display-name="Table_4.A9" style:family="table-cell">
      <style:table-cell-properties fo:padding="0.101cm" fo:border="none"/>
    </style:style>
    <style:style style:name="Table_5f_4.B9" style:display-name="Table_4.B9" style:family="table-cell">
      <style:table-cell-properties fo:padding="0.101cm" fo:border="none"/>
    </style:style>
    <style:style style:name="Table_5f_5" style:display-name="Table_5" style:family="table">
      <style:table-properties style:width="16.995cm" table:align="left"/>
    </style:style>
    <style:style style:name="Table_5f_5.A" style:display-name="Table_5.A" style:family="table-column">
      <style:table-column-properties style:column-width="4.498cm"/>
    </style:style>
    <style:style style:name="Table_5f_5.B" style:display-name="Table_5.B" style:family="table-column">
      <style:table-column-properties style:column-width="4.701cm"/>
    </style:style>
    <style:style style:name="Table_5f_5.C" style:display-name="Table_5.C" style:family="table-column">
      <style:table-column-properties style:column-width="7.796cm"/>
    </style:style>
    <style:style style:name="Table_5f_5.A1" style:display-name="Table_5.A1" style:family="table-cell">
      <style:table-cell-properties fo:padding="0.101cm" fo:border="none"/>
    </style:style>
    <style:style style:name="Table_5f_5.A2" style:display-name="Table_5.A2" style:family="table-cell">
      <style:table-cell-properties style:vertical-align="middle" fo:padding="0.101cm" fo:border="none"/>
    </style:style>
    <style:style style:name="P1" style:family="paragraph" style:parent-style-name="Standard" style:list-style-name="">
      <style:paragraph-properties fo:margin-top="0cm" fo:margin-bottom="0.3cm" style:contextual-spacing="false" fo:line-height="115%"/>
      <style:text-properties style:font-name="Times New Roman" fo:font-size="14pt" fo:font-weight="bold"/>
    </style:style>
    <style:style style:name="P2" style:family="paragraph" style:parent-style-name="Standard">
      <style:paragraph-properties fo:margin-top="0.499cm" fo:margin-bottom="0.3cm" style:contextual-spacing="false" fo:line-height="115%"/>
      <style:text-properties style:font-name="Times New Roman" fo:font-size="14pt" fo:font-weight="bold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font-weight="bold"/>
    </style:style>
    <style:style style:name="P5" style:family="paragraph" style:parent-style-name="Standard">
      <style:paragraph-properties fo:margin-top="0cm" fo:margin-bottom="0.199cm" style:contextual-spacing="false" fo:line-height="115%"/>
      <style:text-properties style:font-name="Times New Roman" fo:font-size="14pt"/>
    </style:style>
    <style:style style:name="P6" style:family="paragraph" style:parent-style-name="Standard">
      <style:paragraph-properties fo:margin-left="0.801cm" fo:margin-top="0cm" fo:margin-bottom="0.101cm" style:contextual-spacing="false" fo:line-height="115%"/>
      <style:text-properties style:font-name="Times New Roman" fo:font-size="14pt"/>
    </style:style>
    <style:style style:name="P7" style:family="paragraph" style:parent-style-name="Standard">
      <style:paragraph-properties fo:margin-top="0.499cm" fo:margin-bottom="0.3cm" style:contextual-spacing="false" fo:line-height="115%"/>
      <style:text-properties style:font-name="Times New Roman" fo:font-size="14pt"/>
    </style:style>
    <style:style style:name="P8" style:family="paragraph" style:parent-style-name="Standard">
      <style:paragraph-properties fo:margin-top="0cm" fo:margin-bottom="0.199cm" style:contextual-spacing="false" fo:line-height="100%"/>
      <style:text-properties style:font-name="Times New Roman" fo:font-size="14pt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Times New Roman" fo:font-size="14pt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Кейс 1. Организация школы английского языка</text:h>
      <text:p text:style-name="P2">Задание 1. Цели проекта по методике SMART</text:p>
      <table:table table:name="Table" table:style-name="Table">
        <table:table-column table:style-name="Table.A"/>
        <table:table-column table:style-name="Table.B"/>
        <table:table-row>
          <table:table-cell table:style-name="Table.A1" office:value-type="string">
            <text:p text:style-name="P4">Критерий</text:p>
          </table:table-cell>
          <table:table-cell table:style-name="Table.A1" office:value-type="string">
            <text:p text:style-name="P4">Описание</text:p>
          </table:table-cell>
        </table:table-row>
        <table:table-row>
          <table:table-cell table:style-name="Table.A2" office:value-type="string">
            <text:p text:style-name="P9"><text:span text:style-name="T1">S</text:span> (Specific — конкретная)</text:p>
          </table:table-cell>
          <table:table-cell table:style-name="Table.A1" office:value-type="string">
            <text:p text:style-name="P9">Организовать центр изучения английского языка на базе средней школы №103, предоставляющий образовательные услуги для 4 целевых групп (дети от 3 лет, предприниматели, специалисты, выезжающие за рубеж)</text:p>
          </table:table-cell>
        </table:table-row>
        <table:table-row>
          <table:table-cell table:style-name="Table.A2" office:value-type="string">
            <text:p text:style-name="P9"><text:span text:style-name="T1">M</text:span> (Measurable — измеримая)</text:p>
          </table:table-cell>
          <table:table-cell table:style-name="Table.A1" office:value-type="string">
            <text:p text:style-name="P9">Набрать не менее 10 учебных групп (по 8–12 человек) к 1 марта 2027 г.; обеспечить дополнительный доход школы не менее 500 000 руб. к 31 августа 2027 г.</text:p>
          </table:table-cell>
        </table:table-row>
        <table:table-row>
          <table:table-cell table:style-name="Table.A2" office:value-type="string">
            <text:p text:style-name="P9"><text:span text:style-name="T1">A</text:span> (Achievable — достижимая)</text:p>
          </table:table-cell>
          <table:table-cell table:style-name="Table.A1" office:value-type="string">
            <text:p text:style-name="P9">Школа располагает 7 аудиториями (500 кв.м), которые свободны во второй половине дня; спрос на изучение английского языка сформирован; целевые группы определены</text:p>
          </table:table-cell>
        </table:table-row>
        <table:table-row>
          <table:table-cell table:style-name="Table.A2" office:value-type="string">
            <text:p text:style-name="P9"><text:span text:style-name="T1">R</text:span> (Relevant — значимая)</text:p>
          </table:table-cell>
          <table:table-cell table:style-name="Table.A1" office:value-type="string">
            <text:p text:style-name="P9">Проект соответствует уставным задачам школы, удовлетворяет потребности жителей микрорайона в образовательных услугах, создаёт дополнительный источник финансирования</text:p>
          </table:table-cell>
        </table:table-row>
        <table:table-row>
          <table:table-cell table:style-name="Table.A2" office:value-type="string">
            <text:p text:style-name="P9"><text:span text:style-name="T1">T</text:span> (Time-bound — ограниченная во времени)</text:p>
          </table:table-cell>
          <table:table-cell table:style-name="Table.A1" office:value-type="string">
            <text:p text:style-name="P9">Запуск центра — к 1 декабря 2026 г.; выход на плановую загрузку (10 групп) — к 1 марта 2027 г.</text:p>
          </table:table-cell>
        </table:table-row>
      </table:table>
      <text:p text:style-name="P5"/>
      <text:p text:style-name="P5"><text:span text:style-name="T1">Итоговая SMART-цель:</text:span> К 1 декабря 2026 г. организовать на базе школы №103 центр изучения английского языка, обеспечив набор не менее 10 учебных групп (80–120 слушателей) к 1 марта 2027 г. и дополнительный доход школы не менее 500 000 руб. к 31 августа 2027 г.</text:p>
      <text:p text:style-name="P5"/>
      <text:p text:style-name="P2"/>
      <text:p text:style-name="P2"/>
      <text:p text:style-name="P2"/>
      <text:p text:style-name="P2"/>
      <text:p text:style-name="P2"><text:soft-page-break/>Задание 2. Основные фазы жизненного цикла проекта</text:p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row>
          <table:table-cell table:style-name="Table_5f_1.A1" office:value-type="string">
            <text:p text:style-name="P3">Фаза</text:p>
          </table:table-cell>
          <table:table-cell table:style-name="Table_5f_1.A1" office:value-type="string">
            <text:p text:style-name="P3">Содержание</text:p>
          </table:table-cell>
          <table:table-cell table:style-name="Table_5f_1.A1" office:value-type="string">
            <text:p text:style-name="P3">Ключевые результаты</text:p>
          </table:table-cell>
        </table:table-row>
        <table:table-row>
          <table:table-cell table:style-name="Table_5f_1.A2" office:value-type="string">
            <text:p text:style-name="P8"><text:span text:style-name="T1">1. Инициация</text:span> (1 сентября — 30 сентября 2026 г.)</text:p>
          </table:table-cell>
          <table:table-cell table:style-name="Table_5f_1.B2" office:value-type="string">
            <text:p text:style-name="P9">Обоснование необходимости проекта; определение целей и ожидаемых результатов; получение согласования от администрации школы; предварительная оценка затрат и сроков</text:p>
          </table:table-cell>
          <table:table-cell table:style-name="Table_5f_1.C2" office:value-type="string">
            <text:p text:style-name="P8">Устав проекта, решение о запуске</text:p>
          </table:table-cell>
        </table:table-row>
        <table:table-row>
          <table:table-cell table:style-name="Table_5f_1.A2" office:value-type="string">
            <text:p text:style-name="P8"><text:span text:style-name="T1">2. Планирование</text:span> (1 октября — 31 октября 2026 г.)</text:p>
          </table:table-cell>
          <table:table-cell table:style-name="Table_5f_1.B3" office:value-type="string">
            <text:p text:style-name="P9">Разработка учебных программ для каждой целевой группы; подбор преподавателей; составление расписания; определение стоимости обучения; разработка маркетинговой стратегии; подготовка аудиторий</text:p>
          </table:table-cell>
          <table:table-cell table:style-name="Table_5f_1.C3" office:value-type="string">
            <text:p text:style-name="P8">План проекта, бюджет, расписание, учебные программы</text:p>
          </table:table-cell>
        </table:table-row>
        <table:table-row>
          <table:table-cell table:style-name="Table_5f_1.A2" office:value-type="string">
            <text:p text:style-name="P8"><text:span text:style-name="T1">3. Реализация</text:span> (1 ноября — 30 ноября 2026 г.)</text:p>
          </table:table-cell>
          <table:table-cell table:style-name="Table_5f_1.B4" office:value-type="string">
            <text:p text:style-name="P9">Ремонт и оснащение аудиторий; найм преподавателей; рекламная кампания; набор слушателей; начало занятий — с 1 декабря 2026 г.; административное сопровождение</text:p>
          </table:table-cell>
          <table:table-cell table:style-name="Table_5f_1.C4" office:value-type="string">
            <text:p text:style-name="P8">Функционирующий центр, набранные группы</text:p>
          </table:table-cell>
        </table:table-row>
        <table:table-row>
          <table:table-cell table:style-name="Table_5f_1.A2" office:value-type="string">
            <text:p text:style-name="P8"><text:span text:style-name="T1">4. Мониторинг и контроль</text:span> (1 декабря 2026 г. — 31 августа 2027 г.)</text:p>
          </table:table-cell>
          <table:table-cell table:style-name="Table_5f_1.B5" office:value-type="string">
            <text:p text:style-name="P9">Отслеживание посещаемости и успеваемости; контроль качества преподавания; анализ финансовых показателей; сбор обратной связи от слушателей; корректировка программ</text:p>
          </table:table-cell>
          <table:table-cell table:style-name="Table_5f_1.C5" office:value-type="string">
            <text:p text:style-name="P8">Отчёты о деятельности, корректирующие мероприятия</text:p>
          </table:table-cell>
        </table:table-row>
        <table:table-row>
          <table:table-cell table:style-name="Table_5f_1.A2" office:value-type="string">
            <text:p text:style-name="P8"><text:span text:style-name="T1">5. Завершение</text:span> (1 сентября — 15 сентября 2027 г.)</text:p>
          </table:table-cell>
          <table:table-cell table:style-name="Table_5f_1.B6" office:value-type="string">
            <text:p text:style-name="P9">Подведение итогов первого учебного года; оценка достижения целей; формирование отчёта; принятие решения о продолжении/масштабировании</text:p>
          </table:table-cell>
          <table:table-cell table:style-name="Table_5f_1.C6" office:value-type="string">
            <text:p text:style-name="P8">Итоговый отчёт, решение о дальнейшем развитии</text:p>
          </table:table-cell>
        </table:table-row>
      </table:table>
      <text:p text:style-name="P5"/>
      <text:p text:style-name="P5"/>
      <text:p text:style-name="P2"/>
      <text:p text:style-name="P2"><text:soft-page-break/>Задание 3. Анализ окружения проекта</text:p>
      <text:p text:style-name="P2">Ближнее окружение</text:p>
      <table:table table:name="Table_2" table:style-name="Table_5f_2">
        <table:table-column table:style-name="Table_5f_2.A"/>
        <table:table-column table:style-name="Table_5f_2.B"/>
        <table:table-row>
          <table:table-cell table:style-name="Table_5f_2.A1" office:value-type="string">
            <text:p text:style-name="P3">Фактор</text:p>
          </table:table-cell>
          <table:table-cell table:style-name="Table_5f_2.A1" office:value-type="string">
            <text:p text:style-name="P3">Влияние на проект</text:p>
          </table:table-cell>
        </table:table-row>
        <table:table-row>
          <table:table-cell table:style-name="Table_5f_2.A2" office:value-type="string">
            <text:p text:style-name="P9">Администрация школы №103</text:p>
          </table:table-cell>
          <table:table-cell table:style-name="Table_5f_2.A1" office:value-type="string">
            <text:p text:style-name="P9">Предоставляет аудитории, принимает организационные решения, заинтересована в дополнительном финансировании</text:p>
          </table:table-cell>
        </table:table-row>
        <table:table-row>
          <table:table-cell table:style-name="Table_5f_2.A2" office:value-type="string">
            <text:p text:style-name="P9">Педагогический коллектив школы</text:p>
          </table:table-cell>
          <table:table-cell table:style-name="Table_5f_2.A1" office:value-type="string">
            <text:p text:style-name="P9">Потенциальные преподаватели центра; могут содействовать или противодействовать проекту</text:p>
          </table:table-cell>
        </table:table-row>
        <table:table-row>
          <table:table-cell table:style-name="Table_5f_2.A2" office:value-type="string">
            <text:p text:style-name="P9">Родители учащихся школы</text:p>
          </table:table-cell>
          <table:table-cell table:style-name="Table_5f_2.A1" office:value-type="string">
            <text:p text:style-name="P9">Основная целевая аудитория для детских групп; источник «сарафанного» маркетинга</text:p>
          </table:table-cell>
        </table:table-row>
        <table:table-row>
          <table:table-cell table:style-name="Table_5f_2.A2" office:value-type="string">
            <text:p text:style-name="P9">Учащиеся школы</text:p>
          </table:table-cell>
          <table:table-cell table:style-name="Table_5f_2.A1" office:value-type="string">
            <text:p text:style-name="P9">Потенциальные слушатели; проект создаёт для них дополнительные образовательные возможности</text:p>
          </table:table-cell>
        </table:table-row>
        <table:table-row>
          <table:table-cell table:style-name="Table_5f_2.A2" office:value-type="string">
            <text:p text:style-name="P9">Конкуренты (языковые школы района)</text:p>
          </table:table-cell>
          <table:table-cell table:style-name="Table_5f_2.A1" office:value-type="string">
            <text:p text:style-name="P9">Могут снижать спрос; необходимо учитывать их ценовую политику и предложение</text:p>
          </table:table-cell>
        </table:table-row>
      </table:table>
      <text:p text:style-name="P5"/>
      <text:p text:style-name="P2">Дальнее окружение</text:p>
      <table:table table:name="Table_3" table:style-name="Table_5f_3">
        <table:table-column table:style-name="Table_5f_3.A"/>
        <table:table-column table:style-name="Table_5f_3.B"/>
        <table:table-row>
          <table:table-cell table:style-name="Table_5f_3.A1" office:value-type="string">
            <text:p text:style-name="P3">Фактор</text:p>
          </table:table-cell>
          <table:table-cell table:style-name="Table_5f_3.A1" office:value-type="string">
            <text:p text:style-name="P3">Влияние на проект</text:p>
          </table:table-cell>
        </table:table-row>
        <table:table-row>
          <table:table-cell table:style-name="Table_5f_3.A1" office:value-type="string">
            <text:p text:style-name="P9">Экономическая ситуация</text:p>
          </table:table-cell>
          <table:table-cell table:style-name="Table_5f_3.B2" office:value-type="string">
            <text:p text:style-name="P9">Определяет платёжеспособность целевых групп и готовность инвестировать в образование</text:p>
          </table:table-cell>
        </table:table-row>
        <table:table-row>
          <table:table-cell table:style-name="Table_5f_3.A1" office:value-type="string">
            <text:p text:style-name="P9">Законодательство в сфере образования</text:p>
          </table:table-cell>
          <table:table-cell table:style-name="Table_5f_3.B3" office:value-type="string">
            <text:p text:style-name="P9">Требования к лицензированию дополнительных образовательных услуг, санитарные нормы</text:p>
          </table:table-cell>
        </table:table-row>
        <table:table-row>
          <table:table-cell table:style-name="Table_5f_3.A1" office:value-type="string">
            <text:p text:style-name="P9">Демографическая ситуация</text:p>
          </table:table-cell>
          <table:table-cell table:style-name="Table_5f_3.B4" office:value-type="string">
            <text:p text:style-name="P9">Количество потенциальных слушателей в микрорайоне и близлежащих районах</text:p>
          </table:table-cell>
        </table:table-row>
        <table:table-row>
          <table:table-cell table:style-name="Table_5f_3.A1" office:value-type="string">
            <text:p text:style-name="P9">Технологические тенденции</text:p>
          </table:table-cell>
          <table:table-cell table:style-name="Table_5f_3.B5" office:value-type="string">
            <text:p text:style-name="P9">Рост онлайн-обучения может сократить спрос на очные курсы; необходимость использования современных методик</text:p>
          </table:table-cell>
        </table:table-row>
        <table:table-row>
          <table:table-cell table:style-name="Table_5f_3.A1" office:value-type="string">
            <text:p text:style-name="P9">Социально-культурные факторы</text:p>
          </table:table-cell>
          <table:table-cell table:style-name="Table_5f_3.B6" office:value-type="string">
            <text:p text:style-name="P9">Рост востребованности английского языка в деловой и профессиональной среде усиливает спрос</text:p>
          </table:table-cell>
        </table:table-row>
      </table:table>
      <text:p text:style-name="P5"/>
      <text:p text:style-name="P5"/>
      <text:p text:style-name="P5"/>
      <text:p text:style-name="P5"/>
      <text:p text:style-name="P2"><text:soft-page-break/>Задание 4. Заинтересованные стороны проекта</text:p>
      <table:table table:name="Table_4" table:style-name="Table_5f_4">
        <table:table-column table:style-name="Table_5f_4.A"/>
        <table:table-column table:style-name="Table_5f_4.B"/>
        <table:table-row>
          <table:table-cell table:style-name="Table_5f_4.A1" office:value-type="string">
            <text:p text:style-name="P3">Заинтересованная сторона</text:p>
          </table:table-cell>
          <table:table-cell table:style-name="Table_5f_4.A1" office:value-type="string">
            <text:p text:style-name="P3">Область интересов</text:p>
          </table:table-cell>
        </table:table-row>
        <table:table-row>
          <table:table-cell table:style-name="Table_5f_4.A2" office:value-type="string">
            <text:p text:style-name="P9">Администрация школы №103</text:p>
          </table:table-cell>
          <table:table-cell table:style-name="Table_5f_4.B2" office:value-type="string">
            <text:p text:style-name="P9">Дополнительное финансирование; повышение статуса школы; эффективное использование ресурсов</text:p>
          </table:table-cell>
        </table:table-row>
        <table:table-row>
          <table:table-cell table:style-name="Table_5f_4.A2" office:value-type="string">
            <text:p text:style-name="P9">Преподаватели центра</text:p>
          </table:table-cell>
          <table:table-cell table:style-name="Table_5f_4.B3" office:value-type="string">
            <text:p text:style-name="P9">Дополнительный заработок; профессиональное развитие; комфортные условия работы</text:p>
          </table:table-cell>
        </table:table-row>
        <table:table-row>
          <table:table-cell table:style-name="Table_5f_4.A2" office:value-type="string">
            <text:p text:style-name="P9">Родители детей (3+ лет)</text:p>
          </table:table-cell>
          <table:table-cell table:style-name="Table_5f_4.B4" office:value-type="string">
            <text:p text:style-name="P9">Качественное раннее обучение детей; удобное расположение; доступная цена</text:p>
          </table:table-cell>
        </table:table-row>
        <table:table-row>
          <table:table-cell table:style-name="Table_5f_4.A2" office:value-type="string">
            <text:p text:style-name="P9">Предприниматели</text:p>
          </table:table-cell>
          <table:table-cell table:style-name="Table_5f_4.B5" office:value-type="string">
            <text:p text:style-name="P9">Деловой английский; гибкий график занятий; быстрый практический результат</text:p>
          </table:table-cell>
        </table:table-row>
        <table:table-row>
          <table:table-cell table:style-name="Table_5f_4.A2" office:value-type="string">
            <text:p text:style-name="P9">Специалисты (инженеры, врачи и др.)</text:p>
          </table:table-cell>
          <table:table-cell table:style-name="Table_5f_4.B6" office:value-type="string">
            <text:p text:style-name="P9">Профессиональный английский; работа со специальной литературой</text:p>
          </table:table-cell>
        </table:table-row>
        <table:table-row>
          <table:table-cell table:style-name="Table_5f_4.A2" office:value-type="string">
            <text:p text:style-name="P9">Лица, выезжающие за рубеж</text:p>
          </table:table-cell>
          <table:table-cell table:style-name="Table_5f_4.B7" office:value-type="string">
            <text:p text:style-name="P9">Интенсивные курсы; подготовка к языковым экзаменам (IELTS, TOEFL)</text:p>
          </table:table-cell>
        </table:table-row>
        <table:table-row>
          <table:table-cell table:style-name="Table_5f_4.A2" office:value-type="string">
            <text:p text:style-name="P9">Учащиеся школы №103</text:p>
          </table:table-cell>
          <table:table-cell table:style-name="Table_5f_4.B8" office:value-type="string">
            <text:p text:style-name="P9">Дополнительное образование; повышение успеваемости по иностранному языку</text:p>
          </table:table-cell>
        </table:table-row>
        <table:table-row>
          <table:table-cell table:style-name="Table_5f_4.A2" office:value-type="string">
            <text:p text:style-name="P9">Департамент образования</text:p>
          </table:table-cell>
          <table:table-cell table:style-name="Table_5f_4.B9" office:value-type="string">
            <text:p text:style-name="P9">Соответствие нормативным требованиям; качество образовательных услуг</text:p>
          </table:table-cell>
        </table:table-row>
      </table:table>
      <text:p text:style-name="P5"/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<text:span text:style-name="T1">Задание 5. Матрица стейкхолдеров</text:span></text:p>
      <text:p text:style-name="P5">Матрица построена по модели «Влияние / Интерес» (Power/Interest Grid):</text:p>
      <table:table table:name="Table_5" table:style-name="Table_5f_5">
        <table:table-column table:style-name="Table_5f_5.A"/>
        <table:table-column table:style-name="Table_5f_5.B"/>
        <table:table-column table:style-name="Table_5f_5.C"/>
        <table:table-row>
          <table:table-cell table:style-name="Table_5f_5.A1" office:value-type="string">
            <text:p text:style-name="P4"/>
          </table:table-cell>
          <table:table-cell table:style-name="Table_5f_5.A1" office:value-type="string">
            <text:p text:style-name="P4">Низкий интерес</text:p>
          </table:table-cell>
          <table:table-cell table:style-name="Table_5f_5.A1" office:value-type="string">
            <text:p text:style-name="P4">Высокий интерес</text:p>
          </table:table-cell>
        </table:table-row>
        <table:table-row>
          <table:table-cell table:style-name="Table_5f_5.A2" office:value-type="string">
            <text:p text:style-name="P4">Высокое влияние</text:p>
          </table:table-cell>
          <table:table-cell table:style-name="Table_5f_5.A1" office:value-type="string">
            <text:p text:style-name="P9">Департамент образования (стратегия: <text:span text:style-name="T1">удовлетворять</text:span>)</text:p>
          </table:table-cell>
          <table:table-cell table:style-name="Table_5f_5.A1" office:value-type="string">
            <text:p text:style-name="P9">Администрация школы №103 (стратегия: <text:span text:style-name="T1">управлять тесно</text:span>)</text:p>
          </table:table-cell>
        </table:table-row>
        <table:table-row>
          <table:table-cell table:style-name="Table_5f_5.A2" office:value-type="string">
            <text:p text:style-name="P4">Низкое влияние</text:p>
          </table:table-cell>
          <table:table-cell table:style-name="Table_5f_5.A1" office:value-type="string">
            <text:p text:style-name="P9">Конкуренты (стратегия: <text:span text:style-name="T1">наблюдать</text:span>)</text:p>
          </table:table-cell>
          <table:table-cell table:style-name="Table_5f_5.A1" office:value-type="string">
            <text:p text:style-name="P9">Родители, предприниматели, специалисты, преподаватели (стратегия: <text:span text:style-name="T1">информировать</text:span>)</text:p>
          </table:table-cell>
        </table:table-row>
      </table:table>
      <text:p text:style-name="P5"/>
      <text:p text:style-name="P2">Анализ матрицы</text:p>
      <text:p text:style-name="P6"><text:span text:style-name="T1">Управлять тесно (высокое влияние + высокий интерес):</text:span> Администрация школы — ключевой стейкхолдер, от которого зависит предоставление ресурсов и принятие решений. Необходимо регулярное взаимодействие, отчётность, совместное принятие решений.</text:p>
      <text:p text:style-name="P6"><text:span text:style-name="T1">Удовлетворять (высокое влияние + низкий интерес):</text:span> Департамент образования — обладает регуляторными полномочиями, но не участвует в операционной деятельности. Необходимо обеспечить соответствие всем нормативным требованиям и своевременно предоставлять отчётность.</text:p>
      <text:p text:style-name="P6"><text:span text:style-name="T1">Информировать (низкое влияние + высокий интерес):</text:span> Целевые группы (родители, предприниматели, специалисты) и преподаватели — непосредственно заинтересованы в проекте, но не влияют на стратегические решения. Необходимо регулярное информирование о расписании, программах, результатах.</text:p>
      <text:p text:style-name="P6"><text:span text:style-name="T1">Наблюдать (низкое влияние + низкий интерес):</text:span> Конкуренты — не участвуют в проекте, но их действия необходимо отслеживать для корректировки ценовой и маркетинговой политики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6-06-18T15:08:51.731000000</dc:date>
    <meta:editing-duration>PT3M6S</meta:editing-duration>
    <meta:editing-cycles>3</meta:editing-cycles>
    <meta:document-statistic meta:table-count="6" meta:image-count="0" meta:object-count="0" meta:page-count="5" meta:paragraph-count="95" meta:word-count="730" meta:character-count="6056" meta:non-whitespace-character-count="5406"/>
  </office:meta>
</office:document-meta>
</file>