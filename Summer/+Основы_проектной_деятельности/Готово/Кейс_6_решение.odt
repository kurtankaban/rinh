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ADC000004FDA1F98813.png" manifest:media-type="image/png"/>
  <manifest:file-entry manifest:full-path="Pictures/1000000100000F8C00000437854CEC47.png" manifest:media-type="image/png"/>
  <manifest:file-entry manifest:full-path="Pictures/1000000100000ADC00000309D988BA1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" style:family="table">
      <style:table-properties style:width="16.995cm" table:align="left"/>
    </style:style>
    <style:style style:name="Table.A" style:family="table-column">
      <style:table-column-properties style:column-width="1.995cm"/>
    </style:style>
    <style:style style:name="Table.B" style:family="table-column">
      <style:table-column-properties style:column-width="4.417cm"/>
    </style:style>
    <style:style style:name="Table.C" style:family="table-column">
      <style:table-column-properties style:column-width="7.184cm"/>
    </style:style>
    <style:style style:name="Table.D" style:family="table-column">
      <style:table-column-properties style:column-width="3.399cm"/>
    </style:style>
    <style:style style:name="Table.A1" style:family="table-cell">
      <style:table-cell-properties fo:padding="0.101cm" fo:border="none"/>
    </style:style>
    <style:style style:name="P1" style:family="paragraph" style:parent-style-name="Standard" style:list-style-name="">
      <style:paragraph-properties fo:margin-top="0cm" fo:margin-bottom="0.3cm" style:contextual-spacing="false" fo:line-height="100%"/>
      <style:text-properties style:font-name="Times New Roman" fo:font-size="14pt" fo:font-weight="bold"/>
    </style:style>
    <style:style style:name="P2" style:family="paragraph" style:parent-style-name="Standard">
      <style:paragraph-properties fo:margin-top="0.499cm" fo:margin-bottom="0.3cm" style:contextual-spacing="false" fo:line-height="100%"/>
      <style:text-properties style:font-name="Times New Roman" fo:font-size="14pt" fo:font-weight="bold"/>
    </style:style>
    <style:style style:name="P3" style:family="paragraph" style:parent-style-name="Standard">
      <style:paragraph-properties fo:margin-top="0cm" fo:margin-bottom="0.199cm" style:contextual-spacing="false" fo:line-height="100%"/>
      <style:text-properties style:font-name="Times New Roman" fo:font-size="14pt" fo:font-weight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bold"/>
    </style:style>
    <style:style style:name="P5" style:family="paragraph" style:parent-style-name="Standard">
      <style:paragraph-properties fo:margin-left="0.801cm" fo:margin-top="0cm" fo:margin-bottom="0.101cm" style:contextual-spacing="false" fo:line-height="100%"/>
      <style:text-properties style:font-name="Times New Roman" fo:font-size="14pt"/>
    </style:style>
    <style:style style:name="P6" style:family="paragraph" style:parent-style-name="Standard">
      <style:paragraph-properties fo:margin-top="0cm" fo:margin-bottom="0.199cm" style:contextual-spacing="false" fo:line-height="100%"/>
      <style:text-properties style:font-name="Times New Roman" fo:font-size="14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4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paragraph-rsid="0001a0ed"/>
    </style:style>
    <style:style style:name="P9" style:family="paragraph" style:parent-style-name="Standard">
      <style:paragraph-properties fo:margin-top="0cm" fo:margin-bottom="0.199cm" style:contextual-spacing="false" fo:line-height="100%"/>
      <style:text-properties style:font-name="Times New Roman" fo:font-size="14pt" officeooo:paragraph-rsid="0001a0ed"/>
    </style:style>
    <style:style style:name="P10" style:family="paragraph" style:parent-style-name="Standard">
      <style:paragraph-properties fo:margin-top="0.499cm" fo:margin-bottom="0.3cm" style:contextual-spacing="false" fo:line-height="100%"/>
      <style:text-properties style:font-name="Times New Roman" fo:font-size="14pt"/>
    </style:style>
    <style:style style:name="P11" style:family="paragraph" style:parent-style-name="Standard">
      <style:paragraph-properties fo:margin-top="0cm" fo:margin-bottom="0.199cm" style:contextual-spacing="false" fo:line-height="100%"/>
      <style:text-properties style:font-name="Times New Roman" fo:font-size="14pt" officeooo:paragraph-rsid="0001eda2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Кейс 6. Сроки проекта — Предновогодняя ярмарка</text:h>
      <text:p text:style-name="P2">Исходные данные</text:p>
      <text:p text:style-name="P5">Дизайн (визуал, логотип, афиши): <text:span text:style-name="T1">14 дней</text:span></text:p>
      <text:p text:style-name="P5">Производство домиков-лотков: <text:span text:style-name="T1">7 дней</text:span></text:p>
      <text:p text:style-name="P5">Поиск и сбор участников: <text:span text:style-name="T1">7 дней</text:span></text:p>
      <text:p text:style-name="P5">Продвижение и маркетинг: <text:span text:style-name="T1">1 месяц (30 дней)</text:span></text:p>
      <text:p text:style-name="P5">Программа мероприятий (мастер-классы, концерты): <text:span text:style-name="T1">14 дней</text:span></text:p>
      <text:p text:style-name="P5">Помощники: <text:span text:style-name="T1">2 человека</text:span> (+ руководитель проекта)</text:p>
      <text:p text:style-name="P5">Дата проведения ярмарки: <text:span text:style-name="T1">25–31 декабря 2026 г.</text:span></text:p>
      <text:p text:style-name="P6"/>
      <text:p text:style-name="P2">Задание. Расчёт сроков подготовки</text:p>
      <text:p text:style-name="P2">Анализ зависимостей между задачами</text:p>
      <text:p text:style-name="P6">Определим логические зависимости:</text:p>
      <text:p text:style-name="P5"><text:span text:style-name="T1">Дизайн (14 дней)</text:span> — начинается первым, так как логотип и афиши нужны для маркетинга и производства домиков (оформление)</text:p>
      <text:p text:style-name="P5"><text:span text:style-name="T1">Продвижение и маркетинг (30 дней)</text:span> — может начаться только после завершения дизайна (нужны афиши и визуал)</text:p>
      <text:p text:style-name="P5"><text:span text:style-name="T1">Производство домиков-лотков (7 дней)</text:span> — может идти параллельно с маркетингом (после дизайна, так как нужно оформление)</text:p>
      <text:p text:style-name="P5"><text:span text:style-name="T1">Поиск и сбор участников (7 дней)</text:span> — может идти параллельно с маркетингом</text:p>
      <text:p text:style-name="P5"><text:span text:style-name="T1">Программа мероприятий (14 дней)</text:span> — может идти параллельно с маркетингом</text:p>
      <text:p text:style-name="P2">Распределение задач с учётом параллельности</text:p>
      <text:p text:style-name="P6">С учётом 2 помощников (3 человека в команде) можно выполнять до 3 задач параллельно.</text:p>
      <text:p text:style-name="P3">Последовательность выполнения:</text:p>
      <table:table table:name="Table" table:style-name="Table">
        <table:table-column table:style-name="Table.A"/>
        <table:table-column table:style-name="Table.B"/>
        <table:table-column table:style-name="Table.C"/>
        <table:table-column table:style-name="Table.D"/>
        <table:table-row>
          <table:table-cell table:style-name="Table.A1" office:value-type="string">
            <text:p text:style-name="P4">Период</text:p>
          </table:table-cell>
          <table:table-cell table:style-name="Table.A1" office:value-type="string">
            <text:p text:style-name="P4">Даты</text:p>
          </table:table-cell>
          <table:table-cell table:style-name="Table.A1" office:value-type="string">
            <text:p text:style-name="P4">Задача</text:p>
          </table:table-cell>
          <table:table-cell table:style-name="Table.A1" office:value-type="string">
            <text:p text:style-name="P4">Исполнитель</text:p>
          </table:table-cell>
        </table:table-row>
        <table:table-row>
          <table:table-cell table:style-name="Table.A1" office:value-type="string">
            <text:p text:style-name="P7">Этап 1</text:p>
          </table:table-cell>
          <table:table-cell table:style-name="Table.A1" office:value-type="string">
            <text:p text:style-name="P8">11 ноября — </text:p>
            <text:p text:style-name="P8">24 ноября 2026 г.</text:p>
          </table:table-cell>
          <table:table-cell table:style-name="Table.A1" office:value-type="string">
            <text:p text:style-name="P7">Дизайн (визуал, логотип, афиши) — 14 дней</text:p>
          </table:table-cell>
          <table:table-cell table:style-name="Table.A1" office:value-type="string">
            <text:p text:style-name="P7">Помощник 1</text:p>
          </table:table-cell>
        </table:table-row>
        <table:table-row>
          <table:table-cell table:style-name="Table.A1" office:value-type="string">
            <text:p text:style-name="P7">Этап 1</text:p>
          </table:table-cell>
          <table:table-cell table:style-name="Table.A1" office:value-type="string">
            <text:p text:style-name="P8">11 ноября — </text:p>
            <text:p text:style-name="P8">17 ноября 2026 г.</text:p>
          </table:table-cell>
          <table:table-cell table:style-name="Table.A1" office:value-type="string">
            <text:p text:style-name="P7">Поиск и сбор участников — 7 дней</text:p>
          </table:table-cell>
          <table:table-cell table:style-name="Table.A1" office:value-type="string">
            <text:p text:style-name="P7">Помощник 2</text:p>
          </table:table-cell>
        </table:table-row>
        <table:table-row>
          <table:table-cell table:style-name="Table.A1" office:value-type="string">
            <text:p text:style-name="P7">Этап 1</text:p>
          </table:table-cell>
          <table:table-cell table:style-name="Table.A1" office:value-type="string">
            <text:p text:style-name="P8">11 ноября — </text:p>
            <text:p text:style-name="P8">24 ноября 2026 г.</text:p>
          </table:table-cell>
          <table:table-cell table:style-name="Table.A1" office:value-type="string">
            <text:p text:style-name="P7">Программа мероприятий — 14 дней</text:p>
          </table:table-cell>
          <table:table-cell table:style-name="Table.A1" office:value-type="string">
            <text:p text:style-name="P7">Руководитель</text:p>
          </table:table-cell>
        </table:table-row>
        <text:soft-page-break/>
        <table:table-row>
          <table:table-cell table:style-name="Table.A1" office:value-type="string">
            <text:p text:style-name="P7">Этап 2</text:p>
          </table:table-cell>
          <table:table-cell table:style-name="Table.A1" office:value-type="string">
            <text:p text:style-name="P8">25 ноября — </text:p>
            <text:p text:style-name="P8">24 декабря 2026 г.</text:p>
          </table:table-cell>
          <table:table-cell table:style-name="Table.A1" office:value-type="string">
            <text:p text:style-name="P7">Продвижение и маркетинг — 30 дней</text:p>
          </table:table-cell>
          <table:table-cell table:style-name="Table.A1" office:value-type="string">
            <text:p text:style-name="P7">Помощник 1</text:p>
          </table:table-cell>
        </table:table-row>
        <table:table-row>
          <table:table-cell table:style-name="Table.A1" office:value-type="string">
            <text:p text:style-name="P7">Этап 2</text:p>
          </table:table-cell>
          <table:table-cell table:style-name="Table.A1" office:value-type="string">
            <text:p text:style-name="P8">25 ноября — </text:p>
            <text:p text:style-name="P8">1 декабря 2026 г.</text:p>
          </table:table-cell>
          <table:table-cell table:style-name="Table.A1" office:value-type="string">
            <text:p text:style-name="P7">Производство домиков-лотков — 7 дней</text:p>
          </table:table-cell>
          <table:table-cell table:style-name="Table.A1" office:value-type="string">
            <text:p text:style-name="P7">Помощник 2</text:p>
          </table:table-cell>
        </table:table-row>
      </table:table>
      <text:p text:style-name="P6"/>
      <text:p text:style-name="P2">Критический путь</text:p>
      <text:p text:style-name="P6">Критический путь — самая длинная цепочка зависимых задач:</text:p>
      <text:p text:style-name="P3">Дизайн (14 дней: 11–24 ноября) → Продвижение и маркетинг (30 дней: 25 ноября — 24 декабря) = 44 дня</text:p>
      <text:p text:style-name="P6">Остальные задачи выполняются параллельно и укладываются в этот срок:</text:p>
      <text:p text:style-name="P5">Поиск участников (7 дней) — завершается 17 ноября 2026 г.</text:p>
      <text:p text:style-name="P5">Программа мероприятий (14 дней) — завершается 24 ноября 2026 г.</text:p>
      <text:p text:style-name="P5">Производство домиков (7 дней) — завершается 1 декабря 2026 г.</text:p>
      <text:p text:style-name="P2">Ответ</text:p>
      <text:p text:style-name="P3">Для подготовки к ярмарке необходимо 44 дня.</text:p>
      <text:p text:style-name="P6">Ярмарка запланирована на 25 декабря 2026 г., начать подготовку нужно не позднее <text:span text:style-name="T1">11 ноября 2026 г.</text:span></text:p>
      <text:p text:style-name="P3"/>
      <text:p text:style-name="P10"><draw:frame draw:style-name="fr2" draw:name="Изображение1" text:anchor-type="char" svg:width="17cm" svg:height="7.809cm" draw:z-index="1"><draw:image xlink:href="Pictures/1000000100000ADC000004FDA1F98813.png" xlink:type="simple" xlink:show="embed" xlink:actuate="onLoad" draw:mime-type="image/png"/></draw:frame></text:p>
      <text:p text:style-name="P11"><text:span text:style-name="T1">Критический путь</text:span> выделен: Дизайн (11–24.11) → Продвижение и маркетинг (25.11–24.12) = 44 дня.</text:p>
      <text:p text:style-name="P10"><draw:frame draw:style-name="fr1" draw:name="Изображение3" text:anchor-type="char" svg:width="17cm" svg:height="4.607cm" draw:z-index="2"><draw:image xlink:href="Pictures/1000000100000F8C00000437854CEC47.png" xlink:type="simple" xlink:show="embed" xlink:actuate="onLoad" draw:mime-type="image/png"/></draw:frame><text:soft-page-break/></text:p>
      <text:p text:style-name="P10"><text:span text:style-name="T1">Загрузка ресурсов</text:span></text:p>
      <text:p text:style-name="P10"><draw:frame draw:style-name="fr2" draw:name="Изображение2" text:anchor-type="char" svg:width="17cm" svg:height="4.75cm" draw:z-index="0"><draw:image xlink:href="Pictures/1000000100000ADC00000309D988BA14.png" xlink:type="simple" xlink:show="embed" xlink:actuate="onLoad" draw:mime-type="image/png"/></draw:frame><text:span text:style-name="T1"/></text:p>
      <text:p text:style-name="P6">Руководитель после 24 ноября 2026 г. занимается общей координацией и контролем. Помощник 2 после 1 декабря 2026 г. имеет свободные периоды и может помогать с маркетингом или другими задачам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6-06-18T15:26:53.681000000</dc:date>
    <meta:editing-duration>PT12M45S</meta:editing-duration>
    <meta:editing-cycles>2</meta:editing-cycles>
    <meta:document-statistic meta:table-count="1" meta:image-count="3" meta:object-count="0" meta:page-count="3" meta:paragraph-count="62" meta:word-count="362" meta:character-count="2390" meta:non-whitespace-character-count="2068"/>
  </office:meta>
</office:document-meta>
</file>