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6.995cm" table:align="left"/>
    </style:style>
    <style:style style:name="Table.A" style:family="table-column">
      <style:table-column-properties style:column-width="1.099cm"/>
    </style:style>
    <style:style style:name="Table.B" style:family="table-column">
      <style:table-column-properties style:column-width="12.7cm"/>
    </style:style>
    <style:style style:name="Table.C" style:family="table-column">
      <style:table-column-properties style:column-width="3.196cm"/>
    </style:style>
    <style:style style:name="Table.A1" style:family="table-cell">
      <style:table-cell-properties fo:padding="0.101cm" fo:border="none"/>
    </style:style>
    <style:style style:name="Table.C1" style:family="table-cell">
      <style:table-cell-properties style:vertical-align="middle"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 fo:font-weight="bold"/>
    </style:style>
    <style:style style:name="P2" style:family="paragraph" style:parent-style-name="Standard" style:list-style-name="">
      <style:paragraph-properties fo:margin-top="0cm" fo:margin-bottom="0.3cm" style:contextual-spacing="false" fo:line-height="100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left="0.801cm" fo:margin-top="0cm" fo:margin-bottom="0.101cm" style:contextual-spacing="false" fo:line-height="100%"/>
      <style:text-properties style:font-name="Times New Roman" fo:font-size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Кейс 2. Формирование команды проекта «Ярмарка Мастеров Юга России»</text:h>
      <text:p text:style-name="P1">Исходные данные</text:p>
      <text:p text:style-name="P5">Проект: «Ярмарка Мастеров Юга России»</text:p>
      <text:p text:style-name="P5">Место проведения: г. Ростов-на-Дону</text:p>
      <text:p text:style-name="P5">Сроки проведения: 1–7 марта 2021 г.</text:p>
      <text:p text:style-name="P5">Формирование команды: к 1 декабря 2020 г. (за 3 месяца до мероприятия)</text:p>
      <text:p text:style-name="P5">Роль: Руководитель проекта</text:p>
      <text:p text:style-name="P5"/>
      <text:p text:style-name="P1">Задание 1. Состав команды проекта</text:p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4">№</text:p>
          </table:table-cell>
          <table:table-cell table:style-name="Table.A1" office:value-type="string">
            <text:p text:style-name="P3">Должность</text:p>
          </table:table-cell>
          <table:table-cell table:style-name="Table.C1" office:value-type="string">
            <text:p text:style-name="P4">Количество</text:p>
          </table:table-cell>
        </table:table-row>
        <table:table-row>
          <table:table-cell table:style-name="Table.A1" office:value-type="string">
            <text:p text:style-name="P8">1</text:p>
          </table:table-cell>
          <table:table-cell table:style-name="Table.A1" office:value-type="string">
            <text:p text:style-name="P7">Руководитель проекта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2</text:p>
          </table:table-cell>
          <table:table-cell table:style-name="Table.A1" office:value-type="string">
            <text:p text:style-name="P7">Координатор по работе с участниками (мастерами)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3</text:p>
          </table:table-cell>
          <table:table-cell table:style-name="Table.A1" office:value-type="string">
            <text:p text:style-name="P7">Менеджер по маркетингу и PR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4</text:p>
          </table:table-cell>
          <table:table-cell table:style-name="Table.A1" office:value-type="string">
            <text:p text:style-name="P7">Менеджер по логистике и площадке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5</text:p>
          </table:table-cell>
          <table:table-cell table:style-name="Table.A1" office:value-type="string">
            <text:p text:style-name="P7">Финансовый менеджер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6</text:p>
          </table:table-cell>
          <table:table-cell table:style-name="Table.A1" office:value-type="string">
            <text:p text:style-name="P7">Координатор культурно-развлекательной программы</text:p>
          </table:table-cell>
          <table:table-cell table:style-name="Table.C1" office:value-type="string">
            <text:p text:style-name="P8">1</text:p>
          </table:table-cell>
        </table:table-row>
        <table:table-row>
          <table:table-cell table:style-name="Table.A1" office:value-type="string">
            <text:p text:style-name="P8">7</text:p>
          </table:table-cell>
          <table:table-cell table:style-name="Table.A1" office:value-type="string">
            <text:p text:style-name="P7">Администратор (секретарь проекта)</text:p>
          </table:table-cell>
          <table:table-cell table:style-name="Table.C1" office:value-type="string">
            <text:p text:style-name="P8">1</text:p>
          </table:table-cell>
        </table:table-row>
      </table:table>
      <text:p text:style-name="P5"/>
      <text:p text:style-name="P5"><text:span text:style-name="T1">Итого: 7 человек</text:span> в основной команде управления проектом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Задание 2. Функциональные обязанности членов команды</text:p>
      <text:p text:style-name="P1">1. Руководитель проекта</text:p>
      <text:p text:style-name="P6">Общее руководство проектом, принятие ключевых решений;</text:p>
      <text:p text:style-name="P6">Координация работы всех членов команды;</text:p>
      <text:p text:style-name="P6">Взаимодействие с заказчиком, спонсорами и органами власти;</text:p>
      <text:p text:style-name="P6">Контроль сроков, бюджета и качества;</text:p>
      <text:p text:style-name="P6">Управление рисками проекта;</text:p>
      <text:p text:style-name="P6">Проведение совещаний команды, распределение задач;</text:p>
      <text:p text:style-name="P6">Итоговая отчётность по проекту.</text:p>
      <text:p text:style-name="P1">2. Координатор по работе с участниками (мастерами)</text:p>
      <text:p text:style-name="P6">Поиск и привлечение мастеров-участников ярмарки из регионов Юга России;</text:p>
      <text:p text:style-name="P6">Формирование базы данных участников;</text:p>
      <text:p text:style-name="P6">Заключение договоров с участниками, согласование условий участия;</text:p>
      <text:p text:style-name="P6">Распределение торговых мест между участниками;</text:p>
      <text:p text:style-name="P6">Оперативная коммуникация с мастерами по организационным вопросам;</text:p>
      <text:p text:style-name="P6">Контроль соответствия продукции участников требованиям ярмарки.</text:p>
      <text:p text:style-name="P1">3. Менеджер по маркетингу и PR</text:p>
      <text:p text:style-name="P6">Разработка маркетинговой стратегии продвижения ярмарки;</text:p>
      <text:p text:style-name="P6">Создание фирменного стиля, рекламных материалов (афиши, баннеры, листовки);</text:p>
      <text:p text:style-name="P6">Ведение социальных сетей и сайта мероприятия;</text:p>
      <text:p text:style-name="P6">Взаимодействие со СМИ, организация пресс-релизов;</text:p>
      <text:p text:style-name="P6">Организация рекламных кампаний (онлайн и офлайн);</text:p>
      <text:p text:style-name="P6">Привлечение посетителей на ярмарку;</text:p>
      <text:p text:style-name="P6">Фото- и видеосъёмка мероприятия.</text:p>
      <text:p text:style-name="P1">4. Менеджер по логистике и площадке</text:p>
      <text:p text:style-name="P6">Поиск и аренда площадки для проведения ярмарки;</text:p>
      <text:p text:style-name="P6">Организация застройки площадки: павильоны, стенды, навигация;</text:p>
      <text:p text:style-name="P6">Обеспечение технического оснащения (электричество, освещение, звук);</text:p>
      <text:p text:style-name="P6">Организация транспортной логистики (доставка оборудования, парковка);</text:p>
      <text:p text:style-name="P6">Контроль безопасности: охрана, пожарная безопасность, медицинское обеспечение;</text:p>
      <text:p text:style-name="P6">Организация уборки и обслуживания территории;</text:p>
      <text:p text:style-name="P6"><text:soft-page-break/>Взаимодействие с подрядчиками (монтажные бригады, клининг, охрана).</text:p>
      <text:p text:style-name="P1">5. Финансовый менеджер</text:p>
      <text:p text:style-name="P6">Разработка бюджета проекта и контроль его исполнения;</text:p>
      <text:p text:style-name="P6">Ведение финансовой документации;</text:p>
      <text:p text:style-name="P6">Расчёт стоимости участия для мастеров;</text:p>
      <text:p text:style-name="P6">Приём оплаты от участников, контроль поступлений;</text:p>
      <text:p text:style-name="P6">Оплата поставщиков и подрядчиков;</text:p>
      <text:p text:style-name="P6">Поиск спонсоров и партнёров;</text:p>
      <text:p text:style-name="P6">Подготовка финансового отчёта по итогам проекта.</text:p>
      <text:p text:style-name="P1">6. Координатор культурно-развлекательной программы</text:p>
      <text:p text:style-name="P6">Разработка программы мероприятий: мастер-классы, концерты, конкурсы;</text:p>
      <text:p text:style-name="P6">Поиск и приглашение артистов, ведущих, спикеров;</text:p>
      <text:p text:style-name="P6">Составление расписания культурной программы;</text:p>
      <text:p text:style-name="P6">Организация сцены и зон для мастер-классов;</text:p>
      <text:p text:style-name="P6">Координация выступлений в дни проведения ярмарки;</text:p>
      <text:p text:style-name="P6">Обеспечение звукового и светового оборудования для выступлений.</text:p>
      <text:p text:style-name="P1">7. Администратор (секретарь проекта)</text:p>
      <text:p text:style-name="P6">Ведение документооборота проекта;</text:p>
      <text:p text:style-name="P6">Протоколирование совещаний;</text:p>
      <text:p text:style-name="P6">Координация расписания встреч команды;</text:p>
      <text:p text:style-name="P6">Подготовка и рассылка информационных материалов;</text:p>
      <text:p text:style-name="P6">Поддержка коммуникации между членами команды;</text:p>
      <text:p text:style-name="P6">Ведение реестра задач и контроль их выполнения;</text:p>
      <text:p text:style-name="P6">Обработка входящих запросов от участников и посетителе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10:04.825000000</dc:date>
    <meta:editing-duration>PT45S</meta:editing-duration>
    <meta:editing-cycles>1</meta:editing-cycles>
    <meta:document-statistic meta:table-count="1" meta:image-count="0" meta:object-count="0" meta:page-count="3" meta:paragraph-count="88" meta:word-count="395" meta:character-count="3236" meta:non-whitespace-character-count="2930"/>
  </office:meta>
</office:document-meta>
</file>