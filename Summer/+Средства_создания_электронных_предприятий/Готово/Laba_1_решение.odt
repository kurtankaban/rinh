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2">
      <style:paragraph-properties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3">
      <style:paragraph-properties fo:line-height="115%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L4">
      <style:paragraph-properties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5">
      <style:paragraph-properties fo:line-height="115%"/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6">
      <style:paragraph-properties fo:line-height="115%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7">
      <style:paragraph-properties fo:line-height="115%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8">
      <style:paragraph-properties fo:line-height="115%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9">
      <style:paragraph-properties fo:line-height="115%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01cm" fo:margin-bottom="0.201cm" style:contextual-spacing="false" fo:line-height="115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1: Анализ моделей электронного бизнеса</text:p>
      <text:p text:style-name="P1"/>
      <text:p text:style-name="P13">Введение</text:p>
      <text:p text:style-name="P1">В данной работе проанализированы 4 интернет-проекта с различными бизнес-моделями. Для каждого определена модель, описана её реализация, выделены преимущества и риски.</text:p>
      <text:p text:style-name="P1"/>
      <text:p text:style-name="P14">1. Wildberries — интернет-магазин / маркетплейс</text:p>
      <text:p text:style-name="P1"><text:span text:style-name="T1">Бизнес-модель:</text:span> B2C (Business-to-Consumer) с элементами C2C (продавцы-физлица через маркетплейс)</text:p>
      <text:p text:style-name="P1"/>
      <text:p text:style-name="P1"><text:span text:style-name="T1">Реализация модели: </text:span>Wildberries начинал как классический интернет-магазин одежды, но трансформировался в маркетплейс. Платформа выступает посредником между продавцами (бренды, ИП, самозанятые) и покупателями. Доход формируется из комиссии с продаж (от 5% до 15% в зависимости от категории), платы за хранение на складе и логистику. Покупатель получает товар через сеть пунктов выдачи заказов (ПВЗ), что снижает стоимость доставки.</text:p>
      <text:p text:style-name="P1"/>
      <text:p text:style-name="P4"><text:span text:style-name="T1">Преимущества:</text:span></text:p>
      <text:list text:style-name="L1">
        <text:list-item>
          <text:p text:style-name="P2">Огромный ассортимент без необходимости закупать товар на склад — продавцы сами поставляют продукцию</text:p>
        </text:list-item>
        <text:list-item>
          <text:p text:style-name="P2">Развитая логистическая сеть ПВЗ по всей России снижает порог входа для покупателей</text:p>
        </text:list-item>
        <text:list-item>
          <text:p text:style-name="P2">Масштабируемость: добавление новых продавцов не требует значительных инвестиций</text:p>
        </text:list-item>
      </text:list>
      <text:p text:style-name="P1"/>
      <text:p text:style-name="P4"><text:span text:style-name="T1">Риски:</text:span></text:p>
      <text:list text:style-name="L2">
        <text:list-item>
          <text:p text:style-name="P3">Зависимость от качества товаров сторонних продавцов — негативные отзывы бьют по репутации площадки</text:p>
        </text:list-item>
        <text:list-item>
          <text:p text:style-name="P3">Высокий процент возвратов (особенно в категории одежды — до 30-40%)</text:p>
        </text:list-item>
        <text:list-item>
          <text:p text:style-name="P3">Регуляторные риски: антимонопольное давление при доминирующем положении на рынке</text:p>
        </text:list-item>
      </text:list>
      <text:p text:style-name="P1"/>
      <text:p text:style-name="P1"/>
      <text:p text:style-name="P1"/>
      <text:p text:style-name="P1"/>
      <text:p text:style-name="P14"><text:soft-page-break/>2. Битрикс24 — SaaS-сервис для бизнеса</text:p>
      <text:p text:style-name="P1"><text:span text:style-name="T1">Бизнес-модель:</text:span> B2B (Business-to-Business), модель SaaS (Software as a Service)</text:p>
      <text:p text:style-name="P1"/>
      <text:p text:style-name="P1"><text:span text:style-name="T1">Реализация модели: </text:span>Битрикс24 предоставляет облачную платформу для управления бизнесом: CRM, управление задачами и проектами, корпоративный мессенджер, телефония, конструктор сайтов. Модель монетизации — подписка (freemium): базовый тариф бесплатный с ограничениями, платные тарифы от 2 490 до 13 990 руб./мес. Дополнительный доход приносит коробочная версия (on-premise) и маркетплейс интеграций.</text:p>
      <text:p text:style-name="P1"/>
      <text:p text:style-name="P4"><text:span text:style-name="T2">Преимущества:</text:span></text:p>
      <text:list text:style-name="L3">
        <text:list-item>
          <text:p text:style-name="P5">Предсказуемый доход от подписок (recurring revenue)</text:p>
        </text:list-item>
        <text:list-item>
          <text:p text:style-name="P5">Низкая стоимость привлечения клиента за счёт бесплатного тарифа — компания «подсаживается» на продукт и переходит на платный план</text:p>
        </text:list-item>
        <text:list-item>
          <text:p text:style-name="P5">Высокий порог переключения: когда вся компания работает в системе, мигрировать на другой продукт дорого</text:p>
        </text:list-item>
      </text:list>
      <text:p text:style-name="P1"/>
      <text:p text:style-name="P13">Риски:</text:p>
      <text:list text:style-name="L4">
        <text:list-item>
          <text:p text:style-name="P6">Высокая конкуренция со стороны международных решений (Notion, Monday, Salesforce)</text:p>
        </text:list-item>
        <text:list-item>
          <text:p text:style-name="P6">Необходимость постоянных инвестиций в разработку и инфраструктуру серверов</text:p>
        </text:list-item>
        <text:list-item>
          <text:p text:style-name="P6">Отток клиентов (churn) при экономическом спаде — бизнес первым режет расходы на ПО</text:p>
        </text:list-item>
      </text:list>
      <text:p text:style-name="P1"/>
      <text:p text:style-name="P14">3. Авито — классифайд-платформа</text:p>
      <text:p text:style-name="P1"><text:span text:style-name="T1">Бизнес-модель: </text:span>C2C (Consumer-to-Consumer) с элементами B2C</text:p>
      <text:p text:style-name="P1"/>
      <text:p text:style-name="P1"><text:span text:style-name="T1">Реализация модели:</text:span> Авито — крупнейшая в России доска объявлений. Частные лица и компании размещают объявления о продаже товаров, услуг, недвижимости, автомобилей и поиске работы. Базовое размещение бесплатно. Монетизация строится на платных услугах продвижения объявлений (выделение, поднятие, VIP-статус), подписках для бизнеса (Авито Pro), а также комиссии с безопасных сделок через встроенную систему оплаты и доставки (Авито Доставка).</text:p>
      <text:p text:style-name="P1"/>
      <text:p text:style-name="P1"/>
      <text:p text:style-name="P13"><text:soft-page-break/>Преимущества:</text:p>
      <text:list text:style-name="L5">
        <text:list-item>
          <text:p text:style-name="P7">Сетевой эффект: чем больше продавцов — тем больше покупателей, и наоборот</text:p>
        </text:list-item>
        <text:list-item>
          <text:p text:style-name="P7">Низкие операционные расходы: контент создают сами пользователи (UGC)</text:p>
        </text:list-item>
        <text:list-item>
          <text:p text:style-name="P7">Диверсификация по категориям (товары, авто, недвижимость, работа, услуги) снижает зависимость от одного сегмента</text:p>
        </text:list-item>
      </text:list>
      <text:p text:style-name="P1"/>
      <text:p text:style-name="P13">Риски:</text:p>
      <text:list text:style-name="L6">
        <text:list-item>
          <text:p text:style-name="P8">Мошенничество между пользователями подрывает доверие к платформе</text:p>
        </text:list-item>
        <text:list-item>
          <text:p text:style-name="P8">Бесплатность базового размещения ограничивает монетизацию — конверсия в платные услуги невысока</text:p>
        </text:list-item>
        <text:list-item>
          <text:p text:style-name="P8">Угроза со стороны специализированных вертикальных платформ (Циан для недвижимости, hh.ru для работы)</text:p>
        </text:list-item>
      </text:list>
      <text:p text:style-name="P1"/>
      <text:p text:style-name="P1"/>
      <text:p text:style-name="P14">4. Skillbox — онлайн-образовательная платформа</text:p>
      <text:p text:style-name="P1"><text:span text:style-name="T1">Бизнес-модель:</text:span> B2C с элементами B2B (корпоративное обучение)</text:p>
      <text:p text:style-name="P1"/>
      <text:p text:style-name="P1"><text:span text:style-name="T1">Реализация модели:</text:span> Skillbox продаёт онлайн-курсы по IT, дизайну, маркетингу, управлению и другим направлениям. Модель монетизации — продажа курсов (разовая покупка или рассрочка). Контент создаётся совместно с отраслевыми экспертами и компаниями-партнёрами. Дополнительно платформа предлагает корпоративное обучение (B2B-сегмент) и программы с трудоустройством, где часть дохода формируется из партнёрских отношений с работодателями.</text:p>
      <text:p text:style-name="P1"/>
      <text:p text:style-name="P13">Преимущества:</text:p>
      <text:list text:style-name="L7">
        <text:list-item>
          <text:p text:style-name="P9">Масштабируемость: один записанный курс продаётся неограниченному числу студентов</text:p>
        </text:list-item>
        <text:list-item>
          <text:p text:style-name="P9">Высокий средний чек (курсы стоят от 30 000 до 150 000 руб.) при относительно низкой себестоимости</text:p>
        </text:list-item>
        <text:list-item>
          <text:p text:style-name="P9">Рассрочка снижает барьер входа и увеличивает конверсию</text:p>
        </text:list-item>
      </text:list>
      <text:p text:style-name="P1"/>
      <text:p text:style-name="P13">Риски:</text:p>
      <text:list text:style-name="L8">
        <text:list-item>
          <text:p text:style-name="P10">Высокая стоимость привлечения студентов (CAC) — расходы на рекламу в EdTech одни из самых высоких</text:p>
        </text:list-item>
        <text:list-item>
          <text:p text:style-name="P10"><text:soft-page-break/>Процент завершения курсов низкий (в среднем 15-20%), что создаёт репутационные проблемы</text:p>
        </text:list-item>
        <text:list-item>
          <text:p text:style-name="P10">Зависимость от экспертов-преподавателей — уход ключевого эксперта обесценивает курс</text:p>
        </text:list-item>
      </text:list>
      <text:p text:style-name="P1"/>
      <text:p text:style-name="P13">Выводы</text:p>
      <text:p text:style-name="P1">Каждая из рассмотренных моделей решает разные задачи рынка:</text:p>
      <text:p text:style-name="P1"/>
      <text:list text:style-name="L9">
        <text:list-item>
          <text:p text:style-name="P11">Маркетплейс (Wildberries) эффективен при масштабе, но уязвим к проблемам качества и возвратов</text:p>
        </text:list-item>
        <text:list-item>
          <text:p text:style-name="P11">SaaS (Битрикс24) даёт стабильный recurring-доход, но требует постоянных инвестиций в продукт</text:p>
        </text:list-item>
        <text:list-item>
          <text:p text:style-name="P11">Классифайд (Авито) растёт за счёт сетевого эффекта, но ограничен в монетизации</text:p>
        </text:list-item>
        <text:list-item>
          <text:p text:style-name="P11">EdTech (Skillbox) имеет высокую маржинальность, но дорогое привлечение клиентов</text:p>
        </text:list-item>
      </text:list>
      <text:p text:style-name="P1"/>
      <text:p text:style-name="P1">Наиболее устойчивая модель — SaaS (B2B), благодаря предсказуемому доходу и высокому порогу переключения клиентов. Наиболее масштабируемая — маркетплейс, но она требует значительных вложений в логистику и контроль качеств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1T19:19:07.426000000</meta:creation-date>
    <meta:generator>LibreOffice/7.6.4.1$Windows_X86_64 LibreOffice_project/e19e193f88cd6c0525a17fb7a176ed8e6a3e2aa1</meta:generator>
    <dc:date>2026-06-11T19:23:59.164000000</dc:date>
    <meta:editing-duration>PT4M52S</meta:editing-duration>
    <meta:editing-cycles>1</meta:editing-cycles>
    <meta:document-statistic meta:table-count="0" meta:image-count="0" meta:object-count="0" meta:page-count="4" meta:paragraph-count="54" meta:word-count="647" meta:character-count="5150" meta:non-whitespace-character-count="4567"/>
  </office:meta>
</office:document-meta>
</file>