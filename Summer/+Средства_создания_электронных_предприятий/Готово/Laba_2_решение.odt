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paragraph-properties fo:margin-top="0cm" fo:margin-bottom="0cm" style:contextual-spacing="false" fo:line-height="115%"/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L2">
      <style:paragraph-properties fo:margin-top="0cm" fo:margin-bottom="0cm" style:contextual-spacing="false" fo:line-height="115%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я работа 2: Разработка концепции MVP</text:p>
      <text:p text:style-name="P1"/>
      <text:p text:style-name="P5">Идея сервиса</text:p>
      <text:p text:style-name="P1"><text:span text:style-name="T1">Название: </text:span>SkillSwap</text:p>
      <text:p text:style-name="P1"/>
      <text:p text:style-name="P1"><text:span text:style-name="T1">Суть:</text:span> Онлайн-платформа для обмена навыками и знаниями между людьми без денежных расчётов. Пользователь предлагает то, чему может научить (например, игра на гитаре, основы Python, разговорный английский), и взамен получает обучение от другого пользователя в интересующей его области. Формат — видеозвонки 1-на-1.</text:p>
      <text:p text:style-name="P1"/>
      <text:p text:style-name="P6">Целевая аудитория</text:p>
      <text:p text:style-name="P1"><text:span text:style-name="T1">Основной сегмент: </text:span>студенты и молодые специалисты 18-30 лет, которые хотят освоить новые навыки, но ограничены в бюджете на платные курсы и репетиторов.</text:p>
      <text:p text:style-name="P1"/>
      <text:p text:style-name="P1"><text:span text:style-name="T1">Дополнительный сегмент: </text:span>специалисты 25-40 лет, которые хотят сменить профессию или расширить компетенции — готовы делиться экспертизой в своей области в обмен на знания из другой.</text:p>
      <text:p text:style-name="P1"/>
      <text:p text:style-name="P1"><text:span text:style-name="T1">Портрет пользователя: </text:span>Студент IT-специальности, хорошо знает Python, хочет выучить испанский язык. Денег на репетитора нет, но он может обучить основам программирования носителя испанского, который, в свою очередь, хочет войти в IT.</text:p>
      <text:p text:style-name="P1"/>
      <text:p text:style-name="P6">Ценностное предложение</text:p>
      <text:p text:style-name="P1">«Учись новому, обучая других — бесплатно и на равных»</text:p>
      <text:p text:style-name="P1"/>
      <text:p text:style-name="P1">Платформа решает проблему дорогого образования, используя принцип бартера знаний. В отличие от YouTube или бесплатных курсов, здесь обучение персонализированное (1-на-1) и двустороннее — оба участника мотивированы, потому что оба получают пользу.</text:p>
      <text:p text:style-name="P1"/>
      <text:p text:style-name="P6">Полный набор функций (видение продукта)</text:p>
      <text:list text:style-name="L1">
        <text:list-item>
          <text:p text:style-name="P2">Регистрация и профиль с указанием навыков (предлагаю / хочу изучить)</text:p>
        </text:list-item>
        <text:list-item>
          <text:p text:style-name="P2">Алгоритм матчинга — подбор пар пользователей с взаимодополняющими навыками</text:p>
        </text:list-item>
        <text:list-item>
          <text:p text:style-name="P2"><text:soft-page-break/>Встроенный видеозвонок для занятий</text:p>
        </text:list-item>
        <text:list-item>
          <text:p text:style-name="P2">Календарь и планирование сессий</text:p>
        </text:list-item>
        <text:list-item>
          <text:p text:style-name="P2">Система рейтингов и отзывов</text:p>
        </text:list-item>
        <text:list-item>
          <text:p text:style-name="P2">Геймификация (бейджи, уровни, достижения)</text:p>
        </text:list-item>
        <text:list-item>
          <text:p text:style-name="P2">Групповые занятия</text:p>
        </text:list-item>
        <text:list-item>
          <text:p text:style-name="P2">Встроенный чат и обмен файлами</text:p>
        </text:list-item>
        <text:list-item>
          <text:p text:style-name="P2">Модерация контента и верификация навыков</text:p>
        </text:list-item>
        <text:list-item>
          <text:p text:style-name="P2">Мобильное приложение (iOS/Android)</text:p>
        </text:list-item>
      </text:list>
      <text:p text:style-name="P1"/>
      <text:p text:style-name="P6">MVP — минимальный набор функций</text:p>
      <text:p text:style-name="P1">Для запуска MVP выбраны 5 функций:</text:p>
      <text:p text:style-name="P1"/>
      <text:p text:style-name="P1"><text:span text:style-name="T1">1. Регистрация и профиль. </text:span>Пользователь создаёт аккаунт (через email или Google), заполняет профиль: имя, краткое описание, список навыков, которые готов предложить, и список навыков, которые хочет освоить. Без профиля невозможно взаимодействие — это фундамент платформы.</text:p>
      <text:p text:style-name="P1"/>
      <text:p text:style-name="P1"><text:span text:style-name="T1">2. Алгоритм матчинга. </text:span>Простой поиск и фильтрация по навыкам. Пользователь видит список людей, которые предлагают интересующий его навык и одновременно хотят изучить то, что он может предложить. На этапе MVP — это фильтр по категориям без сложного ML-алгоритма. Это ядро продукта — без матчинга платформа не имеет смысла.</text:p>
      <text:p text:style-name="P1"/>
      <text:p text:style-name="P1"><text:span text:style-name="T1">3. Встроенный чат. </text:span>Текстовый чат между подобранными пользователями для обсуждения деталей: время занятия, формат, уровень подготовки. Минимальная коммуникация необходима для организации обмена. Видеозвонок в MVP не включён — пользователи могут использовать Zoom/Google Meet по договорённости.</text:p>
      <text:p text:style-name="P1"/>
      <text:p text:style-name="P1"><text:span text:style-name="T1">4. Календарь сессий. </text:span>Простое планирование: пользователь предлагает время, второй подтверждает. Напоминание перед занятием на email. Без планирования занятия будут срываться — нужна минимальная структура.</text:p>
      <text:p text:style-name="P1"/>
      <text:p text:style-name="P1"><text:span text:style-name="T1">5. Рейтинг и отзывы.</text:span> После каждой сессии оба участника оценивают друг друга (1-5 звёзд) и оставляют короткий отзыв. Рейтинг отображается в профиле. Это создаёт доверие и мотивацию качественно обучать — без рейтинга пользователи не смогут отличить хорошего «преподавателя» от плохого.</text:p>
      <text:p text:style-name="P1"/>
      <text:p text:style-name="P6"><text:soft-page-break/>Обоснование выбора MVP</text:p>
      <text:p text:style-name="P1">Выбранные 5 функций образуют замкнутый цикл пользовательского опыта: зарегистрироваться → найти пару → договориться → провести занятие → оценить. Это минимально необходимый набор для проверки главной гипотезы: готовы ли люди обменивать свои знания на чужие в формате 1-на-1.</text:p>
      <text:p text:style-name="P1"/>
      <text:p text:style-name="P4">Что сознательно исключено из MVP и почему:</text:p>
      <text:list text:style-name="L2">
        <text:list-item>
          <text:p text:style-name="P3"><text:span text:style-name="T1">Встроенный видеозвонок</text:span> — дорогая в разработке функция (WebRTC, серверы для медиа). Пользователи могут созваниваться через Zoom или Google Meet — ссылку отправляют в чате. Если MVP покажет спрос, видеозвонок добавится во второй версии.</text:p>
        </text:list-item>
        <text:list-item>
          <text:p text:style-name="P3"><text:span text:style-name="T1">Геймификация</text:span> — приятная, но не критичная функция. На старте важнее проверить базовую механику обмена, а не вовлечение через бейджи.</text:p>
        </text:list-item>
        <text:list-item>
          <text:p text:style-name="P3"><text:span text:style-name="T1">Групповые занятия</text:span> — усложняют матчинг и организацию. Формат 1-на-1 проще и для пользователей, и для разработки.</text:p>
        </text:list-item>
        <text:list-item>
          <text:p text:style-name="P3"><text:span text:style-name="T1">Мобильное приложение</text:span> — на этапе MVP достаточно адаптивного веб-приложения. Нативные приложения — это месяцы дополнительной разработки.</text:p>
        </text:list-item>
        <text:list-item>
          <text:p text:style-name="P3"><text:span text:style-name="T1">Верификация навыков </text:span>— требует экспертов или тестов для каждой категории. На старте эту роль выполняют отзывы и рейтинги.</text:p>
        </text:list-item>
      </text:list>
      <text:p text:style-name="P4"><text:span text:style-name="T1">Технический стек MVP: </text:span>React (фронтенд), Node.js (бэкенд), PostgreSQL (база данных), WebSocket (чат). Срок разработки — 6-8 недель одним разработчико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1T19:24:33.041000000</meta:creation-date>
    <meta:generator>LibreOffice/7.6.4.1$Windows_X86_64 LibreOffice_project/e19e193f88cd6c0525a17fb7a176ed8e6a3e2aa1</meta:generator>
    <dc:date>2026-06-11T19:29:02.019000000</dc:date>
    <meta:editing-duration>PT4M29S</meta:editing-duration>
    <meta:editing-cycles>2</meta:editing-cycles>
    <meta:document-statistic meta:table-count="0" meta:image-count="0" meta:object-count="0" meta:page-count="3" meta:paragraph-count="38" meta:word-count="585" meta:character-count="4401" meta:non-whitespace-character-count="3849"/>
  </office:meta>
</office:document-meta>
</file>