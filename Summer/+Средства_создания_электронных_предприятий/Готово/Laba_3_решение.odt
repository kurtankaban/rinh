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55000008139DA06E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я работа 3: Построение Customer Journey Map (CJM)</text:p>
      <text:p text:style-name="P1"/>
      <text:p text:style-name="P4">Сервис</text:p>
      <text:p text:style-name="P1">Платформа <text:span text:style-name="T1">SkillSwap</text:span> — обмен навыками между пользователями (из ЛР 2).</text:p>
      <text:p text:style-name="P1"/>
      <text:p text:style-name="P5">Customer Journey Map</text:p>
      <text:p text:style-name="P1">Ниже представлен путь клиента от первого знакомства с сервисом до повторного использования. CJM описывает опыт типичного пользователя — студента, который хочет выучить испанский язык и готов обучать основам Python.</text:p>
      <text:p text:style-name="P1"/>
      <text:p text:style-name="P5">Этап 1: Осведомлённость (Awareness)</text:p>
      <text:p text:style-name="P1"><text:span text:style-name="T1">Действия клиента: </text:span>Студент видит рекламу SkillSwap в Instagram/Telegram или находит упоминание в статье на Хабре. Переходит на сайт, читает главную страницу, смотрит как это работает.</text:p>
      <text:p text:style-name="P1"/>
      <text:p text:style-name="P1"><text:span text:style-name="T1">Мысли и чувства: </text:span>«Интересная идея — учить язык бесплатно в обмен на то, что я и так знаю. Но работает ли это реально? Не окажется ли это пустой площадкой без людей?» Эмоция: любопытство + скептицизм.</text:p>
      <text:p text:style-name="P1"/>
      <text:p text:style-name="P1"><text:span text:style-name="T1">Точки контакта:</text:span> Таргетированная реклама в соцсетях, лендинг сайта, блог-статья.</text:p>
      <text:p text:style-name="P1"/>
      <text:p text:style-name="P1"><text:span text:style-name="T1">Болевые точки: </text:span>Непонятно, сколько людей уже на платформе. Нет социального доказательства (отзывов, кейсов). Страница может выглядеть «пустой» для нового сервиса.</text:p>
      <text:p text:style-name="P1"/>
      <text:p text:style-name="P1"><text:span text:style-name="T1">Возможности для улучшения:</text:span> Добавить на лендинг счётчик пользователей и примеры успешных обменов. Разместить отзывы первых пользователей (даже из бета-теста). Показать популярные категории навыков с количеством предложений.</text:p>
      <text:p text:style-name="P1"/>
      <text:p text:style-name="P5">Этап 2: Регистрация и заполнение профиля</text:p>
      <text:p text:style-name="P1"><text:span text:style-name="T1">Действия клиента: </text:span>Нажимает «Зарегистрироваться», входит через Google-аккаунт. Заполняет профиль: указывает «Python (базовый уровень)» в навыках для обмена и «Испанский язык (с нуля)» в желаемых навыках. Пишет краткое описание о себе.</text:p>
      <text:p text:style-name="P1"><text:soft-page-break/></text:p>
      <text:p text:style-name="P1"><text:span text:style-name="T1">Мысли и чувства:</text:span> «Регистрация простая, это хорошо. Но как правильно описать свой уровень Python? Я не преподаватель, вдруг от меня ожидают профессионального обучения? Не знаю, что писать в описании.» Эмоция: лёгкая тревога, неуверенность.</text:p>
      <text:p text:style-name="P1"/>
      <text:p text:style-name="P1"><text:span text:style-name="T1">Точки контакта: </text:span>Форма регистрации, страница профиля, выбор категорий навыков.</text:p>
      <text:p text:style-name="P1"/>
      <text:p text:style-name="P1"><text:span text:style-name="T1">Болевые точки: </text:span>Нет подсказок, как описать свой уровень навыка. Неясно, какой уровень экспертизы нужен — профессиональный или достаточно базового. Категории навыков могут быть слишком общими или, наоборот, не содержать нужного.</text:p>
      <text:p text:style-name="P1"/>
      <text:p text:style-name="P1"><text:span text:style-name="T1">Возможности для улучшения: </text:span>Добавить шаблоны описания профиля и примеры. Ввести уровни навыков (начальный / средний / продвинутый) с пояснениями. Позволить пользователю добавить свою категорию, если нужной нет в списке.</text:p>
      <text:p text:style-name="P1"/>
      <text:p text:style-name="P5">Этап 3: Поиск пары (матчинг)</text:p>
      <text:p text:style-name="P1"><text:span text:style-name="T1">Действия клиента:</text:span> Открывает раздел поиска. Фильтрует по навыку «Испанский язык». Видит несколько профилей людей, которые предлагают испанский и хотят изучить программирование. Просматривает их рейтинги и описания. Выбирает подходящего человека.</text:p>
      <text:p text:style-name="P1"/>
      <text:p text:style-name="P1"><text:span text:style-name="T1">Мысли и чувства:</text:span> «О, есть люди! Этот парень предлагает испанский и хочет учить Python — идеальное совпадение. Но у него пока нет отзывов... Рискнуть или подождать кого-то с рейтингом?» Эмоция: воодушевление + сомнение.</text:p>
      <text:p text:style-name="P1"/>
      <text:p text:style-name="P1"><text:span text:style-name="T1">Точки контакта: </text:span>Страница поиска, фильтры, карточки профилей пользователей.</text:p>
      <text:p text:style-name="P1"/>
      <text:p text:style-name="P1"><text:span text:style-name="T1">Болевые точки: </text:span>На старте платформы мало пользователей — выбор ограничен. Нет отзывов у новых пользователей, сложно оценить качество. Может не быть точного совпадения по навыкам (человек предлагает испанский, но хочет JavaScript, а не Python).</text:p>
      <text:p text:style-name="P1"/>
      <text:p text:style-name="P1"><text:soft-page-break/><text:span text:style-name="T1">Возможности для улучшения:</text:span> Уведомлять пользователя по email, когда появляется подходящая пара. Показывать «частичные совпадения» (испанский ↔ программирование в целом, не только Python). На старте — ручной матчинг командой поддержки для первых пользователей.</text:p>
      <text:p text:style-name="P1"/>
      <text:p text:style-name="P5">Этап 4: Первый контакт и договорённость</text:p>
      <text:p text:style-name="P1"><text:span text:style-name="T1">Действия клиента:</text:span> Отправляет сообщение выбранному пользователю в чате: представляется, описывает свой уровень, предлагает формат (2 занятия в неделю по 45 минут — одно по испанскому, одно по Python). Договариваются о времени первой сессии, создают событие в календаре.</text:p>
      <text:p text:style-name="P1"/>
      <text:p text:style-name="P1"><text:span text:style-name="T1">Мысли и чувства:</text:span> «Немного неловко писать незнакомому человеку. Как начать? Надеюсь, он адекватный. Формат 2 раза в неделю — не слишком ли часто? А если он не ответит?» Эмоция: волнение, неловкость.</text:p>
      <text:p text:style-name="P1"/>
      <text:p text:style-name="P1"><text:span text:style-name="T1">Точки контакта: </text:span>Встроенный чат, календарь планирования, email-уведомления.</text:p>
      <text:p text:style-name="P1"/>
      <text:p text:style-name="P1"><text:span text:style-name="T1">Болевые точки: </text:span>Нет шаблона первого сообщения — пользователь не знает, как начать общение. Сложно договориться о формате, если у обоих разные ожидания. Пользователь может не отвечать на сообщения (нет механизма ответственности).</text:p>
      <text:p text:style-name="P1"/>
      <text:p text:style-name="P1"><text:span text:style-name="T1">Возможности для улучшения: </text:span>Предложить шаблон первого сообщения. Добавить индикатор «обычно отвечает за X часов». Ввести рекомендуемые форматы занятий (30/45/60 мин, 1-2 раза в неделю) как подсказку при планировании.</text:p>
      <text:p text:style-name="P1"/>
      <text:p text:style-name="P5">Этап 5: Проведение первого занятия</text:p>
      <text:p text:style-name="P1"><text:span text:style-name="T1">Действия клиента: </text:span>Получает напоминание за 30 минут. Переходит по ссылке на Zoom/Google Meet (ссылку отправил партнёр в чате). Проводит 45 минут занятия по испанскому с партнёром. Партнёр объясняет базовые фразы, студент повторяет.</text:p>
      <text:p text:style-name="P1"/>
      <text:p text:style-name="P1"><text:span text:style-name="T1">Мысли и чувства:</text:span> «Начало было немного сумбурным — непонятно, кто ведёт занятие. Но потом разговорились, и за 45 минут я реально выучил базовые приветствия и пару конструкций. Это работает! Но хотелось бы какой-то структуры занятия.» Эмоция: поначалу неловкость, затем удовлетворение.</text:p>
      <text:p text:style-name="P1"><text:soft-page-break/></text:p>
      <text:p text:style-name="P1"><text:span text:style-name="T1">Точки контакта: </text:span>Email-напоминание, чат (ссылка на звонок), внешний сервис видеосвязи.</text:p>
      <text:p text:style-name="P1"/>
      <text:p text:style-name="P1"><text:span text:style-name="T1">Болевые точки: </text:span>Нет встроенного видеозвонка — нужно переключаться на другой сервис. Нет структуры занятия — оба участника импровизируют. Качество обучения зависит от навыков объяснения партнёра (а он не профессиональный преподаватель).</text:p>
      <text:p text:style-name="P1"/>
      <text:p text:style-name="P1"><text:span text:style-name="T1">Возможности для улучшения: </text:span>Предложить шаблон плана занятия для популярных категорий. Добавить рекомендации «как быть хорошим обучающим партнёром». В будущем — встроить видеозвонок, чтобы не уводить пользователя на внешний сервис.</text:p>
      <text:p text:style-name="P1"/>
      <text:p text:style-name="P5">Этап 6: Оценка и обратная связь</text:p>
      <text:p text:style-name="P1"><text:span text:style-name="T1">Действия клиента:</text:span> После занятия получает push/email: «Как прошло занятие? Оцените партнёра». Ставит 4 из 5 звёзд, пишет отзыв: «Хорошее занятие, но немного не хватило структуры. Мария терпеливо объясняла, буду продолжать». Видит, что партнёр тоже поставил ему 5 звёзд.</text:p>
      <text:p text:style-name="P1"/>
      <text:p text:style-name="P1"><text:span text:style-name="T3">Мысли и чувства:</text:span> «Приятно, что партнёр тоже доволен. 4 звезды — честная оценка, надеюсь, не обидится. Интересно посмотреть, как будет расти мой рейтинг.» Эмоция: удовлетворение, мотивация продолжать.</text:p>
      <text:p text:style-name="P1"/>
      <text:p text:style-name="P1"><text:span text:style-name="T1">Точки контакта: </text:span>Форма оценки, страница профиля (рейтинг), email-уведомление об оценке.</text:p>
      <text:p text:style-name="P1"/>
      <text:p text:style-name="P1"><text:span text:style-name="T1">Болевые точки: </text:span>Пользователи склонны завышать оценки (5 звёзд всем), что обесценивает рейтинг. Негативный отзыв может привести к конфликту. Нет механизма разрешения споров.</text:p>
      <text:p text:style-name="P1"/>
      <text:p text:style-name="P1"><text:span text:style-name="T1">Возможности для улучшения: </text:span>Сделать отзывы анонимными на первое время. Добавить конкретные критерии оценки (пунктуальность, качество объяснений, подготовленность). Ввести систему медиации для конфликтных ситуаций.</text:p>
      <text:p text:style-name="P1"/>
      <text:p text:style-name="P5"/>
      <text:p text:style-name="P5"/>
      <text:p text:style-name="P5"><text:soft-page-break/>Этап 7: Повторное использование и удержание</text:p>
      <text:p text:style-name="P1"><text:span text:style-name="T1">Действия клиента: </text:span>Продолжает заниматься с тем же партнёром 2 раза в неделю. Через месяц решает попробовать обменять ещё один навык — ищет нового партнёра для обмена «Python ↔ основы дизайна». Рекомендует платформу однокурсникам.</text:p>
      <text:p text:style-name="P1"/>
      <text:p text:style-name="P1"><text:span text:style-name="T1">Мысли и чувства: </text:span>«За месяц реально продвинулся в испанском — уже могу читать простые тексты. И мне нравится объяснять Python — оказывается, это помогает самому лучше понимать материал. Хочу попробовать ещё и дизайн освоить.» Эмоция: уверенность, энтузиазм, лояльность к платформе.</text:p>
      <text:p text:style-name="P1"/>
      <text:p text:style-name="P1"><text:span text:style-name="T1">Точки контакта: </text:span>Поиск новых партнёров, реферальная ссылка, email-рассылка с рекомендациями.</text:p>
      <text:p text:style-name="P1"/>
      <text:p text:style-name="P1"><text:span text:style-name="T1">Болевые точки:</text:span> Если партнёр пропадает (бросает занятия), пользователь остаётся без пары и теряет мотивацию. Нет напоминаний о регулярности занятий. Рутина может наскучить без элементов прогресса.</text:p>
      <text:p text:style-name="P1"/>
      <text:p text:style-name="P1"><text:span text:style-name="T1">Возможности для улучшения: </text:span>Ввести трекер прогресса (количество проведённых сессий, часы обучения). Отправлять мотивационные напоминания при перерыве в занятиях. Добавить реферальную программу с бонусами за приглашённых пользователей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Визуализация CJM</text:p>
      <text:p text:style-name="P1"><draw:frame draw:style-name="fr1" draw:name="Изображение1" text:anchor-type="char" svg:width="17cm" svg:height="14.707cm" draw:z-index="0"><draw:image xlink:href="Pictures/1000000100000955000008139DA06ED1.png" xlink:type="simple" xlink:show="embed" xlink:actuate="onLoad" draw:mime-type="image/png"/></draw:frame></text:p>
      <text:p text:style-name="P4">Комментарий к CJM</text:p>
      <text:p text:style-name="P3">Анализ пути клиента выявил три критические точки, где пользователь наиболее уязвим к оттоку:</text:p>
      <text:list text:style-name="L1">
        <text:list-item>
          <text:p text:style-name="P2">Поиск пары (этап 3) — главный риск на старте платформы. Если пользователь не находит подходящего партнёра в первые 2-3 дня, он уходит. Решение: email-уведомления о новых совпадениях и ручной матчинг на старте.</text:p>
        </text:list-item>
        <text:list-item>
          <text:p text:style-name="P2">Первый контакт (этап 4) — социальный барьер. Написать незнакомому человеку сложно. Решение: шаблоны сообщений и рекомендуемые форматы занятий снижают неловкость.</text:p>
        </text:list-item>
        <text:list-item>
          <text:p text:style-name="P2">Удержание (этап 7) — если партнёр пропадает, пользователь теряет мотивацию. Решение: трекер прогресса и быстрый подбор нового партнёра.</text:p>
        </text:list-item>
      </text:list>
      <text:p text:style-name="P1"/>
      <text:p text:style-name="P1"><text:soft-page-break/><text:span text:style-name="T1">Общий тренд эмоций </text:span>— «U-образный» на каждом этапе: начальная неуверенность сменяется удовлетворением после успешного действия. Задача платформы — сгладить начальные «провалы» через подсказки, шаблоны и автоматизацию рутинных действ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1T19:30:11.359000000</meta:creation-date>
    <dc:date>2026-06-11T19:37:15.893000000</dc:date>
    <meta:editing-duration>PT7M5S</meta:editing-duration>
    <meta:editing-cycles>1</meta:editing-cycles>
    <meta:document-statistic meta:table-count="0" meta:image-count="1" meta:object-count="0" meta:page-count="7" meta:paragraph-count="54" meta:word-count="1096" meta:character-count="8361" meta:non-whitespace-character-count="7299"/>
    <meta:generator>LibreOffice/7.6.4.1$Windows_X86_64 LibreOffice_project/e19e193f88cd6c0525a17fb7a176ed8e6a3e2aa1</meta:generator>
  </office:meta>
</office:document-meta>
</file>